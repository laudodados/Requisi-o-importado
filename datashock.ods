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 New" svg:font-family="&quot;Courier Ne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333399" fo:border-bottom="none" fo:border-left="none" fo:border-right="thin solid #333399" style:vertical-align="automatic" fo:background-color="#333399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order-top="thin solid #99CCFF" fo:border-bottom="none" fo:border-left="thin solid #99CCFF" fo:border-right="none" style:vertical-align="automatic" fo:background-color="#99CCFF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fo:border-top="thin solid #99CCFF" fo:border-bottom="none" fo:border-left="thin solid #99CCFF" fo:border-right="none" style:vertical-align="automatic" fo:background-color="#99CC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CCCCFF" fo:border-bottom="none" fo:border-left="thin solid #CCCCFF" fo:border-right="none" style:vertical-align="automatic" fo:background-color="#CCCCFF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fo:border-top="thin solid #CCCCFF" fo:border-bottom="none" fo:border-left="thin solid #CCCCFF" fo:border-right="none" style:vertical-align="automatic" fo:background-color="#CCCC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2pt solid #FFFFFF" fo:border-left="none" fo:border-right="none" style:vertical-align="automatic" fo:background-color="#FFFFFF"/>
      <style:text-properties fo:color="#333399"/>
    </style:style>
    <style:style style:name="ce8" style:family="table-cell" style:parent-style-name="Default" style:data-style-name="N0">
      <style:table-cell-properties fo:border-top="none" fo:border-bottom="none" fo:border-left="none" fo:border-right="thin solid #333399" style:vertical-align="automatic" fo:background-color="#333399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349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de_valo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7">
            <text:p>Tabela de Preço</text:p>
          </table:table-cell>
          <table:table-cell table:number-columns-repeated="7" table:style-name="ce7"/>
          <table:table-cell table:number-columns-repeated="16376" table:style-name="ce1"/>
        </table:table-row>
        <table:table-row table:style-name="ro1">
          <table:table-cell office:value-type="string" table:style-name="ce2">
            <text:p>PRODUTO</text:p>
          </table:table-cell>
          <table:table-cell office:value-type="string" table:style-name="ce2">
            <text:p>Descrica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Origem</text:p>
          </table:table-cell>
          <table:table-cell office:value-type="string" table:style-name="ce2">
            <text:p>NCM</text:p>
          </table:table-cell>
          <table:table-cell office:value-type="string" table:style-name="ce2">
            <text:p>CODIGO BARRAS</text:p>
          </table:table-cell>
          <table:table-cell office:value-type="string" table:style-name="ce2">
            <text:p>ALIQ IPI</text:p>
          </table:table-cell>
          <table:table-cell office:value-type="string" table:style-name="ce2">
            <text:p>PRECO UNIT</text:p>
          </table:table-cell>
          <table:table-cell office:value-type="string" table:style-name="ce8">
            <text:p>Estoqu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8918</text:p>
          </table:table-cell>
          <table:table-cell office:value-type="string" table:style-name="ce3">
            <text:p>ABRACADEIRA PARA KIT SOLA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90.90</text:p>
          </table:table-cell>
          <table:table-cell office:value-type="string" table:style-name="ce3">
            <text:p>789900561074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1" table:style-name="ce4">
            <text:p><text:s/>2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918</text:p>
          </table:table-cell>
          <table:table-cell office:value-type="string" table:style-name="ce5">
            <text:p>ABRACADEIRA PARA KIT SOLA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90.90</text:p>
          </table:table-cell>
          <table:table-cell office:value-type="string" table:style-name="ce5">
            <text:p>789900561074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3" table:style-name="ce6">
            <text:p><text:s/>2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31</text:p>
          </table:table-cell>
          <table:table-cell office:value-type="string" table:style-name="ce3">
            <text:p>ACABAMENTO EXTERNO ROBO LIMPADOR AUT.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33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" table:style-name="ce4">
            <text:p><text:s/>7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853</text:p>
          </table:table-cell>
          <table:table-cell office:value-type="string" table:style-name="ce5">
            <text:p>ACABAMENTO INOX 316 SKIMMER B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502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92" table:style-name="ce6">
            <text:p><text:s/>39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855</text:p>
          </table:table-cell>
          <table:table-cell office:value-type="string" table:style-name="ce3">
            <text:p>ACABAMENTO INOX 316 SKIMMER BP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5033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13" table:style-name="ce4">
            <text:p><text:s/>21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074</text:p>
          </table:table-cell>
          <table:table-cell office:value-type="string" table:style-name="ce5">
            <text:p>ACABAMENTO INOX POLIDO PARA CHUMB ESCADA 1.1/2 POL.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79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8" table:style-name="ce6">
            <text:p><text:s/>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075</text:p>
          </table:table-cell>
          <table:table-cell office:value-type="string" table:style-name="ce3">
            <text:p>ACABAMENTO INOX POLIDO PARA CHUMB. ESCADA <text:s/>2 POL.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380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8" table:style-name="ce4">
            <text:p><text:s/>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876</text:p>
          </table:table-cell>
          <table:table-cell office:value-type="string" table:style-name="ce5">
            <text:p>ACABAMENTO INOX SKIMMER COMPACT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448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90" table:style-name="ce6">
            <text:p><text:s/>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175</text:p>
          </table:table-cell>
          <table:table-cell office:value-type="string" table:style-name="ce3">
            <text:p>ACIONADOR PNEUMATICO C/ TAMPA INOX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35.30.19</text:p>
          </table:table-cell>
          <table:table-cell office:value-type="string" table:style-name="ce3">
            <text:p>789900563201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81" table:style-name="ce4">
            <text:p><text:s/>58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481</text:p>
          </table:table-cell>
          <table:table-cell office:value-type="string" table:style-name="ce5">
            <text:p>ACIONADOR PNEUMATICO NA CAIXA DE PASSAGE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536.50.90</text:p>
          </table:table-cell>
          <table:table-cell office:value-type="string" table:style-name="ce5">
            <text:p>7899005611235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25" table:style-name="ce6">
            <text:p><text:s/>32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1888</text:p>
          </table:table-cell>
          <table:table-cell office:value-type="string" table:style-name="ce3">
            <text:p>ADAPTADOR COM GARRAS PARA REFLETOR PRATIC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0443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7" table:style-name="ce4">
            <text:p><text:s/>4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07</text:p>
          </table:table-cell>
          <table:table-cell office:value-type="string" table:style-name="ce5">
            <text:p>ADAPTADOR DIREITO ROB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65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8" table:style-name="ce6">
            <text:p><text:s/>4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68</text:p>
          </table:table-cell>
          <table:table-cell office:value-type="string" table:style-name="ce3">
            <text:p>ADAPTADOR DO EIXO P/ROBO LIMPADOR AUTOMATICO WAVE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69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" table:style-name="ce4">
            <text:p><text:s/>230,00<text:s/></text:p>
          </table:table-cell>
          <table:table-cell office:value-type="float" office:value="28" table:formula="of:=IFERROR(VLOOKUP([.A:.A];['SB1'.B:.G];6;FALSE);&quot;&quot;)" table:style-name="ce1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238</text:p>
          </table:table-cell>
          <table:table-cell office:value-type="string" table:style-name="ce5">
            <text:p>ADAPTADOR DO MOTOR P/ FILTRO LIMPADOR AUTOMATICO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1940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8" table:style-name="ce6">
            <text:p><text:s/>48,00<text:s/></text:p>
          </table:table-cell>
          <table:table-cell office:value-type="float" office:value="10" table:formula="of:=IFERROR(VLOOKUP([.A:.A];['SB1'.B:.G];6;FALSE);&quot;&quot;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3565</text:p>
          </table:table-cell>
          <table:table-cell office:value-type="string" table:style-name="ce3">
            <text:p>ADAPTADOR LED COB PARA PISCINAS DE FIBR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2551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2" table:style-name="ce4">
            <text:p><text:s/>2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564</text:p>
          </table:table-cell>
          <table:table-cell office:value-type="string" table:style-name="ce5">
            <text:p>ADAPTADOR LED COB PARA PISCINAS DE VINI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550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0" table:style-name="ce6">
            <text:p><text:s/>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01</text:p>
          </table:table-cell>
          <table:table-cell office:value-type="string" table:style-name="ce3">
            <text:p>ADAPTADOR LED COB TUBO DIA.20 P/ 25M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920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8" table:style-name="ce4">
            <text:p><text:s/>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02</text:p>
          </table:table-cell>
          <table:table-cell office:value-type="string" table:style-name="ce5">
            <text:p>ADAPTADOR LED COB TUBO DIA.20 P/ 50M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921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2" table:style-name="ce6">
            <text:p><text:s/>1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37</text:p>
          </table:table-cell>
          <table:table-cell office:value-type="string" table:style-name="ce3">
            <text:p>ADAPTADOR LUVA LATAO CROMADO 1.1/2 POL.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419.80.90</text:p>
          </table:table-cell>
          <table:table-cell office:value-type="string" table:style-name="ce3">
            <text:p>789900560007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3" table:style-name="ce4">
            <text:p><text:s/>11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39</text:p>
          </table:table-cell>
          <table:table-cell office:value-type="string" table:style-name="ce5">
            <text:p>ADAPTADOR LUVA LATAO CROMADO 2 POL.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0009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40" table:style-name="ce6">
            <text:p><text:s/>2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38</text:p>
          </table:table-cell>
          <table:table-cell office:value-type="string" table:style-name="ce3">
            <text:p>ADAPTADOR LUVA PLASTICA 1.1/2 POL.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008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3" table:style-name="ce4">
            <text:p><text:s/>1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float" office:value="22651" table:style-name="ce5">
            <text:p>22651</text:p>
          </table:table-cell>
          <table:table-cell office:value-type="string" table:style-name="ce5">
            <text:p>ADAPTADOR MOTOR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12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6" table:style-name="ce6">
            <text:p><text:s/>2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536</text:p>
          </table:table-cell>
          <table:table-cell office:value-type="string" table:style-name="ce3">
            <text:p>ADAPTADOR PARA D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259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5" table:style-name="ce4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919</text:p>
          </table:table-cell>
          <table:table-cell office:value-type="string" table:style-name="ce5">
            <text:p>ADAPTADOR PARA SOLA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90.90</text:p>
          </table:table-cell>
          <table:table-cell office:value-type="string" table:style-name="ce5">
            <text:p>789900561642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" table:style-name="ce6">
            <text:p><text:s/>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28</text:p>
          </table:table-cell>
          <table:table-cell office:value-type="string" table:style-name="ce3">
            <text:p>ALAVANCA CARRO ROBO LIMPADOR AUTOMATICO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86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" table:style-name="ce4">
            <text:p><text:s/>250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19234</text:p>
          </table:table-cell>
          <table:table-cell office:value-type="string" table:style-name="ce5">
            <text:p>ALAVANCA P/ REGISTRO DUCHA 2 C/ PARAFUSO E CHAVE ALLEN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1392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37" table:style-name="ce6">
            <text:p><text:s/>23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225</text:p>
          </table:table-cell>
          <table:table-cell office:value-type="string" table:style-name="ce3">
            <text:p>ALCA DO CESTO COLETOR BL/BP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4571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6" table:style-name="ce4">
            <text:p><text:s/>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487</text:p>
          </table:table-cell>
          <table:table-cell office:value-type="string" table:style-name="ce5">
            <text:p>ALCA LATERAL TIV 25/45/65/7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. <text:s/>.</text:p>
          </table:table-cell>
          <table:table-cell office:value-type="string" table:style-name="ce5">
            <text:p>789900563444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8" table:style-name="ce6">
            <text:p><text:s/>14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63</text:p>
          </table:table-cell>
          <table:table-cell office:value-type="string" table:style-name="ce3">
            <text:p>ALCA ROBO LIMPADOR AUT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64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2" table:style-name="ce4">
            <text:p><text:s/>352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4302</text:p>
          </table:table-cell>
          <table:table-cell office:value-type="string" table:style-name="ce5">
            <text:p>ALCA ROBO LIMPADOR AUT WAVE 2X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8387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786" table:style-name="ce6">
            <text:p><text:s/>1.786,00<text:s/></text:p>
          </table:table-cell>
          <table:table-cell office:value-type="float" office:value="10" table:formula="of:=IFERROR(VLOOKUP([.A:.A];['SB1'.B:.G];6;FALSE);&quot;&quot;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0729</text:p>
          </table:table-cell>
          <table:table-cell office:value-type="string" table:style-name="ce3">
            <text:p>ALIMENTADOR DE ESSENCI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010.20.00</text:p>
          </table:table-cell>
          <table:table-cell office:value-type="string" table:style-name="ce3">
            <text:p>7899005602981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27.97" table:style-name="ce4">
            <text:p><text:s/>127,9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947</text:p>
          </table:table-cell>
          <table:table-cell office:value-type="string" table:style-name="ce5">
            <text:p>ANALISADOR DE SAL E DE TEMPERATURA PARA PISCINA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27.89.99</text:p>
          </table:table-cell>
          <table:table-cell office:value-type="string" table:style-name="ce5">
            <text:p>789900562772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390" table:style-name="ce6">
            <text:p><text:s/>1.3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559</text:p>
          </table:table-cell>
          <table:table-cell office:value-type="string" table:style-name="ce3">
            <text:p>ANEL DE VEDACAO CELULA GER DE CLOR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5454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2" table:style-name="ce4">
            <text:p><text:s/>22,00<text:s/></text:p>
          </table:table-cell>
          <table:table-cell office:value-type="float" office:value="15" table:formula="of:=IFERROR(VLOOKUP([.A:.A];['SB1'.B:.G];6;FALSE);&quot;&quot;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14975</text:p>
          </table:table-cell>
          <table:table-cell office:value-type="string" table:style-name="ce5">
            <text:p>ANEL DE VEDACAO DO SU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50.90</text:p>
          </table:table-cell>
          <table:table-cell office:value-type="string" table:style-name="ce5">
            <text:p>789900562206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8" table:style-name="ce6">
            <text:p><text:s/>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813</text:p>
          </table:table-cell>
          <table:table-cell office:value-type="string" table:style-name="ce3">
            <text:p>ANEL ESCOVA BRANCA COMB. APAR. P/ FILTRAR PISC. MOD.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21227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16" table:style-name="ce4">
            <text:p><text:s/>11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355</text:p>
          </table:table-cell>
          <table:table-cell office:value-type="string" table:style-name="ce5">
            <text:p>ANEL ESCOVA BRANCA COMBIN. ROBO LIMPADOR AUT.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977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3" table:style-name="ce6">
            <text:p><text:s/>1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13</text:p>
          </table:table-cell>
          <table:table-cell office:value-type="string" table:style-name="ce3">
            <text:p>ANEL TUBO RODA ROBO LIMPADOR AUTOMATICO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71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" table:style-name="ce4">
            <text:p><text:s/>6,00<text:s/></text:p>
          </table:table-cell>
          <table:table-cell office:value-type="float" office:value="12" table:formula="of:=IFERROR(VLOOKUP([.A:.A];['SB1'.B:.G];6;FALSE);&quot;&quot;)" table:style-name="ce1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873</text:p>
          </table:table-cell>
          <table:table-cell office:value-type="string" table:style-name="ce5">
            <text:p>ANEL VEDACAO CELULA GER DE CLORO SSC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8769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6" table:style-name="ce6">
            <text:p><text:s/>16,00<text:s/></text:p>
          </table:table-cell>
          <table:table-cell office:value-type="float" office:value="159" table:formula="of:=IFERROR(VLOOKUP([.A:.A];['SB1'.B:.G];6;FALSE);&quot;&quot;)" table:style-name="ce1">
            <text:p>15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7158</text:p>
          </table:table-cell>
          <table:table-cell office:value-type="string" table:style-name="ce3">
            <text:p>ANEL VEDACAO CELULA GERADOR CLOR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4016.93.00</text:p>
          </table:table-cell>
          <table:table-cell office:value-type="string" table:style-name="ce3">
            <text:p>7899005633435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36" table:style-name="ce4">
            <text:p><text:s/>3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156</text:p>
          </table:table-cell>
          <table:table-cell office:value-type="string" table:style-name="ce5">
            <text:p>ANEL VEDACAO PLACA ELET. GERADOR CLOR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016.93.00</text:p>
          </table:table-cell>
          <table:table-cell office:value-type="string" table:style-name="ce5">
            <text:p>7899005633428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8" table:style-name="ce6">
            <text:p><text:s/>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082</text:p>
          </table:table-cell>
          <table:table-cell office:value-type="string" table:style-name="ce3">
            <text:p>ANODO DE ZIN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907.00.90</text:p>
          </table:table-cell>
          <table:table-cell office:value-type="string" table:style-name="ce3">
            <text:p>789900562822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0" table:style-name="ce4">
            <text:p><text:s/>7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1300</text:p>
          </table:table-cell>
          <table:table-cell office:value-type="string" table:style-name="ce5">
            <text:p>APARELHO C/BAT.RECARREGAVEL P/ FILTRAR PISCIN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89.99</text:p>
          </table:table-cell>
          <table:table-cell office:value-type="string" table:style-name="ce5">
            <text:p>789900561864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900" table:style-name="ce6">
            <text:p><text:s/>2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353</text:p>
          </table:table-cell>
          <table:table-cell office:value-type="string" table:style-name="ce3">
            <text:p>APARELHO ELETROLISE GER CLORO GS10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30.90</text:p>
          </table:table-cell>
          <table:table-cell office:value-type="string" table:style-name="ce3">
            <text:p>789900563294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50" table:style-name="ce4">
            <text:p><text:s/>2.9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148</text:p>
          </table:table-cell>
          <table:table-cell office:value-type="string" table:style-name="ce5">
            <text:p>APARELHO ELETROLISE GER CLORO GS1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30.90</text:p>
          </table:table-cell>
          <table:table-cell office:value-type="string" table:style-name="ce5">
            <text:p>789900563338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500" table:style-name="ce6">
            <text:p><text:s/>3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346</text:p>
          </table:table-cell>
          <table:table-cell office:value-type="string" table:style-name="ce3">
            <text:p>APARELHO ELETROLISE GER CLORO GS16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30.90</text:p>
          </table:table-cell>
          <table:table-cell office:value-type="string" table:style-name="ce3">
            <text:p>789900563291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00" table:style-name="ce4">
            <text:p><text:s/>4.3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787</text:p>
          </table:table-cell>
          <table:table-cell office:value-type="string" table:style-name="ce5">
            <text:p>APARELHO ELETROLISE GER CLORO GS25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30.90</text:p>
          </table:table-cell>
          <table:table-cell office:value-type="string" table:style-name="ce5">
            <text:p>789900563335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900" table:style-name="ce6">
            <text:p><text:s/>4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349</text:p>
          </table:table-cell>
          <table:table-cell office:value-type="string" table:style-name="ce3">
            <text:p>APARELHO ELETROLISE GER CLORO GS4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30.90</text:p>
          </table:table-cell>
          <table:table-cell office:value-type="string" table:style-name="ce3">
            <text:p>789900563292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00" table:style-name="ce4">
            <text:p><text:s/>10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150</text:p>
          </table:table-cell>
          <table:table-cell office:value-type="string" table:style-name="ce5">
            <text:p>APARELHO ELETROLISE GER CLORO GS6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30.90</text:p>
          </table:table-cell>
          <table:table-cell office:value-type="string" table:style-name="ce5">
            <text:p>789900563339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800" table:style-name="ce6">
            <text:p><text:s/>2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638</text:p>
          </table:table-cell>
          <table:table-cell office:value-type="string" table:style-name="ce3">
            <text:p>APARELHO ELETROLISE GERADOR CLORO XCLOR-20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30.90</text:p>
          </table:table-cell>
          <table:table-cell office:value-type="string" table:style-name="ce3">
            <text:p>789900563424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700" table:style-name="ce4">
            <text:p><text:s/>11.7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055</text:p>
          </table:table-cell>
          <table:table-cell office:value-type="string" table:style-name="ce5">
            <text:p>APARELHO PARA FILTRAR PISCINA MODELO WAVE 100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21.00</text:p>
          </table:table-cell>
          <table:table-cell office:value-type="string" table:style-name="ce5">
            <text:p>789900562817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5600" table:style-name="ce6">
            <text:p><text:s/>35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664</text:p>
          </table:table-cell>
          <table:table-cell office:value-type="string" table:style-name="ce3">
            <text:p>APARELHO SUV-16 -INOX P/ DEPURAR AGUA 7,0M3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8421.21.00</text:p>
          </table:table-cell>
          <table:table-cell office:value-type="string" table:style-name="ce3">
            <text:p>789900560903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.48" table:style-name="ce4">
            <text:p><text:s/>55,4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003</text:p>
          </table:table-cell>
          <table:table-cell office:value-type="string" table:style-name="ce5">
            <text:p>ARCOS INOX DO CHUV. N/ ELETR. 04 ARCO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788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920" table:style-name="ce6">
            <text:p><text:s/>1.9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1928</text:p>
          </table:table-cell>
          <table:table-cell office:value-type="string" table:style-name="ce3">
            <text:p>ARO ACABAMENTO INOX 316 DA/DR/DHM - VINIL E PRATI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046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2.27" table:style-name="ce4">
            <text:p><text:s/>42,2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455</text:p>
          </table:table-cell>
          <table:table-cell office:value-type="string" table:style-name="ce5">
            <text:p>ARO INOX PARA LED E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237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0" table:style-name="ce6">
            <text:p><text:s/>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1737</text:p>
          </table:table-cell>
          <table:table-cell office:value-type="string" table:style-name="ce3">
            <text:p>ARO INOX PARA LED SMD 5 E 9W DIA.17,5C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64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52" table:style-name="ce4">
            <text:p><text:s/>5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69</text:p>
          </table:table-cell>
          <table:table-cell office:value-type="string" table:style-name="ce5">
            <text:p>ARRUELA DO EIXO P/ FILTR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1970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0" table:style-name="ce6">
            <text:p><text:s/>140,00<text:s/></text:p>
          </table:table-cell>
          <table:table-cell office:value-type="float" office:value="15" table:formula="of:=IFERROR(VLOOKUP([.A:.A];['SB1'.B:.G];6;FALSE);&quot;&quot;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0459</text:p>
          </table:table-cell>
          <table:table-cell office:value-type="string" table:style-name="ce3">
            <text:p>ASPIRADOR OLIMPICO EM FERRO FUNDIDO (14,5KG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29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900" table:style-name="ce4">
            <text:p><text:s/>2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913</text:p>
          </table:table-cell>
          <table:table-cell office:value-type="string" table:style-name="ce5">
            <text:p>ATUADOR 50/60 HZ PARA VALVULA 3 VIA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81.80.19</text:p>
          </table:table-cell>
          <table:table-cell table:style-name="ce5"/>
          <table:table-cell office:value-type="float" office:value="0" table:style-name="ce6">
            <text:p><text:s/>-<text:s/></text:p>
          </table:table-cell>
          <table:table-cell office:value-type="float" office:value="1820" table:style-name="ce6">
            <text:p><text:s/>1.8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767</text:p>
          </table:table-cell>
          <table:table-cell office:value-type="string" table:style-name="ce3">
            <text:p>BALD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4421.99.00</text:p>
          </table:table-cell>
          <table:table-cell office:value-type="string" table:style-name="ce3">
            <text:p>789900560336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0" table:style-name="ce4">
            <text:p><text:s/>8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027</text:p>
          </table:table-cell>
          <table:table-cell office:value-type="string" table:style-name="ce5">
            <text:p>BALDE DE MADEI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420.90.00</text:p>
          </table:table-cell>
          <table:table-cell office:value-type="string" table:style-name="ce5">
            <text:p>789900563322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90" table:style-name="ce6">
            <text:p><text:s/>2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636</text:p>
          </table:table-cell>
          <table:table-cell office:value-type="string" table:style-name="ce3">
            <text:p>BANCO EM ACO INOX PARA PISCIN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206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970" table:style-name="ce4">
            <text:p><text:s/>9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051</text:p>
          </table:table-cell>
          <table:table-cell office:value-type="string" table:style-name="ce5">
            <text:p>BARRA CORRIMAO RETO INOX 1 1/2 DE 2,00 MT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846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90" table:style-name="ce6">
            <text:p><text:s/>2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052</text:p>
          </table:table-cell>
          <table:table-cell office:value-type="string" table:style-name="ce3">
            <text:p>BARRA CORRIMAO RETO INOX 1 1/2 DE 2,25 MT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8853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40" table:style-name="ce4">
            <text:p><text:s/>3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053</text:p>
          </table:table-cell>
          <table:table-cell office:value-type="string" table:style-name="ce5">
            <text:p>BARRA CORRIMAO RETO INOX 1 1/2 DE 2,50 MT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886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55" table:style-name="ce6">
            <text:p><text:s/>35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054</text:p>
          </table:table-cell>
          <table:table-cell office:value-type="string" table:style-name="ce3">
            <text:p>BARRA CORRIMAO RETO INOX 1 1/2 DE 2,70 MT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887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00" table:style-name="ce4">
            <text:p><text:s/>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014</text:p>
          </table:table-cell>
          <table:table-cell office:value-type="string" table:style-name="ce5">
            <text:p>BARRA DE PERFIL 2M PVC P/ SOLDA MANTA ARMAD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04.22.00</text:p>
          </table:table-cell>
          <table:table-cell office:value-type="string" table:style-name="ce5">
            <text:p>789900562797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4" table:style-name="ce6">
            <text:p><text:s/>4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5048</text:p>
          </table:table-cell>
          <table:table-cell office:value-type="string" table:style-name="ce3">
            <text:p>BASE CASCATA CANYON / AMAZONA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483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777" table:style-name="ce4">
            <text:p><text:s/>77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866</text:p>
          </table:table-cell>
          <table:table-cell office:value-type="string" table:style-name="ce5">
            <text:p>BASE CASCATA IGUACU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500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545.16" table:style-name="ce6">
            <text:p><text:s/>545,1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5285</text:p>
          </table:table-cell>
          <table:table-cell office:value-type="string" table:style-name="ce3">
            <text:p>BASE CASCATA SPLASH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486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62.8" table:style-name="ce4">
            <text:p><text:s/>62,8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48</text:p>
          </table:table-cell>
          <table:table-cell office:value-type="string" table:style-name="ce5">
            <text:p>BASE DO CESTO PARA ROBO LIMPADOR AUTOMATICO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507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224" table:style-name="ce6">
            <text:p><text:s/>224,00<text:s/></text:p>
          </table:table-cell>
          <table:table-cell office:value-type="float" office:value="17" table:formula="of:=IFERROR(VLOOKUP([.A:.A];['SB1'.B:.G];6;FALSE);&quot;&quot;)" table:style-name="ce1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71</text:p>
          </table:table-cell>
          <table:table-cell office:value-type="string" table:style-name="ce3">
            <text:p>BASE FILTRO CARTUCHO ROBO <text:s/>LIMPADOR AUTOM. P/ PISCINA W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729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313" table:style-name="ce4">
            <text:p><text:s/>313,00<text:s/></text:p>
          </table:table-cell>
          <table:table-cell office:value-type="float" office:value="15" table:formula="of:=IFERROR(VLOOKUP([.A:.A];['SB1'.B:.G];6;FALSE);&quot;&quot;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483</text:p>
          </table:table-cell>
          <table:table-cell office:value-type="string" table:style-name="ce5">
            <text:p>BASE GABINETE TIV 25/45/65/7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. <text:s/>.</text:p>
          </table:table-cell>
          <table:table-cell office:value-type="string" table:style-name="ce5">
            <text:p>789900563445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794" table:style-name="ce6">
            <text:p><text:s/>79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626</text:p>
          </table:table-cell>
          <table:table-cell office:value-type="string" table:style-name="ce3">
            <text:p>BASE P/ CHUV. N/ ELETR. ADVANCED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4.90.00</text:p>
          </table:table-cell>
          <table:table-cell office:value-type="string" table:style-name="ce3">
            <text:p>7899005626314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400" table:style-name="ce4">
            <text:p><text:s/>2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08</text:p>
          </table:table-cell>
          <table:table-cell office:value-type="string" table:style-name="ce5">
            <text:p>BASE PAINEL FRONTAL GS-2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9865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640" table:style-name="ce6">
            <text:p><text:s/>6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25</text:p>
          </table:table-cell>
          <table:table-cell office:value-type="string" table:style-name="ce3">
            <text:p>BASE ROBO LIMPADOR AUTOMATICO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1986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" table:style-name="ce4">
            <text:p><text:s/>171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10174</text:p>
          </table:table-cell>
          <table:table-cell office:value-type="string" table:style-name="ce5">
            <text:p>BICO ARTICULADO <text:s/>5,0 MM INOX C/ ROSCA 1/4 BSP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27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98" table:style-name="ce6">
            <text:p><text:s/>9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703</text:p>
          </table:table-cell>
          <table:table-cell office:value-type="string" table:style-name="ce3">
            <text:p>BICO BOLHA <text:s/>25,0 MM INOX ENTRADA ROSCA 3/4 BSP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12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510" table:style-name="ce4">
            <text:p><text:s/>5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2208</text:p>
          </table:table-cell>
          <table:table-cell office:value-type="string" table:style-name="ce5">
            <text:p>BICO COROA 38,0 MM INOX ENTRADA ROSCA 3/4 BSP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066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20" table:style-name="ce6">
            <text:p><text:s/>2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2209</text:p>
          </table:table-cell>
          <table:table-cell office:value-type="string" table:style-name="ce3">
            <text:p>BICO COROA 50,0 MM INOX ENTRADA ROSCA 3/4 BSP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067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70" table:style-name="ce4">
            <text:p><text:s/>2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697</text:p>
          </table:table-cell>
          <table:table-cell office:value-type="string" table:style-name="ce5">
            <text:p>BICO GEISER 38,0 MM INOX ENTRADA ROSCA 1/2 BSP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06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20" table:style-name="ce6">
            <text:p><text:s/>2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698</text:p>
          </table:table-cell>
          <table:table-cell office:value-type="string" table:style-name="ce3">
            <text:p>BICO GEISER 50,0 MM INOX ENTRADA ROSCA 3/4 BSP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07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12" table:style-name="ce4">
            <text:p><text:s/>31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699</text:p>
          </table:table-cell>
          <table:table-cell office:value-type="string" table:style-name="ce5">
            <text:p>BICO GEISER 63,0 MM INOX ENTRADA ROSCA 3/4 BSP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089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50" table:style-name="ce6">
            <text:p><text:s/>3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700</text:p>
          </table:table-cell>
          <table:table-cell office:value-type="string" table:style-name="ce3">
            <text:p>BICO GEISER 76,0 MM INOX ENTRADA ROSCA 1 BSP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09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10" table:style-name="ce4">
            <text:p><text:s/>4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701</text:p>
          </table:table-cell>
          <table:table-cell office:value-type="string" table:style-name="ce5">
            <text:p>BICO LEQUE 38 MM INOX 4 SAIDAS 1/4 ENTRADA ROSCA 1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102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450" table:style-name="ce6">
            <text:p><text:s/>1.4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702</text:p>
          </table:table-cell>
          <table:table-cell office:value-type="string" table:style-name="ce3">
            <text:p>BICO LEQUE 38 MM INOX 6 SAIDAS 1/4 ENTRADA ROSCA 1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11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750" table:style-name="ce4">
            <text:p><text:s/>1.7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631</text:p>
          </table:table-cell>
          <table:table-cell office:value-type="string" table:style-name="ce5">
            <text:p>BICO OPCIONAL CONICO PARA CCT SPLASH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0201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17" table:style-name="ce6">
            <text:p><text:s/>21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27</text:p>
          </table:table-cell>
          <table:table-cell office:value-type="string" table:style-name="ce3">
            <text:p>BLOCO OPTICO 300 WATTS PARA REFLET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9.21.10</text:p>
          </table:table-cell>
          <table:table-cell office:value-type="string" table:style-name="ce3">
            <text:p>789900560982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15.79000000000002" table:style-name="ce4">
            <text:p><text:s/>315,7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34</text:p>
          </table:table-cell>
          <table:table-cell office:value-type="string" table:style-name="ce5">
            <text:p>BOIA MANGUEIRA APARELHO P/ FILTRA PISCINA MOD.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361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62" table:style-name="ce6">
            <text:p><text:s/>62,00<text:s/></text:p>
          </table:table-cell>
          <table:table-cell office:value-type="float" office:value="54" table:formula="of:=IFERROR(VLOOKUP([.A:.A];['SB1'.B:.G];6;FALSE);&quot;&quot;)" table:style-name="ce1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40</text:p>
          </table:table-cell>
          <table:table-cell office:value-type="string" table:style-name="ce3">
            <text:p>BOIA MANGUEIRA ROBO LIMPADOR AUTOMATICO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01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" table:style-name="ce4">
            <text:p><text:s/>1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67</text:p>
          </table:table-cell>
          <table:table-cell office:value-type="string" table:style-name="ce5">
            <text:p>BOIA MANGUEIRA ROBO LIMPADOR AUTOMATICO RB4I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27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3" table:style-name="ce6">
            <text:p><text:s/>23,00<text:s/></text:p>
          </table:table-cell>
          <table:table-cell office:value-type="float" office:value="1" table:formula="of:=IFERROR(VLOOKUP([.A:.A];['SB1'.B:.G];6;FALSE);&quot;&quot;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10024</text:p>
          </table:table-cell>
          <table:table-cell office:value-type="string" table:style-name="ce3">
            <text:p>BOIA PL P/ GERADOR DE VAPOR (REPOSICAO BOIA DE LATAO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8288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43" table:style-name="ce4">
            <text:p><text:s/>1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3165</text:p>
          </table:table-cell>
          <table:table-cell office:value-type="string" table:style-name="ce5">
            <text:p>BOLINHA C/ROSCA 3 FIOS <text:s/>ABS PRAT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050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7.369999999999997" table:style-name="ce6">
            <text:p><text:s/>37,3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6174</text:p>
          </table:table-cell>
          <table:table-cell office:value-type="string" table:style-name="ce3">
            <text:p>BOLINHA COM FIXADOR PARA DHM VINI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698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.43" table:style-name="ce4">
            <text:p><text:s/>11,4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618</text:p>
          </table:table-cell>
          <table:table-cell office:value-type="string" table:style-name="ce5">
            <text:p>BOLINHA PLAST. BRANCO C/ ROSCA 3 FIOS - D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0009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9.24" table:style-name="ce6">
            <text:p><text:s/>9,2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966</text:p>
          </table:table-cell>
          <table:table-cell office:value-type="string" table:style-name="ce3">
            <text:p>BOLINHA PLAST. PRATA C/ ROSCA 3 FIOS - D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394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1.23" table:style-name="ce4">
            <text:p><text:s/>11,2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229</text:p>
          </table:table-cell>
          <table:table-cell office:value-type="string" table:style-name="ce5">
            <text:p>BOMBA DE CALOR TFI PRO</text:p>
          </table:table-cell>
          <table:table-cell office:value-type="string" table:style-name="ce5">
            <text:p>M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8.61.00</text:p>
          </table:table-cell>
          <table:table-cell table:style-name="ce5"/>
          <table:table-cell office:value-type="float" office:value="0" table:style-name="ce6">
            <text:p><text:s/>-<text:s/></text:p>
          </table:table-cell>
          <table:table-cell office:value-type="float" office:value="20300" table:style-name="ce6">
            <text:p><text:s/>20.3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347</text:p>
          </table:table-cell>
          <table:table-cell office:value-type="string" table:style-name="ce3">
            <text:p>BOTAO DE EMERGENCIA DE PARED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833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30" table:style-name="ce4">
            <text:p><text:s/>4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4978</text:p>
          </table:table-cell>
          <table:table-cell office:value-type="string" table:style-name="ce5">
            <text:p>BOTAO PARA TERMOSTATO P/ FOUR FIX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209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" table:style-name="ce6">
            <text:p><text:s/>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220</text:p>
          </table:table-cell>
          <table:table-cell office:value-type="string" table:style-name="ce3">
            <text:p>BOTAO PLASTICO <text:s/>COMPLETO REGULADOR DO DOS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453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2.8" table:style-name="ce4">
            <text:p><text:s/>52,8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646</text:p>
          </table:table-cell>
          <table:table-cell office:value-type="string" table:style-name="ce5">
            <text:p>BOTAO PNEUMATICO A PROVA D AGUA COM INTERRUPTOR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36.50.90</text:p>
          </table:table-cell>
          <table:table-cell office:value-type="string" table:style-name="ce5">
            <text:p>7899005602165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95" table:style-name="ce6">
            <text:p><text:s/>2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1908</text:p>
          </table:table-cell>
          <table:table-cell office:value-type="string" table:style-name="ce3">
            <text:p>BOTAO SELETOR PARA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50.90</text:p>
          </table:table-cell>
          <table:table-cell office:value-type="string" table:style-name="ce3">
            <text:p>789900561677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9.46" table:style-name="ce4">
            <text:p><text:s/>59,4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82</text:p>
          </table:table-cell>
          <table:table-cell office:value-type="string" table:style-name="ce5">
            <text:p>BOTAO TERMOSTATO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635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9.63" table:style-name="ce6">
            <text:p><text:s/>19,6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139</text:p>
          </table:table-cell>
          <table:table-cell office:value-type="string" table:style-name="ce3">
            <text:p>BOTOEIRA C/ CONTROLE REMOT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35.30.19</text:p>
          </table:table-cell>
          <table:table-cell office:value-type="string" table:style-name="ce3">
            <text:p>789900561266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79" table:style-name="ce4">
            <text:p><text:s/>47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58</text:p>
          </table:table-cell>
          <table:table-cell office:value-type="string" table:style-name="ce5">
            <text:p>BRACKET ESCOVA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19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0" table:style-name="ce6">
            <text:p><text:s/>20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5349</text:p>
          </table:table-cell>
          <table:table-cell office:value-type="string" table:style-name="ce3">
            <text:p>BRACKET TAMPA FILTRO ROBO LIMPADOR AUT. PISCINA WAVE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971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" table:style-name="ce4">
            <text:p><text:s/>3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723</text:p>
          </table:table-cell>
          <table:table-cell office:value-type="string" table:style-name="ce5">
            <text:p>BRACKET TAMPA FILTRO ROB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0817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3" table:style-name="ce6">
            <text:p><text:s/>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364</text:p>
          </table:table-cell>
          <table:table-cell office:value-type="string" table:style-name="ce3">
            <text:p>BRACO FLUTUANTE DO REGULADOR DE NIVE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2574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6" table:style-name="ce4">
            <text:p><text:s/>5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63</text:p>
          </table:table-cell>
          <table:table-cell office:value-type="string" table:style-name="ce5">
            <text:p>BUCHA DA ESCOVA APARELHO P/ FILTRAR PISCINA MOD.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23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8" table:style-name="ce6">
            <text:p><text:s/>8,00<text:s/></text:p>
          </table:table-cell>
          <table:table-cell office:value-type="float" office:value="11" table:formula="of:=IFERROR(VLOOKUP([.A:.A];['SB1'.B:.G];6;FALSE);&quot;&quot;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58</text:p>
          </table:table-cell>
          <table:table-cell office:value-type="string" table:style-name="ce3">
            <text:p>BUCHA DA ESCOVA ATIVA P/ ROBO LIMPADOR AUTOMATICO <text:s/>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590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77" table:style-name="ce4">
            <text:p><text:s/>77,00<text:s/></text:p>
          </table:table-cell>
          <table:table-cell office:value-type="float" office:value="7" table:formula="of:=IFERROR(VLOOKUP([.A:.A];['SB1'.B:.G];6;FALSE);&quot;&quot;)" table:style-name="ce1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57</text:p>
          </table:table-cell>
          <table:table-cell office:value-type="string" table:style-name="ce5">
            <text:p>BUCHA RODA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18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7" table:style-name="ce6">
            <text:p><text:s/>7,00<text:s/></text:p>
          </table:table-cell>
          <table:table-cell office:value-type="float" office:value="28" table:formula="of:=IFERROR(VLOOKUP([.A:.A];['SB1'.B:.G];6;FALSE);&quot;&quot;)" table:style-name="ce1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59</text:p>
          </table:table-cell>
          <table:table-cell office:value-type="string" table:style-name="ce3">
            <text:p>BYPASS + PINO RODA ROBO LIMPADOR AUTOMATICO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20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7" table:style-name="ce4">
            <text:p><text:s/>137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0768</text:p>
          </table:table-cell>
          <table:table-cell office:value-type="string" table:style-name="ce5">
            <text:p>CABIDE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421.99.00</text:p>
          </table:table-cell>
          <table:table-cell office:value-type="string" table:style-name="ce5">
            <text:p>789900560337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96" table:style-name="ce6">
            <text:p><text:s/>39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290</text:p>
          </table:table-cell>
          <table:table-cell office:value-type="string" table:style-name="ce3">
            <text:p>CABINHO SLIM COMPLET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804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5.85" table:style-name="ce4">
            <text:p><text:s/>15,8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42</text:p>
          </table:table-cell>
          <table:table-cell office:value-type="string" table:style-name="ce5">
            <text:p>CABO 1,2M <text:s/>ROB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4.42.00</text:p>
          </table:table-cell>
          <table:table-cell office:value-type="string" table:style-name="ce5">
            <text:p>789900562100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553" table:style-name="ce6">
            <text:p><text:s/>553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43</text:p>
          </table:table-cell>
          <table:table-cell office:value-type="string" table:style-name="ce3">
            <text:p>CABO 15M ROBO LIMPADOR AUT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4.42.00</text:p>
          </table:table-cell>
          <table:table-cell office:value-type="string" table:style-name="ce3">
            <text:p>789900562004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713" table:style-name="ce4">
            <text:p><text:s/>713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29</text:p>
          </table:table-cell>
          <table:table-cell office:value-type="string" table:style-name="ce5">
            <text:p>CABO 18M ROBO LIMPADOR AUT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4.42.00</text:p>
          </table:table-cell>
          <table:table-cell office:value-type="string" table:style-name="ce5">
            <text:p>789900561990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078" table:style-name="ce6">
            <text:p><text:s/>1.078,00<text:s/></text:p>
          </table:table-cell>
          <table:table-cell office:value-type="float" office:value="21" table:formula="of:=IFERROR(VLOOKUP([.A:.A];['SB1'.B:.G];6;FALSE);&quot;&quot;)" table:style-name="ce1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72</text:p>
          </table:table-cell>
          <table:table-cell office:value-type="string" table:style-name="ce3">
            <text:p>CABO 18M ROBO LIMPADOR AUTOMATICO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4.42.00</text:p>
          </table:table-cell>
          <table:table-cell office:value-type="string" table:style-name="ce3">
            <text:p>789900562032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971" table:style-name="ce4">
            <text:p><text:s/>971,00<text:s/></text:p>
          </table:table-cell>
          <table:table-cell office:value-type="float" office:value="17" table:formula="of:=IFERROR(VLOOKUP([.A:.A];['SB1'.B:.G];6;FALSE);&quot;&quot;)" table:style-name="ce1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732</text:p>
          </table:table-cell>
          <table:table-cell office:value-type="string" table:style-name="ce5">
            <text:p>CABO 40M ROBO LIMPADOR AUT 2X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4.42.00</text:p>
          </table:table-cell>
          <table:table-cell office:value-type="string" table:style-name="ce5">
            <text:p>789900562840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319" table:style-name="ce6">
            <text:p><text:s/>4.319,00<text:s/></text:p>
          </table:table-cell>
          <table:table-cell office:value-type="float" office:value="8" table:formula="of:=IFERROR(VLOOKUP([.A:.A];['SB1'.B:.G];6;FALSE);&quot;&quot;)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0444</text:p>
          </table:table-cell>
          <table:table-cell office:value-type="string" table:style-name="ce3">
            <text:p>CABO ALUM BI-TELESC 6,0 M C/ MANOPLA DE APOI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16.99.00</text:p>
          </table:table-cell>
          <table:table-cell office:value-type="string" table:style-name="ce3">
            <text:p>789900560014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88" table:style-name="ce4">
            <text:p><text:s/>18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40</text:p>
          </table:table-cell>
          <table:table-cell office:value-type="string" table:style-name="ce5">
            <text:p>CABO ALUM TELESC 2,0 M C/ MANOPLA DE APOI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0010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8" table:style-name="ce6">
            <text:p><text:s/>7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41</text:p>
          </table:table-cell>
          <table:table-cell office:value-type="string" table:style-name="ce3">
            <text:p>CABO ALUM TELESC 3,0 M C/ MANOPLA DE APOI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16.99.00</text:p>
          </table:table-cell>
          <table:table-cell office:value-type="string" table:style-name="ce3">
            <text:p>789900560011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2" table:style-name="ce4">
            <text:p><text:s/>11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42</text:p>
          </table:table-cell>
          <table:table-cell office:value-type="string" table:style-name="ce5">
            <text:p>CABO ALUM TELESC 4,0 M C/ MANOPLA DE APOI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0012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39" table:style-name="ce6">
            <text:p><text:s/>13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6387</text:p>
          </table:table-cell>
          <table:table-cell office:value-type="string" table:style-name="ce3">
            <text:p>CABO ALUM TELESC 5,0 M C/ MANOPLA DE APOI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16.99.00</text:p>
          </table:table-cell>
          <table:table-cell office:value-type="string" table:style-name="ce3">
            <text:p>789900560722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60" table:style-name="ce4">
            <text:p><text:s/>1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2965</text:p>
          </table:table-cell>
          <table:table-cell office:value-type="string" table:style-name="ce5">
            <text:p>CABO DE ALUM. P/ PEN PLUS (1,5MTS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0569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3" table:style-name="ce6">
            <text:p><text:s/>5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10</text:p>
          </table:table-cell>
          <table:table-cell office:value-type="string" table:style-name="ce3">
            <text:p>CABO DE ALUM. TELESC 2,6 M C/ MANOPLA DE APOI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16.99.00</text:p>
          </table:table-cell>
          <table:table-cell office:value-type="string" table:style-name="ce3">
            <text:p>789900561979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44" table:style-name="ce4">
            <text:p><text:s/>14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387</text:p>
          </table:table-cell>
          <table:table-cell office:value-type="string" table:style-name="ce5">
            <text:p>CABO DE ALUM. TELESC 3,8 M C/ MANOPLA DE APOI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1978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57" table:style-name="ce6">
            <text:p><text:s/>15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924</text:p>
          </table:table-cell>
          <table:table-cell office:value-type="string" table:style-name="ce3">
            <text:p>CABO DE COMUNICACAO P/ CONTR. TOUCH DE TEMPERATUR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4.49.00</text:p>
          </table:table-cell>
          <table:table-cell table:style-name="ce3"/>
          <table:table-cell office:value-type="float" office:value="0" table:style-name="ce4">
            <text:p><text:s/>-<text:s/></text:p>
          </table:table-cell>
          <table:table-cell office:value-type="float" office:value="25" table:style-name="ce4">
            <text:p><text:s/>2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944</text:p>
          </table:table-cell>
          <table:table-cell office:value-type="string" table:style-name="ce5">
            <text:p>CABO DO GERADOR DE CLOR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18173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890" table:style-name="ce6">
            <text:p><text:s/>890,00<text:s/></text:p>
          </table:table-cell>
          <table:table-cell office:value-type="float" office:value="38" table:formula="of:=IFERROR(VLOOKUP([.A:.A];['SB1'.B:.G];6;FALSE);&quot;&quot;)" table:style-name="ce1">
            <text:p>3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72</text:p>
          </table:table-cell>
          <table:table-cell office:value-type="string" table:style-name="ce3">
            <text:p>CABO ELETRICO ROBO LIMPADOR AUT WAVE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4.42.00</text:p>
          </table:table-cell>
          <table:table-cell office:value-type="string" table:style-name="ce3">
            <text:p>789900561973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095" table:style-name="ce4">
            <text:p><text:s/>3.095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507</text:p>
          </table:table-cell>
          <table:table-cell office:value-type="string" table:style-name="ce5">
            <text:p>CABO EXTENSOR 10M P/ TIV 25/45/65/75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44.42.00</text:p>
          </table:table-cell>
          <table:table-cell office:value-type="string" table:style-name="ce5">
            <text:p>789900563450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54" table:style-name="ce6">
            <text:p><text:s/>3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671</text:p>
          </table:table-cell>
          <table:table-cell office:value-type="string" table:style-name="ce3">
            <text:p>CABO EXTENSOR 10MT P/ TROCADOR C/ PAINEL TOUCH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44.42.00</text:p>
          </table:table-cell>
          <table:table-cell office:value-type="string" table:style-name="ce3">
            <text:p>789900562863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95" table:style-name="ce4">
            <text:p><text:s/>1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14</text:p>
          </table:table-cell>
          <table:table-cell office:value-type="string" table:style-name="ce5">
            <text:p>CABO GER. CLORO <text:s/>BASE DE SAL MOD. SSC25 MIN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9353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09" table:style-name="ce6">
            <text:p><text:s/>10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957</text:p>
          </table:table-cell>
          <table:table-cell office:value-type="string" table:style-name="ce3">
            <text:p>CABO PLASTICO <text:s/>ENROLADOR DE CAPA INOX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5622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5.01" table:style-name="ce4">
            <text:p><text:s/>15,01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536</text:p>
          </table:table-cell>
          <table:table-cell office:value-type="string" table:style-name="ce5">
            <text:p>CABO PP 4 X 1 MM - BR/AZ/VD/VM (100MT)</text:p>
          </table:table-cell>
          <table:table-cell office:value-type="string" table:style-name="ce5">
            <text:p>M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44.49.00</text:p>
          </table:table-cell>
          <table:table-cell table:style-name="ce5"/>
          <table:table-cell office:value-type="float" office:value="0" table:style-name="ce6">
            <text:p><text:s/>-<text:s/></text:p>
          </table:table-cell>
          <table:table-cell office:value-type="float" office:value="16" table:style-name="ce6">
            <text:p><text:s/>1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34</text:p>
          </table:table-cell>
          <table:table-cell office:value-type="string" table:style-name="ce3">
            <text:p>CABO QUAD ELET DIST ROBO LIMPADOR AUT RB2/RB6/SS1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4.42.00</text:p>
          </table:table-cell>
          <table:table-cell office:value-type="string" table:style-name="ce3">
            <text:p>7899005619958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23" table:style-name="ce4">
            <text:p><text:s/>223,00<text:s/></text:p>
          </table:table-cell>
          <table:table-cell office:value-type="float" office:value="26" table:formula="of:=IFERROR(VLOOKUP([.A:.A];['SB1'.B:.G];6;FALSE);&quot;&quot;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13694</text:p>
          </table:table-cell>
          <table:table-cell office:value-type="string" table:style-name="ce5">
            <text:p>CAIXA DE PAPELA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819.10.00</text:p>
          </table:table-cell>
          <table:table-cell table:style-name="ce5"/>
          <table:table-cell office:value-type="float" office:value="15" table:style-name="ce6">
            <text:p><text:s/>15,00<text:s/></text:p>
          </table:table-cell>
          <table:table-cell office:value-type="float" office:value="75.099999999999994" table:style-name="ce6">
            <text:p><text:s/>75,1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800</text:p>
          </table:table-cell>
          <table:table-cell office:value-type="string" table:style-name="ce3">
            <text:p>CAIXA DE PASSAGEM CMD TOUCH GV UNIV E STEAM INOX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8.10.00</text:p>
          </table:table-cell>
          <table:table-cell office:value-type="string" table:style-name="ce3">
            <text:p>789900563494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89" table:style-name="ce4">
            <text:p><text:s/>18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94</text:p>
          </table:table-cell>
          <table:table-cell office:value-type="string" table:style-name="ce5">
            <text:p>CAIXA DE PASSAGEM QUADRADA TAMPA AB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64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9" table:style-name="ce6">
            <text:p><text:s/>2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93</text:p>
          </table:table-cell>
          <table:table-cell office:value-type="string" table:style-name="ce3">
            <text:p>CAIXA DE PASSAGEM QUADRADA TAMPA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63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5" table:style-name="ce4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27</text:p>
          </table:table-cell>
          <table:table-cell office:value-type="string" table:style-name="ce5">
            <text:p>CAIXA DE PASSAGEM REDONDA TAMPA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147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6" table:style-name="ce6">
            <text:p><text:s/>3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631</text:p>
          </table:table-cell>
          <table:table-cell office:value-type="string" table:style-name="ce3">
            <text:p>CAIXA PL C/CONEXAO P/ STEAM INOX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3052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42" table:style-name="ce4">
            <text:p><text:s/>14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630</text:p>
          </table:table-cell>
          <table:table-cell office:value-type="string" table:style-name="ce5">
            <text:p>CAIXA PL C/COTOVELO P/GERADOR DE VAP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30519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44" table:style-name="ce6">
            <text:p><text:s/>14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585</text:p>
          </table:table-cell>
          <table:table-cell office:value-type="string" table:style-name="ce3">
            <text:p>CAIXA PLASTICA CONTROLADOR TOUCH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8.10.00</text:p>
          </table:table-cell>
          <table:table-cell office:value-type="string" table:style-name="ce3">
            <text:p>789900563415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3" table:style-name="ce4">
            <text:p><text:s/>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914</text:p>
          </table:table-cell>
          <table:table-cell office:value-type="string" table:style-name="ce5">
            <text:p>CAIXA PLASTICA DO QUADRO DE COMANDO G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641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6.59" table:style-name="ce6">
            <text:p><text:s/>56,5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295</text:p>
          </table:table-cell>
          <table:table-cell office:value-type="string" table:style-name="ce3">
            <text:p>CAIXA REGULADORA DE NIVE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26.10.29</text:p>
          </table:table-cell>
          <table:table-cell office:value-type="string" table:style-name="ce3">
            <text:p>789900561859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0" table:style-name="ce4">
            <text:p><text:s/>7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8038</text:p>
          </table:table-cell>
          <table:table-cell office:value-type="string" table:style-name="ce5">
            <text:p>CALENDARIO DE MES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910.00.00</text:p>
          </table:table-cell>
          <table:table-cell table:style-name="ce5"/>
          <table:table-cell office:value-type="float" office:value="6.5" table:style-name="ce6">
            <text:p><text:s/>6,50<text:s/></text:p>
          </table:table-cell>
          <table:table-cell office:value-type="float" office:value="5.2" table:style-name="ce6">
            <text:p><text:s/>5,2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767</text:p>
          </table:table-cell>
          <table:table-cell office:value-type="string" table:style-name="ce3">
            <text:p>CAMISETA SODRAMAR TAMANHO G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6109.10.00</text:p>
          </table:table-cell>
          <table:table-cell office:value-type="string" table:style-name="ce3">
            <text:p>789900561704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3" table:style-name="ce4">
            <text:p><text:s/>8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768</text:p>
          </table:table-cell>
          <table:table-cell office:value-type="string" table:style-name="ce5">
            <text:p>CAMISETA SODRAMAR TAMANHO GG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09.10.00</text:p>
          </table:table-cell>
          <table:table-cell office:value-type="string" table:style-name="ce5">
            <text:p>789900561705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83" table:style-name="ce6">
            <text:p><text:s/>8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766</text:p>
          </table:table-cell>
          <table:table-cell office:value-type="string" table:style-name="ce3">
            <text:p>CAMISETA SODRAMAR TAMANHO 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6109.10.00</text:p>
          </table:table-cell>
          <table:table-cell office:value-type="string" table:style-name="ce3">
            <text:p>789900561703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3" table:style-name="ce4">
            <text:p><text:s/>8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765</text:p>
          </table:table-cell>
          <table:table-cell office:value-type="string" table:style-name="ce5">
            <text:p>CAMISETA SODRAMAR TAMANHO P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09.10.00</text:p>
          </table:table-cell>
          <table:table-cell office:value-type="string" table:style-name="ce5">
            <text:p>789900561702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83" table:style-name="ce6">
            <text:p><text:s/>8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12</text:p>
          </table:table-cell>
          <table:table-cell office:value-type="string" table:style-name="ce3">
            <text:p>CANOPLA PLAST.ABS BRANCA CHUMB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082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1.88" table:style-name="ce4">
            <text:p><text:s/>11,8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731</text:p>
          </table:table-cell>
          <table:table-cell office:value-type="string" table:style-name="ce5">
            <text:p>CANTONEIRA <text:s/>METALICA PARA CERCA / PORTA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113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0" table:style-name="ce6">
            <text:p><text:s/>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920</text:p>
          </table:table-cell>
          <table:table-cell office:value-type="string" table:style-name="ce3">
            <text:p>CAP PARA SOLA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90.90</text:p>
          </table:table-cell>
          <table:table-cell office:value-type="string" table:style-name="ce3">
            <text:p>789900561717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" table:style-name="ce4">
            <text:p><text:s/>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926</text:p>
          </table:table-cell>
          <table:table-cell office:value-type="string" table:style-name="ce5">
            <text:p>CAPA A PROVA D'AGUA P/ CONTR. TOUCH DE TEMPERATUR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32.90.99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79" table:style-name="ce6">
            <text:p><text:s/>7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221</text:p>
          </table:table-cell>
          <table:table-cell office:value-type="string" table:style-name="ce3">
            <text:p>CAPA ACUSTICA P/ TROCADORES SD 105/130/16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5911.10.00</text:p>
          </table:table-cell>
          <table:table-cell office:value-type="string" table:style-name="ce3">
            <text:p>789900561878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89" table:style-name="ce4">
            <text:p><text:s/>78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1220</text:p>
          </table:table-cell>
          <table:table-cell office:value-type="string" table:style-name="ce5">
            <text:p>CAPA ACUSTICA P/ TROCADORES SD/TH 25/40/60/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911.10.00</text:p>
          </table:table-cell>
          <table:table-cell office:value-type="string" table:style-name="ce5">
            <text:p>789900561877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27" table:style-name="ce6">
            <text:p><text:s/>72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973</text:p>
          </table:table-cell>
          <table:table-cell office:value-type="string" table:style-name="ce3">
            <text:p>CAPA DA FLANGE DA / DR / DHM VINIL CINZ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8" table:style-name="ce4">
            <text:p><text:s/>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49</text:p>
          </table:table-cell>
          <table:table-cell office:value-type="string" table:style-name="ce5">
            <text:p>CAPA DE PROTECAO XP 2,60 X 4,60 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03.10.00</text:p>
          </table:table-cell>
          <table:table-cell office:value-type="string" table:style-name="ce5">
            <text:p>789900561765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04.47" table:style-name="ce6">
            <text:p><text:s/>604,4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50</text:p>
          </table:table-cell>
          <table:table-cell office:value-type="string" table:style-name="ce3">
            <text:p>CAPA DE PROTECAO XP 3,10 X 5,60 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5903.10.00</text:p>
          </table:table-cell>
          <table:table-cell office:value-type="string" table:style-name="ce3">
            <text:p>789900561766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59.65" table:style-name="ce4">
            <text:p><text:s/>859,6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51</text:p>
          </table:table-cell>
          <table:table-cell office:value-type="string" table:style-name="ce5">
            <text:p>CAPA DE PROTECAO XP 3,60 X 6,60 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03.10.00</text:p>
          </table:table-cell>
          <table:table-cell office:value-type="string" table:style-name="ce5">
            <text:p>789900561767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023.2" table:style-name="ce6">
            <text:p><text:s/>1.023,2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52</text:p>
          </table:table-cell>
          <table:table-cell office:value-type="string" table:style-name="ce3">
            <text:p>CAPA DE PROTECAO XP 4,10 X 7,60 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5903.10.00</text:p>
          </table:table-cell>
          <table:table-cell office:value-type="string" table:style-name="ce3">
            <text:p>789900561769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322.37" table:style-name="ce4">
            <text:p><text:s/>1.322,3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53</text:p>
          </table:table-cell>
          <table:table-cell office:value-type="string" table:style-name="ce5">
            <text:p>CAPA DE PROTECAO XP 4,60 X 7,60 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03.10.00</text:p>
          </table:table-cell>
          <table:table-cell office:value-type="string" table:style-name="ce5">
            <text:p>789900561770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407.57" table:style-name="ce6">
            <text:p><text:s/>1.407,5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54</text:p>
          </table:table-cell>
          <table:table-cell office:value-type="string" table:style-name="ce3">
            <text:p>CAPA DE PROTECAO XP 4,60 X 8,60 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5903.10.00</text:p>
          </table:table-cell>
          <table:table-cell office:value-type="string" table:style-name="ce3">
            <text:p>789900561771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541.67" table:style-name="ce4">
            <text:p><text:s/>1.541,6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67</text:p>
          </table:table-cell>
          <table:table-cell office:value-type="string" table:style-name="ce5">
            <text:p>CAPA TERMICA AQUEC.SOLAR <text:s/>3 X 6 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12.00</text:p>
          </table:table-cell>
          <table:table-cell office:value-type="string" table:style-name="ce5">
            <text:p>789900561782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59.29999999999995" table:style-name="ce6">
            <text:p><text:s/>559,3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68</text:p>
          </table:table-cell>
          <table:table-cell office:value-type="string" table:style-name="ce3">
            <text:p>CAPA TERMICA AQUEC.SOLAR <text:s/>4 X 8 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12.00</text:p>
          </table:table-cell>
          <table:table-cell office:value-type="string" table:style-name="ce3">
            <text:p>789900561783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5.09" table:style-name="ce4">
            <text:p><text:s/>745,0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45</text:p>
          </table:table-cell>
          <table:table-cell office:value-type="string" table:style-name="ce5">
            <text:p>CAPA TERMICA AQUEC.SOLAR <text:s/>4,5 X 9 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12.00</text:p>
          </table:table-cell>
          <table:table-cell office:value-type="string" table:style-name="ce5">
            <text:p>789900561761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256.07" table:style-name="ce6">
            <text:p><text:s/>1.256,0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46</text:p>
          </table:table-cell>
          <table:table-cell office:value-type="string" table:style-name="ce3">
            <text:p>CAPA TERMICA AQUEC.SOLAR <text:s/>5 X 10 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12.00</text:p>
          </table:table-cell>
          <table:table-cell office:value-type="string" table:style-name="ce3">
            <text:p>789900561762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5.46" table:style-name="ce4">
            <text:p><text:s/>1.395,4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48</text:p>
          </table:table-cell>
          <table:table-cell office:value-type="string" table:style-name="ce5">
            <text:p>CAPA TERMICA AQUEC.SOLAR <text:s/>5 X 14 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12.00</text:p>
          </table:table-cell>
          <table:table-cell office:value-type="string" table:style-name="ce5">
            <text:p>789900561764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952.91" table:style-name="ce6">
            <text:p><text:s/>1.952,91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47</text:p>
          </table:table-cell>
          <table:table-cell office:value-type="string" table:style-name="ce3">
            <text:p>CAPA TERMICA AQUEC.SOLAR <text:s/>8 X 10 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12.00</text:p>
          </table:table-cell>
          <table:table-cell office:value-type="string" table:style-name="ce3">
            <text:p>789900561763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9.96" table:style-name="ce4">
            <text:p><text:s/>1.859,9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549</text:p>
          </table:table-cell>
          <table:table-cell office:value-type="string" table:style-name="ce5">
            <text:p>CAPACITOR 40 UF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2.10.00</text:p>
          </table:table-cell>
          <table:table-cell office:value-type="string" table:style-name="ce5">
            <text:p>789900562419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2" table:style-name="ce6">
            <text:p><text:s/>6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728</text:p>
          </table:table-cell>
          <table:table-cell office:value-type="string" table:style-name="ce3">
            <text:p>CAPACITOR 88-108 CODIGO DE MP 205 (RP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7.80.00</text:p>
          </table:table-cell>
          <table:table-cell office:value-type="string" table:style-name="ce3">
            <text:p>789900562849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09.77" table:style-name="ce4">
            <text:p><text:s/>109,7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656</text:p>
          </table:table-cell>
          <table:table-cell office:value-type="string" table:style-name="ce5">
            <text:p>CAPACITOR DE 10 MFD PARA TROCADOR SD 105/130/16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612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08.57" table:style-name="ce6">
            <text:p><text:s/>108,5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92</text:p>
          </table:table-cell>
          <table:table-cell office:value-type="string" table:style-name="ce3">
            <text:p>CAPACITOR DE 5 MFD PARA TROCADOR SD 25 A SD 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593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5.13" table:style-name="ce4">
            <text:p><text:s/>95,1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86</text:p>
          </table:table-cell>
          <table:table-cell office:value-type="string" table:style-name="ce5">
            <text:p>CAPACITOR DE MARCHA P/ TC SD80 R2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2847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15" table:style-name="ce6">
            <text:p><text:s/>11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85</text:p>
          </table:table-cell>
          <table:table-cell office:value-type="string" table:style-name="ce3">
            <text:p>CAPACITOR DE PARTIDA PARA TROCADOR SD 105 (A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591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" table:style-name="ce4">
            <text:p><text:s/>16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56</text:p>
          </table:table-cell>
          <table:table-cell office:value-type="string" table:style-name="ce5">
            <text:p>CAPACITOR MARCHA PARA TROCADOR SD 130 C/ ELGIN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office:value-type="string" table:style-name="ce5">
            <text:p>7899005616315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236.77" table:style-name="ce6">
            <text:p><text:s/>236,7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52</text:p>
          </table:table-cell>
          <table:table-cell office:value-type="string" table:style-name="ce3">
            <text:p>CAPACITOR MARCHA PARA TROCADOR SD 2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1853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98.17" table:style-name="ce4">
            <text:p><text:s/>98,1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54</text:p>
          </table:table-cell>
          <table:table-cell office:value-type="string" table:style-name="ce5">
            <text:p>CAPACITOR MARCHA PARA TROCADOR SD 60/ 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office:value-type="string" table:style-name="ce5">
            <text:p>789900561630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19" table:style-name="ce6">
            <text:p><text:s/>11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55</text:p>
          </table:table-cell>
          <table:table-cell office:value-type="string" table:style-name="ce3">
            <text:p>CAPACITOR MARCHA PARA TROCADOR SD 80 C/ ELGIN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table:style-name="ce3"/>
          <table:table-cell office:value-type="float" office:value="6.5" table:style-name="ce4">
            <text:p><text:s/>6,50<text:s/></text:p>
          </table:table-cell>
          <table:table-cell office:value-type="float" office:value="92" table:style-name="ce4">
            <text:p><text:s/>9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502</text:p>
          </table:table-cell>
          <table:table-cell office:value-type="string" table:style-name="ce5">
            <text:p>CARRINHO APARELHO P/ FILTRAR PISCINA MOD. DOLPHIN <text:s/>2X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5300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3890" table:style-name="ce6">
            <text:p><text:s/>3.8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332</text:p>
          </table:table-cell>
          <table:table-cell office:value-type="string" table:style-name="ce3">
            <text:p>CARRINHO P/ ROBO LIMPADOR AUT DOLPHIN 2X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956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00" table:style-name="ce4">
            <text:p><text:s/>4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099</text:p>
          </table:table-cell>
          <table:table-cell office:value-type="string" table:style-name="ce5">
            <text:p>CARTUCHO 4 FILTR. POLIESTER APAR. P/ FILTR. PISCINA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2132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327" table:style-name="ce6">
            <text:p><text:s/>327,00<text:s/></text:p>
          </table:table-cell>
          <table:table-cell office:value-type="float" office:value="12" table:formula="of:=IFERROR(VLOOKUP([.A:.A];['SB1'.B:.G];6;FALSE);&quot;&quot;)" table:style-name="ce1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3112</text:p>
          </table:table-cell>
          <table:table-cell office:value-type="string" table:style-name="ce3">
            <text:p>CARTUCHO 4 FILTROS ROBO LIMPADOR AUTOMATICO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22118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406" table:style-name="ce4">
            <text:p><text:s/>406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37</text:p>
          </table:table-cell>
          <table:table-cell office:value-type="string" table:style-name="ce5">
            <text:p>CARTUCHO FILTRO RODA APAR. P/ FILTRAR PISCINA MOD.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989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724" table:style-name="ce6">
            <text:p><text:s/>724,00<text:s/></text:p>
          </table:table-cell>
          <table:table-cell office:value-type="float" office:value="20" table:formula="of:=IFERROR(VLOOKUP([.A:.A];['SB1'.B:.G];6;FALSE);&quot;&quot;)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0009</text:p>
          </table:table-cell>
          <table:table-cell office:value-type="string" table:style-name="ce3">
            <text:p>CASCATA 01 QUEDA AI304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746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50" table:style-name="ce4">
            <text:p><text:s/>2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997</text:p>
          </table:table-cell>
          <table:table-cell office:value-type="string" table:style-name="ce5">
            <text:p>CASCATA 03 QUEDAS AI304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747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598" table:style-name="ce6">
            <text:p><text:s/>59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297</text:p>
          </table:table-cell>
          <table:table-cell office:value-type="string" table:style-name="ce3">
            <text:p>CASCATA AMAZONAS AI304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811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070" table:style-name="ce4">
            <text:p><text:s/>1.0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996</text:p>
          </table:table-cell>
          <table:table-cell office:value-type="string" table:style-name="ce5">
            <text:p>CASCATA AMAZONAS AI304 - ESCOVAD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186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070" table:style-name="ce6">
            <text:p><text:s/>1.0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947</text:p>
          </table:table-cell>
          <table:table-cell office:value-type="string" table:style-name="ce3">
            <text:p>CASCATA ANGEL ACRYLIC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5.90.90</text:p>
          </table:table-cell>
          <table:table-cell office:value-type="string" table:style-name="ce3">
            <text:p>789900561730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400" table:style-name="ce4">
            <text:p><text:s/>4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164</text:p>
          </table:table-cell>
          <table:table-cell office:value-type="string" table:style-name="ce5">
            <text:p>CASCATA ANGEL AI304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273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950" table:style-name="ce6">
            <text:p><text:s/>9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997</text:p>
          </table:table-cell>
          <table:table-cell office:value-type="string" table:style-name="ce3">
            <text:p>CASCATA ANGEL AI304 - ESCOVAD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187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958" table:style-name="ce4">
            <text:p><text:s/>95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893</text:p>
          </table:table-cell>
          <table:table-cell office:value-type="string" table:style-name="ce5">
            <text:p>CASCATA ANGEL AI316 - ESCOV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723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210" table:style-name="ce6">
            <text:p><text:s/>1.2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634</text:p>
          </table:table-cell>
          <table:table-cell office:value-type="string" table:style-name="ce3">
            <text:p>CASCATA CANYON AI304 - ESCOVAD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204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340" table:style-name="ce4">
            <text:p><text:s/>2.3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298</text:p>
          </table:table-cell>
          <table:table-cell office:value-type="string" table:style-name="ce5">
            <text:p>CASCATA CANYON AI304 JR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95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200" table:style-name="ce6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998</text:p>
          </table:table-cell>
          <table:table-cell office:value-type="string" table:style-name="ce3">
            <text:p>CASCATA CANYON AI304 JR - ESCOVAD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188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100" table:style-name="ce4">
            <text:p><text:s/>1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892</text:p>
          </table:table-cell>
          <table:table-cell office:value-type="string" table:style-name="ce5">
            <text:p>CASCATA CANYON AI316 - ESCOV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722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100" table:style-name="ce6">
            <text:p><text:s/>3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623</text:p>
          </table:table-cell>
          <table:table-cell office:value-type="string" table:style-name="ce3">
            <text:p>CASCATA DE EMBUTIR <text:s/>040 C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93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90" table:style-name="ce4">
            <text:p><text:s/>8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624</text:p>
          </table:table-cell>
          <table:table-cell office:value-type="string" table:style-name="ce5">
            <text:p>CASCATA DE EMBUTIR <text:s/>060 C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94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035" table:style-name="ce6">
            <text:p><text:s/>1.0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625</text:p>
          </table:table-cell>
          <table:table-cell office:value-type="string" table:style-name="ce3">
            <text:p>CASCATA DE EMBUTIR <text:s/>080 C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95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385" table:style-name="ce4">
            <text:p><text:s/>1.38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626</text:p>
          </table:table-cell>
          <table:table-cell office:value-type="string" table:style-name="ce5">
            <text:p>CASCATA DE EMBUTIR <text:s/>100 C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96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654" table:style-name="ce6">
            <text:p><text:s/>1.6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627</text:p>
          </table:table-cell>
          <table:table-cell office:value-type="string" table:style-name="ce3">
            <text:p>CASCATA DE EMBUTIR <text:s/>120 C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97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840" table:style-name="ce4">
            <text:p><text:s/>1.8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628</text:p>
          </table:table-cell>
          <table:table-cell office:value-type="string" table:style-name="ce5">
            <text:p>CASCATA DE EMBUTIR <text:s/>140 C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98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250" table:style-name="ce6">
            <text:p><text:s/>2.2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629</text:p>
          </table:table-cell>
          <table:table-cell office:value-type="string" table:style-name="ce3">
            <text:p>CASCATA DE EMBUTIR <text:s/>180 C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99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300" table:style-name="ce4">
            <text:p><text:s/>3.3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633</text:p>
          </table:table-cell>
          <table:table-cell office:value-type="string" table:style-name="ce5">
            <text:p>CASCATA IGUACU AI304 - ESCOV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203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340" table:style-name="ce6">
            <text:p><text:s/>2.3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999</text:p>
          </table:table-cell>
          <table:table-cell office:value-type="string" table:style-name="ce3">
            <text:p>CASCATA IGUACU AI304 JR - ESCOVAD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189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430" table:style-name="ce4">
            <text:p><text:s/>1.4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305</text:p>
          </table:table-cell>
          <table:table-cell office:value-type="string" table:style-name="ce5">
            <text:p>CASCATA IGUACU JR AI304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96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380" table:style-name="ce6">
            <text:p><text:s/>1.3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660</text:p>
          </table:table-cell>
          <table:table-cell office:value-type="string" table:style-name="ce3">
            <text:p>CASCATA NABURI 0400MM AI304 - ESCOVAD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872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630" table:style-name="ce4">
            <text:p><text:s/>6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55</text:p>
          </table:table-cell>
          <table:table-cell office:value-type="string" table:style-name="ce5">
            <text:p>CASCATA NABURI 0400MM AI316 - ESCOV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132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786" table:style-name="ce6">
            <text:p><text:s/>78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661</text:p>
          </table:table-cell>
          <table:table-cell office:value-type="string" table:style-name="ce3">
            <text:p>CASCATA NABURI 0600MM AI304 - ESCOVAD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873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863" table:style-name="ce4">
            <text:p><text:s/>86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56</text:p>
          </table:table-cell>
          <table:table-cell office:value-type="string" table:style-name="ce5">
            <text:p>CASCATA NABURI 0600MM AI316 - ESCOV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133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200" table:style-name="ce6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662</text:p>
          </table:table-cell>
          <table:table-cell office:value-type="string" table:style-name="ce3">
            <text:p>CASCATA NABURI 0800MM AI304 - ESCOVAD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874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100" table:style-name="ce4">
            <text:p><text:s/>1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57</text:p>
          </table:table-cell>
          <table:table-cell office:value-type="string" table:style-name="ce5">
            <text:p>CASCATA NABURI 0800MM AI316 - ESCOV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134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500" table:style-name="ce6">
            <text:p><text:s/>1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663</text:p>
          </table:table-cell>
          <table:table-cell office:value-type="string" table:style-name="ce3">
            <text:p>CASCATA NABURI 1000MM AI304 - ESCOVAD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8753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320" table:style-name="ce4">
            <text:p><text:s/>1.3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58</text:p>
          </table:table-cell>
          <table:table-cell office:value-type="string" table:style-name="ce5">
            <text:p>CASCATA NABURI 1000MM AI316 - ESCOV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135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830" table:style-name="ce6">
            <text:p><text:s/>1.8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632</text:p>
          </table:table-cell>
          <table:table-cell office:value-type="string" table:style-name="ce3">
            <text:p>CASCATA NIAGARA AI304 - ESCOVAD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2028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440" table:style-name="ce4">
            <text:p><text:s/>2.4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114</text:p>
          </table:table-cell>
          <table:table-cell office:value-type="string" table:style-name="ce5">
            <text:p>CASCATA PARADISE ACRYLIC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5.90.90</text:p>
          </table:table-cell>
          <table:table-cell office:value-type="string" table:style-name="ce5">
            <text:p>789900561272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220" table:style-name="ce6">
            <text:p><text:s/>5.2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236</text:p>
          </table:table-cell>
          <table:table-cell office:value-type="string" table:style-name="ce3">
            <text:p>CASCATA SPLASH TUBO 25 M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936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60" table:style-name="ce4">
            <text:p><text:s/>4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1990</text:p>
          </table:table-cell>
          <table:table-cell office:value-type="string" table:style-name="ce5">
            <text:p>CASCATA SPLASH TUBO 50M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9101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40" table:style-name="ce6">
            <text:p><text:s/>3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074</text:p>
          </table:table-cell>
          <table:table-cell office:value-type="string" table:style-name="ce3">
            <text:p>CASCATA VICTORIA ACRYLIC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5.90.90</text:p>
          </table:table-cell>
          <table:table-cell office:value-type="string" table:style-name="ce3">
            <text:p>789900561750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500" table:style-name="ce4">
            <text:p><text:s/>8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924</text:p>
          </table:table-cell>
          <table:table-cell office:value-type="string" table:style-name="ce5">
            <text:p>CASCATA VICTORIA AI304 - ESCOV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1501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760" table:style-name="ce6">
            <text:p><text:s/>2.7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000</text:p>
          </table:table-cell>
          <table:table-cell office:value-type="string" table:style-name="ce3">
            <text:p>CASCATA VICTORIA AI304 JR - ESCOVAD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190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370" table:style-name="ce4">
            <text:p><text:s/>1.3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310</text:p>
          </table:table-cell>
          <table:table-cell office:value-type="string" table:style-name="ce5">
            <text:p>CASCATA VICTORIA JR AI304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97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480" table:style-name="ce6">
            <text:p><text:s/>1.4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894</text:p>
          </table:table-cell>
          <table:table-cell office:value-type="string" table:style-name="ce3">
            <text:p>CASCATA VICTORIA JR AI316 - ESCOVAD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7244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800" table:style-name="ce4">
            <text:p><text:s/>1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528</text:p>
          </table:table-cell>
          <table:table-cell office:value-type="string" table:style-name="ce5">
            <text:p>CAVALETE GERADOR DE CLORO GS-20</text:p>
          </table:table-cell>
          <table:table-cell office:value-type="string" table:style-name="ce5">
            <text:p>PE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40.90</text:p>
          </table:table-cell>
          <table:table-cell table:style-name="ce5"/>
          <table:table-cell office:value-type="float" office:value="0" table:style-name="ce6">
            <text:p><text:s/>-<text:s/></text:p>
          </table:table-cell>
          <table:table-cell office:value-type="float" office:value="194" table:style-name="ce6">
            <text:p><text:s/>19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406</text:p>
          </table:table-cell>
          <table:table-cell office:value-type="string" table:style-name="ce3">
            <text:p>CAVALETE P/ GERADOR DE CLORO GS-4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24730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54" table:style-name="ce4">
            <text:p><text:s/>3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4968</text:p>
          </table:table-cell>
          <table:table-cell office:value-type="string" table:style-name="ce5">
            <text:p>CAVALETE SD 105/130/16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office:value-type="string" table:style-name="ce5">
            <text:p>7899005622002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44" table:style-name="ce6">
            <text:p><text:s/>14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967</text:p>
          </table:table-cell>
          <table:table-cell office:value-type="string" table:style-name="ce3">
            <text:p>CAVALETE SD 40/60/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21999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01" table:style-name="ce4">
            <text:p><text:s/>20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178</text:p>
          </table:table-cell>
          <table:table-cell office:value-type="string" table:style-name="ce5">
            <text:p>CELULA GERADOR CLORO GS1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33534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816" table:style-name="ce6">
            <text:p><text:s/>1.816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7176</text:p>
          </table:table-cell>
          <table:table-cell office:value-type="string" table:style-name="ce3">
            <text:p>CELULA GERADOR CLORO GS1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33527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300" table:style-name="ce4">
            <text:p><text:s/>2.300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174</text:p>
          </table:table-cell>
          <table:table-cell office:value-type="string" table:style-name="ce5">
            <text:p>CELULA GERADOR CLORO GS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33510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3202" table:style-name="ce6">
            <text:p><text:s/>3.20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180</text:p>
          </table:table-cell>
          <table:table-cell office:value-type="string" table:style-name="ce3">
            <text:p>CELULA GERADOR CLORO GS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3354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028" table:style-name="ce4">
            <text:p><text:s/>1.028,00<text:s/></text:p>
          </table:table-cell>
          <table:table-cell office:value-type="float" office:value="4" table:formula="of:=IFERROR(VLOOKUP([.A:.A];['SB1'.B:.G];6;FALSE);&quot;&quot;)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465</text:p>
          </table:table-cell>
          <table:table-cell office:value-type="string" table:style-name="ce5">
            <text:p>CELULA GERADOR DE CLORO GS2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30.90</text:p>
          </table:table-cell>
          <table:table-cell office:value-type="string" table:style-name="ce5">
            <text:p>789900562873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124" table:style-name="ce6">
            <text:p><text:s/>5.124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14020</text:p>
          </table:table-cell>
          <table:table-cell office:value-type="string" table:style-name="ce3">
            <text:p>CELULA GERADOR DE CLORO GS4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30.90</text:p>
          </table:table-cell>
          <table:table-cell office:value-type="string" table:style-name="ce3">
            <text:p>789900561556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00" table:style-name="ce4">
            <text:p><text:s/>8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44</text:p>
          </table:table-cell>
          <table:table-cell office:value-type="string" table:style-name="ce5">
            <text:p>CENTRALIZADOR EIXO INT P/ ROBO LIMPADOR AUT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460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3" table:style-name="ce6">
            <text:p><text:s/>3,00<text:s/></text:p>
          </table:table-cell>
          <table:table-cell office:value-type="float" office:value="14" table:formula="of:=IFERROR(VLOOKUP([.A:.A];['SB1'.B:.G];6;FALSE);&quot;&quot;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3889</text:p>
          </table:table-cell>
          <table:table-cell office:value-type="string" table:style-name="ce3">
            <text:p>CERCA DE PROTECAO MODULO 135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08.90.90</text:p>
          </table:table-cell>
          <table:table-cell office:value-type="string" table:style-name="ce3">
            <text:p>789900560642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40" table:style-name="ce4">
            <text:p><text:s/>5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3888</text:p>
          </table:table-cell>
          <table:table-cell office:value-type="string" table:style-name="ce5">
            <text:p>CERCA DE PROTECAO MODULO 270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08.90.90</text:p>
          </table:table-cell>
          <table:table-cell office:value-type="string" table:style-name="ce5">
            <text:p>789900560641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90" table:style-name="ce6">
            <text:p><text:s/>8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3887</text:p>
          </table:table-cell>
          <table:table-cell office:value-type="string" table:style-name="ce3">
            <text:p>CERCA DE PROTECAO MODULO 405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08.90.90</text:p>
          </table:table-cell>
          <table:table-cell office:value-type="string" table:style-name="ce3">
            <text:p>789900560640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200" table:style-name="ce4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52</text:p>
          </table:table-cell>
          <table:table-cell office:value-type="string" table:style-name="ce5">
            <text:p>CESTO DE FILTRAGEM <text:s/>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538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760" table:style-name="ce6">
            <text:p><text:s/>1.760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4226</text:p>
          </table:table-cell>
          <table:table-cell office:value-type="string" table:style-name="ce3">
            <text:p>CESTO PLASTICO COLETOR BL/BP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972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9.06" table:style-name="ce4">
            <text:p><text:s/>29,0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298</text:p>
          </table:table-cell>
          <table:table-cell office:value-type="string" table:style-name="ce5">
            <text:p>CESTO PLASTICO P/COLETOR SKIMMER COMPACT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9737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2.45" table:style-name="ce6">
            <text:p><text:s/>22,4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59</text:p>
          </table:table-cell>
          <table:table-cell office:value-type="string" table:style-name="ce3">
            <text:p>CESTO TELA P/ ROBO LIMPADOR AUTOMATICO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606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510" table:style-name="ce4">
            <text:p><text:s/>510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4436</text:p>
          </table:table-cell>
          <table:table-cell office:value-type="string" table:style-name="ce5">
            <text:p>CHAPA FIXACAO P/ SUP. MOTOR VENT. TROCADOR TH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table:style-name="ce5"/>
          <table:table-cell office:value-type="float" office:value="5" table:style-name="ce6">
            <text:p><text:s/>5,00<text:s/></text:p>
          </table:table-cell>
          <table:table-cell office:value-type="float" office:value="37" table:style-name="ce6">
            <text:p><text:s/>3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83</text:p>
          </table:table-cell>
          <table:table-cell office:value-type="string" table:style-name="ce3">
            <text:p>CHAVE CONTINENTAL PARA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636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5.04" table:style-name="ce4">
            <text:p><text:s/>45,0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74</text:p>
          </table:table-cell>
          <table:table-cell office:value-type="string" table:style-name="ce5">
            <text:p>CHAVE DE 15 AMPERES MICRO SWIFT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50.90</text:p>
          </table:table-cell>
          <table:table-cell office:value-type="string" table:style-name="ce5">
            <text:p>7899005610870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51.52" table:style-name="ce6">
            <text:p><text:s/>51,5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01</text:p>
          </table:table-cell>
          <table:table-cell office:value-type="string" table:style-name="ce3">
            <text:p>CHAVE DE 6 AMPERE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50.90</text:p>
          </table:table-cell>
          <table:table-cell office:value-type="string" table:style-name="ce3">
            <text:p>789900561521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2.27" table:style-name="ce4">
            <text:p><text:s/>42,2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637</text:p>
          </table:table-cell>
          <table:table-cell office:value-type="string" table:style-name="ce5">
            <text:p>CHUMBADOR P/ BANCO EM AB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207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50" table:style-name="ce6">
            <text:p><text:s/>1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950</text:p>
          </table:table-cell>
          <table:table-cell office:value-type="string" table:style-name="ce3">
            <text:p>CHUMBADOR P/ ESCADA 1 1/2 POL. EM AB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437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9" table:style-name="ce4">
            <text:p><text:s/>2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781</text:p>
          </table:table-cell>
          <table:table-cell office:value-type="string" table:style-name="ce5">
            <text:p>CHUMBADOR PLAST DE PRESSAO DE 1 1/2 POLEGAD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2860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58" table:style-name="ce6">
            <text:p><text:s/>5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5006</text:p>
          </table:table-cell>
          <table:table-cell office:value-type="string" table:style-name="ce3">
            <text:p>CHUMBADOR PLAST.P/ ESCADA DE 2 POLEGADA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481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5" table:style-name="ce4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268</text:p>
          </table:table-cell>
          <table:table-cell office:value-type="string" table:style-name="ce5">
            <text:p>CHUMBADOR PLASTICO PARA CERCA / PORTAO COM TAMP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650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5.4" table:style-name="ce6">
            <text:p><text:s/>15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987</text:p>
          </table:table-cell>
          <table:table-cell office:value-type="string" table:style-name="ce3">
            <text:p>CHUV. N/ ELET. ADVANCED C/ ENTR.QT/FR.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4.90.00</text:p>
          </table:table-cell>
          <table:table-cell office:value-type="string" table:style-name="ce3">
            <text:p>7899005627816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5500" table:style-name="ce4">
            <text:p><text:s/>5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945</text:p>
          </table:table-cell>
          <table:table-cell office:value-type="string" table:style-name="ce5">
            <text:p>CHUV. N/ ELET. INOX 12 POL.C/ CANO 1/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324.90.00</text:p>
          </table:table-cell>
          <table:table-cell office:value-type="string" table:style-name="ce5">
            <text:p>7899005627823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350" table:style-name="ce6">
            <text:p><text:s/>1.3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983</text:p>
          </table:table-cell>
          <table:table-cell office:value-type="string" table:style-name="ce3">
            <text:p>CHUV. N/ ELET. INOX 25X25 CM C/ CANO 1/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4.90.00</text:p>
          </table:table-cell>
          <table:table-cell office:value-type="string" table:style-name="ce3">
            <text:p>7899005627847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100" table:style-name="ce4">
            <text:p><text:s/>1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946</text:p>
          </table:table-cell>
          <table:table-cell office:value-type="string" table:style-name="ce5">
            <text:p>CHUV. N/ ELET. INOX 8 POL.C/ CANO 1/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324.90.00</text:p>
          </table:table-cell>
          <table:table-cell office:value-type="string" table:style-name="ce5">
            <text:p>7899005627830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780" table:style-name="ce6">
            <text:p><text:s/>7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985</text:p>
          </table:table-cell>
          <table:table-cell office:value-type="string" table:style-name="ce3">
            <text:p>CHUV. N/ ELET. INOX SQUAR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4.90.00</text:p>
          </table:table-cell>
          <table:table-cell office:value-type="string" table:style-name="ce3">
            <text:p>789900562786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050" table:style-name="ce4">
            <text:p><text:s/>3.0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986</text:p>
          </table:table-cell>
          <table:table-cell office:value-type="string" table:style-name="ce5">
            <text:p>CHUV. N/ ELET. INOX TUBULAR 2 POL.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4.90.00</text:p>
          </table:table-cell>
          <table:table-cell office:value-type="string" table:style-name="ce5">
            <text:p>789900562787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2580" table:style-name="ce6">
            <text:p><text:s/>2.5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803</text:p>
          </table:table-cell>
          <table:table-cell office:value-type="string" table:style-name="ce3">
            <text:p>CHUVEIRO DE MAO DA DUCHA PAINE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349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68" table:style-name="ce4">
            <text:p><text:s/>6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807</text:p>
          </table:table-cell>
          <table:table-cell office:value-type="string" table:style-name="ce5">
            <text:p>CHUVEIRO PLASTICO <text:s/>INTERNO <text:s/>DUCHA ADVANCE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53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50.82" table:style-name="ce6">
            <text:p><text:s/>50,8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03</text:p>
          </table:table-cell>
          <table:table-cell office:value-type="string" table:style-name="ce3">
            <text:p>CJTO CONTROLADOR TOUCH P/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32.90.99</text:p>
          </table:table-cell>
          <table:table-cell office:value-type="string" table:style-name="ce3">
            <text:p>7899005629858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729" table:style-name="ce4">
            <text:p><text:s/>1.72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62</text:p>
          </table:table-cell>
          <table:table-cell office:value-type="string" table:style-name="ce5">
            <text:p>CJTO RODA C/ ESCOVA CINZA P/ ROBO LIMP. AUTOM.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83.90.00</text:p>
          </table:table-cell>
          <table:table-cell office:value-type="string" table:style-name="ce5">
            <text:p>789900561963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17" table:style-name="ce6">
            <text:p><text:s/>417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40</text:p>
          </table:table-cell>
          <table:table-cell office:value-type="string" table:style-name="ce3">
            <text:p>CLIP TUBO RODA APARELHO P/ FILTRAR PISCINA <text:s/>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98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" table:style-name="ce4">
            <text:p><text:s/>20,00<text:s/></text:p>
          </table:table-cell>
          <table:table-cell office:value-type="float" office:value="20" table:formula="of:=IFERROR(VLOOKUP([.A:.A];['SB1'.B:.G];6;FALSE);&quot;&quot;)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9750</text:p>
          </table:table-cell>
          <table:table-cell office:value-type="string" table:style-name="ce5">
            <text:p>COLAR PLASTICO COMPLET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654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80" table:style-name="ce6">
            <text:p><text:s/>1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2164</text:p>
          </table:table-cell>
          <table:table-cell office:value-type="string" table:style-name="ce3">
            <text:p>COLETOR AQUECEDOR SOLAR DE AGUA CSI 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12.00</text:p>
          </table:table-cell>
          <table:table-cell office:value-type="string" table:style-name="ce3">
            <text:p>789900561052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" table:style-name="ce4">
            <text:p><text:s/>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2165</text:p>
          </table:table-cell>
          <table:table-cell office:value-type="string" table:style-name="ce5">
            <text:p>COLETOR AQUECEDOR SOLAR DE AGUA CSI 3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12.00</text:p>
          </table:table-cell>
          <table:table-cell office:value-type="string" table:style-name="ce5">
            <text:p>789900561051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20" table:style-name="ce6">
            <text:p><text:s/>1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2166</text:p>
          </table:table-cell>
          <table:table-cell office:value-type="string" table:style-name="ce3">
            <text:p>COLETOR AQUECEDOR SOLAR DE AGUA CSI 4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12.00</text:p>
          </table:table-cell>
          <table:table-cell office:value-type="string" table:style-name="ce3">
            <text:p>789900561053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" table:style-name="ce4">
            <text:p><text:s/>15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984</text:p>
          </table:table-cell>
          <table:table-cell office:value-type="string" table:style-name="ce5">
            <text:p>COLUNA DO CHUV. N/ ELET. 04 ARCOS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785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600" table:style-name="ce6">
            <text:p><text:s/>4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68</text:p>
          </table:table-cell>
          <table:table-cell office:value-type="string" table:style-name="ce3">
            <text:p>COMANDO ANALOGICO ( A )P/ UNIVERSAL/STEAM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319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0" table:style-name="ce4">
            <text:p><text:s/>9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64</text:p>
          </table:table-cell>
          <table:table-cell office:value-type="string" table:style-name="ce5">
            <text:p>COMANDO ANALOGICO P/ COMPACT LINE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317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20" table:style-name="ce6">
            <text:p><text:s/>5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66</text:p>
          </table:table-cell>
          <table:table-cell office:value-type="string" table:style-name="ce3">
            <text:p>COMANDO ANALOGICO P/ GERADOR DE CALOR (50 AMP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90.00</text:p>
          </table:table-cell>
          <table:table-cell office:value-type="string" table:style-name="ce3">
            <text:p>7899005613147</text:p>
          </table:table-cell>
          <table:table-cell office:value-type="float" office:value="10" table:style-name="ce4">
            <text:p><text:s/>10,00<text:s/></text:p>
          </table:table-cell>
          <table:table-cell office:value-type="float" office:value="980" table:style-name="ce4">
            <text:p><text:s/>9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07</text:p>
          </table:table-cell>
          <table:table-cell office:value-type="string" table:style-name="ce5">
            <text:p>COMANDO ANALOGICO P/ GV UNIV./STEAM INOX 12KW 220V BIF.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321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340" table:style-name="ce6">
            <text:p><text:s/>1.3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69</text:p>
          </table:table-cell>
          <table:table-cell office:value-type="string" table:style-name="ce3">
            <text:p>COMANDO DIGITAL (A ) P/ UNIVERSAL/STEAM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320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00" table:style-name="ce4">
            <text:p><text:s/>1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08</text:p>
          </table:table-cell>
          <table:table-cell office:value-type="string" table:style-name="ce5">
            <text:p>COMANDO DIGITAL (B ) P/ UNIVERSAL /STEAM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322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990" table:style-name="ce6">
            <text:p><text:s/>1.9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65</text:p>
          </table:table-cell>
          <table:table-cell office:value-type="string" table:style-name="ce3">
            <text:p>COMANDO DIGITAL P/ COMPACT LIN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318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50" table:style-name="ce4">
            <text:p><text:s/>1.0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67</text:p>
          </table:table-cell>
          <table:table-cell office:value-type="string" table:style-name="ce5">
            <text:p>COMANDO DIGITAL P/ GERADOR DE CALOR (50 AMP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90.00</text:p>
          </table:table-cell>
          <table:table-cell office:value-type="string" table:style-name="ce5">
            <text:p>7899005613154</text:p>
          </table:table-cell>
          <table:table-cell office:value-type="float" office:value="10" table:style-name="ce6">
            <text:p><text:s/>10,00<text:s/></text:p>
          </table:table-cell>
          <table:table-cell office:value-type="float" office:value="1340" table:style-name="ce6">
            <text:p><text:s/>1.3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533</text:p>
          </table:table-cell>
          <table:table-cell office:value-type="string" table:style-name="ce3">
            <text:p>COMANDO TOUCH COMPACT LIN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3021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00" table:style-name="ce4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021</text:p>
          </table:table-cell>
          <table:table-cell office:value-type="string" table:style-name="ce5">
            <text:p>COMANDO TOUCH P/ GV COMPACT LINE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3495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200" table:style-name="ce6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534</text:p>
          </table:table-cell>
          <table:table-cell office:value-type="string" table:style-name="ce3">
            <text:p>COMANDO TOUCH UNIV/STEAM INOX 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3022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00" table:style-name="ce4">
            <text:p><text:s/>1.7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501</text:p>
          </table:table-cell>
          <table:table-cell office:value-type="string" table:style-name="ce5">
            <text:p>COMANDO TOUCH UNIV/STEAM INOX B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3240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200" table:style-name="ce6">
            <text:p><text:s/>2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657</text:p>
          </table:table-cell>
          <table:table-cell office:value-type="string" table:style-name="ce3">
            <text:p>COMPONENTES EXTERNO DOSADOR CLORO 2 KG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34227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5" table:style-name="ce4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17</text:p>
          </table:table-cell>
          <table:table-cell office:value-type="string" table:style-name="ce5">
            <text:p>COMPRESSOR PARA TROCADOR SD 105 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1816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373.29" table:style-name="ce6">
            <text:p><text:s/>6.373,2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19</text:p>
          </table:table-cell>
          <table:table-cell office:value-type="string" table:style-name="ce3">
            <text:p>COMPRESSOR PARA TROCADOR SD 105 B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30.19</text:p>
          </table:table-cell>
          <table:table-cell table:style-name="ce3"/>
          <table:table-cell office:value-type="float" office:value="0" table:style-name="ce4">
            <text:p><text:s/>-<text:s/></text:p>
          </table:table-cell>
          <table:table-cell office:value-type="float" office:value="6373.98" table:style-name="ce4">
            <text:p><text:s/>6.373,9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20</text:p>
          </table:table-cell>
          <table:table-cell office:value-type="string" table:style-name="ce5">
            <text:p>COMPRESSOR PARA TROCADOR SD 105 C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1854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370.98" table:style-name="ce6">
            <text:p><text:s/>6.370,9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418</text:p>
          </table:table-cell>
          <table:table-cell office:value-type="string" table:style-name="ce3">
            <text:p>COMPRESSOR PARA TROCADOR SD 130 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30.19</text:p>
          </table:table-cell>
          <table:table-cell office:value-type="string" table:style-name="ce3">
            <text:p>789900561596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240" table:style-name="ce4">
            <text:p><text:s/>12.2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21</text:p>
          </table:table-cell>
          <table:table-cell office:value-type="string" table:style-name="ce5">
            <text:p>COMPRESSOR PARA TROCADOR SD 130 B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1619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8108" table:style-name="ce6">
            <text:p><text:s/>8.10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22</text:p>
          </table:table-cell>
          <table:table-cell office:value-type="string" table:style-name="ce3">
            <text:p>COMPRESSOR PARA TROCADOR SD 130 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30.19</text:p>
          </table:table-cell>
          <table:table-cell office:value-type="string" table:style-name="ce3">
            <text:p>789900562150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643" table:style-name="ce4">
            <text:p><text:s/>8.6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23</text:p>
          </table:table-cell>
          <table:table-cell office:value-type="string" table:style-name="ce5">
            <text:p>COMPRESSOR PARA TROCADOR SD 160 B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2440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8008.76" table:style-name="ce6">
            <text:p><text:s/>8.008,7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24</text:p>
          </table:table-cell>
          <table:table-cell office:value-type="string" table:style-name="ce3">
            <text:p>COMPRESSOR PARA TROCADOR SD 160 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30.19</text:p>
          </table:table-cell>
          <table:table-cell office:value-type="string" table:style-name="ce3">
            <text:p>789900561743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758" table:style-name="ce4">
            <text:p><text:s/>8.75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417</text:p>
          </table:table-cell>
          <table:table-cell office:value-type="string" table:style-name="ce5">
            <text:p>COMPRESSOR PARA TROCADOR SD 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1595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200" table:style-name="ce6">
            <text:p><text:s/>3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490</text:p>
          </table:table-cell>
          <table:table-cell office:value-type="string" table:style-name="ce3">
            <text:p>COMPRESSOR PARA TROCADOR SD 4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30.19</text:p>
          </table:table-cell>
          <table:table-cell office:value-type="string" table:style-name="ce3">
            <text:p>789900561607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19.6899999999996" table:style-name="ce4">
            <text:p><text:s/>4.319,6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492</text:p>
          </table:table-cell>
          <table:table-cell office:value-type="string" table:style-name="ce5">
            <text:p>COMPRESSOR PARA TROCADOR SD 60 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2445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200" table:style-name="ce6">
            <text:p><text:s/>6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11</text:p>
          </table:table-cell>
          <table:table-cell office:value-type="string" table:style-name="ce3">
            <text:p>COMPRESSOR PARA TROCADOR SD 60 B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30.19</text:p>
          </table:table-cell>
          <table:table-cell office:value-type="string" table:style-name="ce3">
            <text:p>789900561614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19" table:style-name="ce4">
            <text:p><text:s/>5.51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12</text:p>
          </table:table-cell>
          <table:table-cell office:value-type="string" table:style-name="ce5">
            <text:p>COMPRESSOR PARA TROCADOR SD 60 C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2479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7372" table:style-name="ce6">
            <text:p><text:s/>7.37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13</text:p>
          </table:table-cell>
          <table:table-cell office:value-type="string" table:style-name="ce3">
            <text:p>COMPRESSOR PARA TROCADOR SD 80 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30.19</text:p>
          </table:table-cell>
          <table:table-cell office:value-type="string" table:style-name="ce3">
            <text:p>789900561615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777.31" table:style-name="ce4">
            <text:p><text:s/>5.777,31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14</text:p>
          </table:table-cell>
          <table:table-cell office:value-type="string" table:style-name="ce5">
            <text:p>COMPRESSOR PARA TROCADOR SD 80 B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1616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232" table:style-name="ce6">
            <text:p><text:s/>6.23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16</text:p>
          </table:table-cell>
          <table:table-cell office:value-type="string" table:style-name="ce3">
            <text:p>COMPRESSOR PARA TROCADOR SD 80 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30.19</text:p>
          </table:table-cell>
          <table:table-cell office:value-type="string" table:style-name="ce3">
            <text:p>789900561617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778.46" table:style-name="ce4">
            <text:p><text:s/>5.778,4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371</text:p>
          </table:table-cell>
          <table:table-cell office:value-type="string" table:style-name="ce5">
            <text:p>COMPRESSOR PARA TROCADOR TH 1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30.19</text:p>
          </table:table-cell>
          <table:table-cell office:value-type="string" table:style-name="ce5">
            <text:p>789900562981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569" table:style-name="ce6">
            <text:p><text:s/>2.56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379</text:p>
          </table:table-cell>
          <table:table-cell office:value-type="string" table:style-name="ce3">
            <text:p>COMUTADOR MOES WIFI TUY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50.90</text:p>
          </table:table-cell>
          <table:table-cell table:style-name="ce3"/>
          <table:table-cell office:value-type="float" office:value="9.75" table:style-name="ce4">
            <text:p><text:s/>9,75<text:s/></text:p>
          </table:table-cell>
          <table:table-cell office:value-type="float" office:value="460" table:style-name="ce4">
            <text:p><text:s/>4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983</text:p>
          </table:table-cell>
          <table:table-cell office:value-type="string" table:style-name="ce5">
            <text:p>COMUTADOR TEMP WIFI TUYA COM SENS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36.50.90</text:p>
          </table:table-cell>
          <table:table-cell table:style-name="ce5"/>
          <table:table-cell office:value-type="float" office:value="0" table:style-name="ce6">
            <text:p><text:s/>-<text:s/></text:p>
          </table:table-cell>
          <table:table-cell office:value-type="float" office:value="626" table:style-name="ce6">
            <text:p><text:s/>62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769</text:p>
          </table:table-cell>
          <table:table-cell office:value-type="string" table:style-name="ce3">
            <text:p>CONCH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4421.99.00</text:p>
          </table:table-cell>
          <table:table-cell office:value-type="string" table:style-name="ce3">
            <text:p>789900560338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2" table:style-name="ce4">
            <text:p><text:s/>31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025</text:p>
          </table:table-cell>
          <table:table-cell office:value-type="string" table:style-name="ce5">
            <text:p>CONCHA DE MADEI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420.90.00</text:p>
          </table:table-cell>
          <table:table-cell office:value-type="string" table:style-name="ce5">
            <text:p>789900563320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84" table:style-name="ce6">
            <text:p><text:s/>18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384</text:p>
          </table:table-cell>
          <table:table-cell office:value-type="string" table:style-name="ce3">
            <text:p>CONDENSADOR EM TITANEO P/ TROCADORES SD 40 / 60 / 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90.90</text:p>
          </table:table-cell>
          <table:table-cell office:value-type="string" table:style-name="ce3">
            <text:p>789900562855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230" table:style-name="ce4">
            <text:p><text:s/>3.2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6104</text:p>
          </table:table-cell>
          <table:table-cell office:value-type="string" table:style-name="ce5">
            <text:p>CONDENSADOR TITANIO PARA TROCADOR SD 105/13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9.90.90</text:p>
          </table:table-cell>
          <table:table-cell office:value-type="string" table:style-name="ce5">
            <text:p>789900561695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510" table:style-name="ce6">
            <text:p><text:s/>4.5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6105</text:p>
          </table:table-cell>
          <table:table-cell office:value-type="string" table:style-name="ce3">
            <text:p>CONDENSADOR TITANIO PARA TROCADOR SD 16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19.90.90</text:p>
          </table:table-cell>
          <table:table-cell office:value-type="string" table:style-name="ce3">
            <text:p>789900561696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065" table:style-name="ce4">
            <text:p><text:s/>8.0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6101</text:p>
          </table:table-cell>
          <table:table-cell office:value-type="string" table:style-name="ce5">
            <text:p>CONDENSADOR TITANIO PARA TROCADOR SD 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9.90.90</text:p>
          </table:table-cell>
          <table:table-cell office:value-type="string" table:style-name="ce5">
            <text:p>789900561692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024.1" table:style-name="ce6">
            <text:p><text:s/>3.024,1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801</text:p>
          </table:table-cell>
          <table:table-cell office:value-type="string" table:style-name="ce3">
            <text:p>CONEXAO MANGUEIRA CHUVEIRO DUCHA PAINE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347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3" table:style-name="ce4">
            <text:p><text:s/>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47</text:p>
          </table:table-cell>
          <table:table-cell office:value-type="string" table:style-name="ce5">
            <text:p>CONJ CARTUCHO P/ ROBO LIMPADOR AUTOMATICO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491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108" table:style-name="ce6">
            <text:p><text:s/>1.108,00<text:s/></text:p>
          </table:table-cell>
          <table:table-cell office:value-type="float" office:value="22" table:formula="of:=IFERROR(VLOOKUP([.A:.A];['SB1'.B:.G];6;FALSE);&quot;&quot;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67</text:p>
          </table:table-cell>
          <table:table-cell office:value-type="string" table:style-name="ce3">
            <text:p>CONJ DE RODA P/ ROBO LIMPADOR AUTOMATICO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682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277" table:style-name="ce4">
            <text:p><text:s/>277,00<text:s/></text:p>
          </table:table-cell>
          <table:table-cell office:value-type="float" office:value="18" table:formula="of:=IFERROR(VLOOKUP([.A:.A];['SB1'.B:.G];6;FALSE);&quot;&quot;)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6716</text:p>
          </table:table-cell>
          <table:table-cell office:value-type="string" table:style-name="ce5">
            <text:p>CONJ EXTENSORES/BUCHA/PINO/PARAF ENROL CAPA P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9.90.90</text:p>
          </table:table-cell>
          <table:table-cell office:value-type="string" table:style-name="ce5">
            <text:p>789900561494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28" table:style-name="ce6">
            <text:p><text:s/>42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644</text:p>
          </table:table-cell>
          <table:table-cell office:value-type="string" table:style-name="ce3">
            <text:p>CONJ FLANGEAMENTO P/ DRENO 10/50 VINI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040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6" table:style-name="ce4">
            <text:p><text:s/>3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954</text:p>
          </table:table-cell>
          <table:table-cell office:value-type="string" table:style-name="ce5">
            <text:p>CONJ FLANGEAMENTO SKIMMER BE VINI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380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50" table:style-name="ce6">
            <text:p><text:s/>4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636</text:p>
          </table:table-cell>
          <table:table-cell office:value-type="string" table:style-name="ce3">
            <text:p>CONJ PLACAS GERADOR DE CLORO GS-1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43.90.90</text:p>
          </table:table-cell>
          <table:table-cell table:style-name="ce3"/>
          <table:table-cell office:value-type="float" office:value="0" table:style-name="ce4">
            <text:p><text:s/>-<text:s/></text:p>
          </table:table-cell>
          <table:table-cell office:value-type="float" office:value="1120" table:style-name="ce4">
            <text:p><text:s/>1.1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88</text:p>
          </table:table-cell>
          <table:table-cell office:value-type="string" table:style-name="ce5">
            <text:p>CONJ TUBO QUARTZO 35W E VEDACOES UVC POWE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3598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470.8" table:style-name="ce6">
            <text:p><text:s/>470,8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289</text:p>
          </table:table-cell>
          <table:table-cell office:value-type="string" table:style-name="ce3">
            <text:p>CONJ TUBO QUARTZO 55/95 W E VEDACOES UVC POWE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3604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542.29999999999995" table:style-name="ce4">
            <text:p><text:s/>542,3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81</text:p>
          </table:table-cell>
          <table:table-cell office:value-type="string" table:style-name="ce5">
            <text:p>CONJ UNIAO ENTRADA / SAIDA DE AGUA UVC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3550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59.46" table:style-name="ce6">
            <text:p><text:s/>59,4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887</text:p>
          </table:table-cell>
          <table:table-cell office:value-type="string" table:style-name="ce3">
            <text:p>CONJ. FITAS E ACESSORIOS PARA CAPA XP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7251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45" table:style-name="ce4">
            <text:p><text:s/>44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582</text:p>
          </table:table-cell>
          <table:table-cell office:value-type="string" table:style-name="ce5">
            <text:p>CONJ. FITAS PARA TUBO ENROLADOR DE CAPA INOX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2379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35.5" table:style-name="ce6">
            <text:p><text:s/>335,5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996</text:p>
          </table:table-cell>
          <table:table-cell office:value-type="string" table:style-name="ce3">
            <text:p>CONJ. PLACA SAIDA POTENCIA 300 WATT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40.21</text:p>
          </table:table-cell>
          <table:table-cell table:style-name="ce3"/>
          <table:table-cell office:value-type="float" office:value="3.75" table:style-name="ce4">
            <text:p><text:s/>3,75<text:s/></text:p>
          </table:table-cell>
          <table:table-cell office:value-type="float" office:value="133" table:style-name="ce4">
            <text:p><text:s/>13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997</text:p>
          </table:table-cell>
          <table:table-cell office:value-type="string" table:style-name="ce5">
            <text:p>CONJ. RETIFICADOR DE TENSAO 300W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20.00</text:p>
          </table:table-cell>
          <table:table-cell table:style-name="ce5"/>
          <table:table-cell office:value-type="float" office:value="6.5" table:style-name="ce6">
            <text:p><text:s/>6,50<text:s/></text:p>
          </table:table-cell>
          <table:table-cell office:value-type="float" office:value="373" table:style-name="ce6">
            <text:p><text:s/>37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251</text:p>
          </table:table-cell>
          <table:table-cell office:value-type="string" table:style-name="ce3">
            <text:p>CONJ. TRAVA DE SEGURANCA C/ ALARM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08.90.90</text:p>
          </table:table-cell>
          <table:table-cell office:value-type="string" table:style-name="ce3">
            <text:p>789900561383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900" table:style-name="ce4">
            <text:p><text:s/>3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006</text:p>
          </table:table-cell>
          <table:table-cell office:value-type="string" table:style-name="ce5">
            <text:p>CONJUNTO ANEL ORING PARA CASCATA ANGEL / 01 E 03 QUEDA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1388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8" table:style-name="ce6">
            <text:p><text:s/>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804</text:p>
          </table:table-cell>
          <table:table-cell office:value-type="string" table:style-name="ce3">
            <text:p>CONJUNTO CANOPLA DUCHA PAINE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350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10" table:style-name="ce4">
            <text:p><text:s/>1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616</text:p>
          </table:table-cell>
          <table:table-cell office:value-type="string" table:style-name="ce5">
            <text:p>CONJUNTO DE ANEIS VEDACAO DOS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1653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5" table:style-name="ce6">
            <text:p><text:s/>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005</text:p>
          </table:table-cell>
          <table:table-cell office:value-type="string" table:style-name="ce3">
            <text:p>CONJUNTO DE ANEL ORING PARA CASCATA LINHA PRATI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21371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4" table:style-name="ce4">
            <text:p><text:s/>1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110</text:p>
          </table:table-cell>
          <table:table-cell office:value-type="string" table:style-name="ce5">
            <text:p>CONJUNTO DE ANEL ORING PARA SUV / DUCH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6643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34.35" table:style-name="ce6">
            <text:p><text:s/>34,3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5997</text:p>
          </table:table-cell>
          <table:table-cell office:value-type="string" table:style-name="ce3">
            <text:p>CONJUNTO ETIQUETAS COMPACT LINE INOX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0.20.19</text:p>
          </table:table-cell>
          <table:table-cell office:value-type="string" table:style-name="ce3">
            <text:p>7899005614908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81" table:style-name="ce4">
            <text:p><text:s/>8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664</text:p>
          </table:table-cell>
          <table:table-cell office:value-type="string" table:style-name="ce5">
            <text:p>CONJUNTO FRONTAL PARA HIDROSUCCAO CROMAD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689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9.7" table:style-name="ce6">
            <text:p><text:s/>29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402</text:p>
          </table:table-cell>
          <table:table-cell office:value-type="string" table:style-name="ce3">
            <text:p>CONJUNTO GABINETE SD 60/80 C/ 04 PC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40.90</text:p>
          </table:table-cell>
          <table:table-cell table:style-name="ce3"/>
          <table:table-cell office:value-type="float" office:value="0" table:style-name="ce4">
            <text:p><text:s/>-<text:s/></text:p>
          </table:table-cell>
          <table:table-cell office:value-type="float" office:value="2935.27" table:style-name="ce4">
            <text:p><text:s/>2.935,2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46</text:p>
          </table:table-cell>
          <table:table-cell office:value-type="string" table:style-name="ce5">
            <text:p>CONJUNTO INSTALACAO CABO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07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70" table:style-name="ce6">
            <text:p><text:s/>70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28</text:p>
          </table:table-cell>
          <table:table-cell office:value-type="string" table:style-name="ce3">
            <text:p>CONJUNTO INSTALACAO CABO ROBO LIMPADOR AUTOMATICO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89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" table:style-name="ce4">
            <text:p><text:s/>85,00<text:s/></text:p>
          </table:table-cell>
          <table:table-cell office:value-type="float" office:value="10" table:formula="of:=IFERROR(VLOOKUP([.A:.A];['SB1'.B:.G];6;FALSE);&quot;&quot;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054</text:p>
          </table:table-cell>
          <table:table-cell office:value-type="string" table:style-name="ce5">
            <text:p>CONJUNTO LED 4,3W CASCATA DE ACRILIC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2141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07" table:style-name="ce6">
            <text:p><text:s/>20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32</text:p>
          </table:table-cell>
          <table:table-cell office:value-type="string" table:style-name="ce3">
            <text:p>CONJUNTO PARAFUSO CARRO ROBO LIMPADOR AUTOMAT.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90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" table:style-name="ce4">
            <text:p><text:s/>25,00<text:s/></text:p>
          </table:table-cell>
          <table:table-cell office:value-type="float" office:value="18" table:formula="of:=IFERROR(VLOOKUP([.A:.A];['SB1'.B:.G];6;FALSE);&quot;&quot;)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007</text:p>
          </table:table-cell>
          <table:table-cell office:value-type="string" table:style-name="ce5">
            <text:p>CONJUNTO PARAFUSO PARA BASE CASCATA PRATIC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139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4" table:style-name="ce6">
            <text:p><text:s/>2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961</text:p>
          </table:table-cell>
          <table:table-cell office:value-type="string" table:style-name="ce3">
            <text:p>CONJUNTO PARAFUSO/ PORCA <text:s/>ENROLADOR <text:s/>(MOD 2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741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88.93" table:style-name="ce4">
            <text:p><text:s/>88,9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1498</text:p>
          </table:table-cell>
          <table:table-cell office:value-type="string" table:style-name="ce5">
            <text:p>CONJUNTO PLAST. TRAVA RAPIDA P/ CABOS DE 2A5 METRO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5227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8.6" table:style-name="ce6">
            <text:p><text:s/>28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435</text:p>
          </table:table-cell>
          <table:table-cell office:value-type="string" table:style-name="ce3">
            <text:p>CONJUNTO PLASTICO PARA CERCA / PORTA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45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3.6" table:style-name="ce4">
            <text:p><text:s/>43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4219</text:p>
          </table:table-cell>
          <table:table-cell office:value-type="string" table:style-name="ce5">
            <text:p>CONJUNTO PONTEIRA DO DEGRAU DA ESCADA CONFORT DE 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6827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28.69999999999999" table:style-name="ce6">
            <text:p><text:s/>128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973</text:p>
          </table:table-cell>
          <table:table-cell office:value-type="string" table:style-name="ce3">
            <text:p>CONJUNTO RETIFICADOR - FOUR FIX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2204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77.8" table:style-name="ce4">
            <text:p><text:s/>377,8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663</text:p>
          </table:table-cell>
          <table:table-cell office:value-type="string" table:style-name="ce5">
            <text:p>CONJUNTO TAMPA DR 1.1/2 (TAMPA INOX/04 FUROS/PARAFUSO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375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5.659999999999997" table:style-name="ce6">
            <text:p><text:s/>35,6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109</text:p>
          </table:table-cell>
          <table:table-cell office:value-type="string" table:style-name="ce3">
            <text:p>CONTADOR ELETROMECANICO PARA SUV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6636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554.95000000000005" table:style-name="ce4">
            <text:p><text:s/>554,9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303</text:p>
          </table:table-cell>
          <table:table-cell office:value-type="string" table:style-name="ce5">
            <text:p>CONTATOR 25A/220V TRI P/ SD/TH 60 A 1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2954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59" table:style-name="ce6">
            <text:p><text:s/>35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304</text:p>
          </table:table-cell>
          <table:table-cell office:value-type="string" table:style-name="ce3">
            <text:p>CONTATOR 32A/220V BI P/ SD/TH 25 A 13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2955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33" table:style-name="ce4">
            <text:p><text:s/>33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765</text:p>
          </table:table-cell>
          <table:table-cell office:value-type="string" table:style-name="ce5">
            <text:p>CONTATOR BIPOLAR 25A EM AC8A 24V 50/60 HZ (RP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2845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43" table:style-name="ce6">
            <text:p><text:s/>3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931</text:p>
          </table:table-cell>
          <table:table-cell office:value-type="string" table:style-name="ce3">
            <text:p>CONTATOR BIPOLAR 32A EM AC8A 24V 50/60 HZ <text:s/>(RP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2844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85" table:style-name="ce4">
            <text:p><text:s/>48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64</text:p>
          </table:table-cell>
          <table:table-cell office:value-type="string" table:style-name="ce5">
            <text:p>CONTATOR DE 12 AMPERES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6322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16.69" table:style-name="ce6">
            <text:p><text:s/>216,6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51</text:p>
          </table:table-cell>
          <table:table-cell office:value-type="string" table:style-name="ce3">
            <text:p>CONTATOR DE 18 AMPERE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779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67" table:style-name="ce4">
            <text:p><text:s/>16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65</text:p>
          </table:table-cell>
          <table:table-cell office:value-type="string" table:style-name="ce5">
            <text:p>CONTATOR DE 18 AMPERES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6339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70.88" table:style-name="ce6">
            <text:p><text:s/>270,8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598</text:p>
          </table:table-cell>
          <table:table-cell office:value-type="string" table:style-name="ce3">
            <text:p>CONTATOR DE 25 AMPERES <text:s/>PARA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611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41" table:style-name="ce4">
            <text:p><text:s/>34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66</text:p>
          </table:table-cell>
          <table:table-cell office:value-type="string" table:style-name="ce5">
            <text:p>CONTATOR DE 32 AMPERES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634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532.49" table:style-name="ce6">
            <text:p><text:s/>532,4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33</text:p>
          </table:table-cell>
          <table:table-cell office:value-type="string" table:style-name="ce3">
            <text:p>CONTATOR DE 60 AMPERE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574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62" table:style-name="ce4">
            <text:p><text:s/>76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34</text:p>
          </table:table-cell>
          <table:table-cell office:value-type="string" table:style-name="ce5">
            <text:p>CONTATOR DE 80 AMPERE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575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73" table:style-name="ce6">
            <text:p><text:s/>67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89</text:p>
          </table:table-cell>
          <table:table-cell office:value-type="string" table:style-name="ce3">
            <text:p>CONTATOR PARA QUADRO SMART 18 AMPERE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639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92.91" table:style-name="ce4">
            <text:p><text:s/>192,91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930</text:p>
          </table:table-cell>
          <table:table-cell office:value-type="string" table:style-name="ce5">
            <text:p>CONTATOR TRIPOLAR 25A EM AC8A 24V 50/60 HZ (RP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2843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41" table:style-name="ce6">
            <text:p><text:s/>34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771</text:p>
          </table:table-cell>
          <table:table-cell office:value-type="string" table:style-name="ce3">
            <text:p>CONTROLADOR <text:s/>DIGITAL TIV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32.90.99</text:p>
          </table:table-cell>
          <table:table-cell office:value-type="string" table:style-name="ce3">
            <text:p>789900563283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953" table:style-name="ce4">
            <text:p><text:s/>95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251</text:p>
          </table:table-cell>
          <table:table-cell office:value-type="string" table:style-name="ce5">
            <text:p>CONTROLADOR EST RGB WIFI TUYA CONT RE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4.40.21</text:p>
          </table:table-cell>
          <table:table-cell office:value-type="string" table:style-name="ce5">
            <text:p>7899005632414</text:p>
          </table:table-cell>
          <table:table-cell office:value-type="float" office:value="3.75" table:style-name="ce6">
            <text:p><text:s/>3,75<text:s/></text:p>
          </table:table-cell>
          <table:table-cell office:value-type="float" office:value="275" table:style-name="ce6">
            <text:p><text:s/>27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920</text:p>
          </table:table-cell>
          <table:table-cell office:value-type="string" table:style-name="ce3">
            <text:p>CONTROLADOR TOUCH DE TEMPERATUR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32.89.82</text:p>
          </table:table-cell>
          <table:table-cell office:value-type="string" table:style-name="ce3">
            <text:p>789900563124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166" table:style-name="ce4">
            <text:p><text:s/>1.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4972</text:p>
          </table:table-cell>
          <table:table-cell office:value-type="string" table:style-name="ce5">
            <text:p>CONTROLADOR WIFI P/ FOUR FIX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2203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55.57" table:style-name="ce6">
            <text:p><text:s/>455,5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61</text:p>
          </table:table-cell>
          <table:table-cell office:value-type="string" table:style-name="ce3">
            <text:p>CONTROLE CDT DIGITAL TEMPERATURA P/ AQUECIMENTO SOLAR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90.90</text:p>
          </table:table-cell>
          <table:table-cell office:value-type="string" table:style-name="ce3">
            <text:p>789900561316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260" table:style-name="ce4">
            <text:p><text:s/>1.2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70</text:p>
          </table:table-cell>
          <table:table-cell office:value-type="string" table:style-name="ce5">
            <text:p>CONTROLE REMOTO APARELHO P/ FILTRAR PISCINA WAVE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1197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043" table:style-name="ce6">
            <text:p><text:s/>1.043,00<text:s/></text:p>
          </table:table-cell>
          <table:table-cell office:value-type="float" office:value="12" table:formula="of:=IFERROR(VLOOKUP([.A:.A];['SB1'.B:.G];6;FALSE);&quot;&quot;)" table:style-name="ce1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0139</text:p>
          </table:table-cell>
          <table:table-cell office:value-type="string" table:style-name="ce3">
            <text:p>CONTROLE REMOTO P/ MODULO TOUCH CX METALIC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32.10.90</text:p>
          </table:table-cell>
          <table:table-cell office:value-type="string" table:style-name="ce3">
            <text:p>7899005618128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63.17" table:style-name="ce4">
            <text:p><text:s/>463,1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568</text:p>
          </table:table-cell>
          <table:table-cell office:value-type="string" table:style-name="ce5">
            <text:p>CONTROLE REMOTO P/ MODULO TOUCH CX PLAST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032.10.90</text:p>
          </table:table-cell>
          <table:table-cell office:value-type="string" table:style-name="ce5">
            <text:p>7899005612355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99" table:style-name="ce6">
            <text:p><text:s/>39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889</text:p>
          </table:table-cell>
          <table:table-cell office:value-type="string" table:style-name="ce3">
            <text:p>CONVERSOR ESTATICO RGB LED C/ CONTROLE REMOT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4.40.21</text:p>
          </table:table-cell>
          <table:table-cell office:value-type="string" table:style-name="ce3">
            <text:p>7899005628677</text:p>
          </table:table-cell>
          <table:table-cell office:value-type="float" office:value="3.75" table:style-name="ce4">
            <text:p><text:s/>3,75<text:s/></text:p>
          </table:table-cell>
          <table:table-cell office:value-type="float" office:value="740.4" table:style-name="ce4">
            <text:p><text:s/>740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078</text:p>
          </table:table-cell>
          <table:table-cell office:value-type="string" table:style-name="ce5">
            <text:p>CORDA PARA RAIA C/ 26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604.10.00</text:p>
          </table:table-cell>
          <table:table-cell office:value-type="string" table:style-name="ce5">
            <text:p>789900561786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71" table:style-name="ce6">
            <text:p><text:s/>7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079</text:p>
          </table:table-cell>
          <table:table-cell office:value-type="string" table:style-name="ce3">
            <text:p>CORDA PARA RAIA C/ 51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5604.10.00</text:p>
          </table:table-cell>
          <table:table-cell office:value-type="string" table:style-name="ce3">
            <text:p>789900561787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" table:style-name="ce4">
            <text:p><text:s/>13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53</text:p>
          </table:table-cell>
          <table:table-cell office:value-type="string" table:style-name="ce5">
            <text:p>CORPO APARELHO P/ FILTRAR PISCINA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0145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567" table:style-name="ce6">
            <text:p><text:s/>567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23</text:p>
          </table:table-cell>
          <table:table-cell office:value-type="string" table:style-name="ce3">
            <text:p>CORPO APARELHO P/ FILTRAR PISCINA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842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320" table:style-name="ce4">
            <text:p><text:s/>320,00<text:s/></text:p>
          </table:table-cell>
          <table:table-cell office:value-type="float" office:value="6" table:formula="of:=IFERROR(VLOOKUP([.A:.A];['SB1'.B:.G];6;FALSE);&quot;&quot;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4307</text:p>
          </table:table-cell>
          <table:table-cell office:value-type="string" table:style-name="ce5">
            <text:p>CORPO C/ PE ENROLADOR DE CAP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468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81" table:style-name="ce6">
            <text:p><text:s/>18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872</text:p>
          </table:table-cell>
          <table:table-cell office:value-type="string" table:style-name="ce3">
            <text:p>CORPO CELULA GER DE CLORO SSC2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30.90</text:p>
          </table:table-cell>
          <table:table-cell office:value-type="string" table:style-name="ce3">
            <text:p>789900562875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" table:style-name="ce4">
            <text:p><text:s/>242,00<text:s/></text:p>
          </table:table-cell>
          <table:table-cell office:value-type="float" office:value="11" table:formula="of:=IFERROR(VLOOKUP([.A:.A];['SB1'.B:.G];6;FALSE);&quot;&quot;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4306</text:p>
          </table:table-cell>
          <table:table-cell office:value-type="string" table:style-name="ce5">
            <text:p>CORPO EM RODIZIO ENROLADOR DE CAP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150" table:style-name="ce6">
            <text:p><text:s/>1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197</text:p>
          </table:table-cell>
          <table:table-cell office:value-type="string" table:style-name="ce3">
            <text:p>CORPO GRADE 15X1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419.80.90</text:p>
          </table:table-cell>
          <table:table-cell office:value-type="string" table:style-name="ce3">
            <text:p>789900561445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71" table:style-name="ce4">
            <text:p><text:s/>17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199</text:p>
          </table:table-cell>
          <table:table-cell office:value-type="string" table:style-name="ce5">
            <text:p>CORPO GRADE 30X3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1800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12" table:style-name="ce6">
            <text:p><text:s/>61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278</text:p>
          </table:table-cell>
          <table:table-cell office:value-type="string" table:style-name="ce3">
            <text:p>CORPO UVC PLAST 35W UVC POWE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3703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495" table:style-name="ce4">
            <text:p><text:s/>4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79</text:p>
          </table:table-cell>
          <table:table-cell office:value-type="string" table:style-name="ce5">
            <text:p>CORPO UVC PLAST 55W UVC POWE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3710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660" table:style-name="ce6">
            <text:p><text:s/>6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280</text:p>
          </table:table-cell>
          <table:table-cell office:value-type="string" table:style-name="ce3">
            <text:p>CORPO UVC PLAST 95W UVC POWE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3727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660" table:style-name="ce4">
            <text:p><text:s/>6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10</text:p>
          </table:table-cell>
          <table:table-cell office:value-type="string" table:style-name="ce5">
            <text:p>CORREIA APARELHO PARA FILTRAR PISCINA MOD.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0688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214" table:style-name="ce6">
            <text:p><text:s/>21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37</text:p>
          </table:table-cell>
          <table:table-cell office:value-type="string" table:style-name="ce3">
            <text:p>CORREIA MAIOR P/ APARELHO PARA FILTRAR PISCINA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392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85" table:style-name="ce4">
            <text:p><text:s/>185,00<text:s/></text:p>
          </table:table-cell>
          <table:table-cell office:value-type="float" office:value="16" table:formula="of:=IFERROR(VLOOKUP([.A:.A];['SB1'.B:.G];6;FALSE);&quot;&quot;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5352</text:p>
          </table:table-cell>
          <table:table-cell office:value-type="string" table:style-name="ce5">
            <text:p>CORREIA MAIOR P/ ROBO LIMP. AUT. PISCINA RB6/WAVE/2X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974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07" table:style-name="ce6">
            <text:p><text:s/>207,00<text:s/></text:p>
          </table:table-cell>
          <table:table-cell office:value-type="float" office:value="51" table:formula="of:=IFERROR(VLOOKUP([.A:.A];['SB1'.B:.G];6;FALSE);&quot;&quot;)" table:style-name="ce1">
            <text:p>5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36</text:p>
          </table:table-cell>
          <table:table-cell office:value-type="string" table:style-name="ce3">
            <text:p>CORREIA MENOR P/ APARELHO PARA FILTRAR PISCINA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385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39" table:style-name="ce4">
            <text:p><text:s/>139,00<text:s/></text:p>
          </table:table-cell>
          <table:table-cell office:value-type="float" office:value="85" table:formula="of:=IFERROR(VLOOKUP([.A:.A];['SB1'.B:.G];6;FALSE);&quot;&quot;)" table:style-name="ce1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5335</text:p>
          </table:table-cell>
          <table:table-cell office:value-type="string" table:style-name="ce5">
            <text:p>CORREIA MENOR ROBO LIMPADOR AUT. PISCINA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3281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6" table:style-name="ce6">
            <text:p><text:s/>14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54</text:p>
          </table:table-cell>
          <table:table-cell office:value-type="string" table:style-name="ce3">
            <text:p>CORREIA P/ ROBO LIMPADOR AUTOMATICO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55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" table:style-name="ce4">
            <text:p><text:s/>156,00<text:s/></text:p>
          </table:table-cell>
          <table:table-cell office:value-type="float" office:value="14" table:formula="of:=IFERROR(VLOOKUP([.A:.A];['SB1'.B:.G];6;FALSE);&quot;&quot;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688</text:p>
          </table:table-cell>
          <table:table-cell office:value-type="string" table:style-name="ce5">
            <text:p>CORREIA PLASTICA ROBO AUTOMATICO 12 M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804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5" table:style-name="ce6">
            <text:p><text:s/>65,00<text:s/></text:p>
          </table:table-cell>
          <table:table-cell office:value-type="float" office:value="1" table:formula="of:=IFERROR(VLOOKUP([.A:.A];['SB1'.B:.G];6;FALSE);&quot;&quot;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0509</text:p>
          </table:table-cell>
          <table:table-cell office:value-type="string" table:style-name="ce3">
            <text:p>CORRIMAO ANGR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79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720" table:style-name="ce4">
            <text:p><text:s/>7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08</text:p>
          </table:table-cell>
          <table:table-cell office:value-type="string" table:style-name="ce5">
            <text:p>CORRIMAO ILHA BEL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789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860" table:style-name="ce6">
            <text:p><text:s/>8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10</text:p>
          </table:table-cell>
          <table:table-cell office:value-type="string" table:style-name="ce3">
            <text:p>CORRIMAO PARATI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80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560" table:style-name="ce4">
            <text:p><text:s/>5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709</text:p>
          </table:table-cell>
          <table:table-cell office:value-type="string" table:style-name="ce5">
            <text:p>CX PAP P/ GERADOR DE VAPOR 18 A 27KW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819.10.00</text:p>
          </table:table-cell>
          <table:table-cell office:value-type="string" table:style-name="ce5">
            <text:p>7899005633121</text:p>
          </table:table-cell>
          <table:table-cell office:value-type="float" office:value="15" table:style-name="ce6">
            <text:p><text:s/>15,00<text:s/></text:p>
          </table:table-cell>
          <table:table-cell office:value-type="float" office:value="110" table:style-name="ce6">
            <text:p><text:s/>1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708</text:p>
          </table:table-cell>
          <table:table-cell office:value-type="string" table:style-name="ce3">
            <text:p>CX PAP P/ GERADOR DE VAPOR 6 A 15KW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4819.10.00</text:p>
          </table:table-cell>
          <table:table-cell office:value-type="string" table:style-name="ce3">
            <text:p>7899005633114</text:p>
          </table:table-cell>
          <table:table-cell office:value-type="float" office:value="15" table:style-name="ce4">
            <text:p><text:s/>15,00<text:s/></text:p>
          </table:table-cell>
          <table:table-cell office:value-type="float" office:value="71" table:style-name="ce4">
            <text:p><text:s/>7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279</text:p>
          </table:table-cell>
          <table:table-cell office:value-type="string" table:style-name="ce5">
            <text:p>DA / RALO PRATIC 50 MM ALVENARIA C/ ARO INOX 316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825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18" table:style-name="ce6">
            <text:p><text:s/>1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325</text:p>
          </table:table-cell>
          <table:table-cell office:value-type="string" table:style-name="ce3">
            <text:p>DA 1 1/2 VINIL STD ABS/INOX 316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2461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8" table:style-name="ce4">
            <text:p><text:s/>5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64</text:p>
          </table:table-cell>
          <table:table-cell office:value-type="string" table:style-name="ce5">
            <text:p>DA ABS 1 1/2 C/ROSCA-INSERTO LATAO TOP LN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34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26" table:style-name="ce6">
            <text:p><text:s/>12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49</text:p>
          </table:table-cell>
          <table:table-cell office:value-type="string" table:style-name="ce3">
            <text:p>DA ABS 1 1/2 FIBRA FORT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19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5" table:style-name="ce4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40</text:p>
          </table:table-cell>
          <table:table-cell office:value-type="string" table:style-name="ce5">
            <text:p>DA ABS 1 1/2 ROSCA LATAO ALVENARI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10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1" table:style-name="ce6">
            <text:p><text:s/>8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54</text:p>
          </table:table-cell>
          <table:table-cell office:value-type="string" table:style-name="ce3">
            <text:p>DA ABS 1 1/2 ROSCA LATAO TRADICIONA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24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7" table:style-name="ce4">
            <text:p><text:s/>7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57</text:p>
          </table:table-cell>
          <table:table-cell office:value-type="string" table:style-name="ce5">
            <text:p>DA ABS 1 1/2 S/ROSCA-INSERTO LATAO STD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27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1" table:style-name="ce6">
            <text:p><text:s/>4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53</text:p>
          </table:table-cell>
          <table:table-cell office:value-type="string" table:style-name="ce3">
            <text:p>DA ABS 1 1/2 TRADICIONA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23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1" table:style-name="ce4">
            <text:p><text:s/>3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50</text:p>
          </table:table-cell>
          <table:table-cell office:value-type="string" table:style-name="ce5">
            <text:p>DA ABS ROSCA LATAO FIBRA FORTE CURT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20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0" table:style-name="ce6">
            <text:p><text:s/>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968</text:p>
          </table:table-cell>
          <table:table-cell office:value-type="string" table:style-name="ce3">
            <text:p>DA INOX PRATIC 50MM FLA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145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20" table:style-name="ce4">
            <text:p><text:s/>2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29</text:p>
          </table:table-cell>
          <table:table-cell office:value-type="string" table:style-name="ce5">
            <text:p>DA LATAO CROMADO 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0099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0" table:style-name="ce6">
            <text:p><text:s/>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482</text:p>
          </table:table-cell>
          <table:table-cell office:value-type="string" table:style-name="ce3">
            <text:p>DA PRATIC 50MM ALVENARIA COM ADAPTADOR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153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5" table:style-name="ce4">
            <text:p><text:s/>4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355</text:p>
          </table:table-cell>
          <table:table-cell office:value-type="string" table:style-name="ce5">
            <text:p>DA PRATIC 50MM ALVENARIA COM ROSCA LATA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405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96" table:style-name="ce6">
            <text:p><text:s/>9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2172</text:p>
          </table:table-cell>
          <table:table-cell office:value-type="string" table:style-name="ce3">
            <text:p>DA PRATIC P/ TUBO DE 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56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4" table:style-name="ce4">
            <text:p><text:s/>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427</text:p>
          </table:table-cell>
          <table:table-cell office:value-type="string" table:style-name="ce5">
            <text:p>DEGRAU INOX 316 DUPLO P/ESC CONFORT 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008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48" table:style-name="ce6">
            <text:p><text:s/>44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02</text:p>
          </table:table-cell>
          <table:table-cell office:value-type="string" table:style-name="ce3">
            <text:p>DEGRAU INOX ANAT P/ ESC 1 1/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72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40" table:style-name="ce4">
            <text:p><text:s/>1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112</text:p>
          </table:table-cell>
          <table:table-cell office:value-type="string" table:style-name="ce5">
            <text:p>DEGRAU INOX DE SEGURANCA <text:s/>1 1/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21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15.8" table:style-name="ce6">
            <text:p><text:s/>415,8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113</text:p>
          </table:table-cell>
          <table:table-cell office:value-type="string" table:style-name="ce3">
            <text:p>DEGRAU INOX DUPLO P/ ESC CONF 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22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04.8" table:style-name="ce4">
            <text:p><text:s/>404,8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00</text:p>
          </table:table-cell>
          <table:table-cell office:value-type="string" table:style-name="ce5">
            <text:p>DEGRAU PLASTICO ANAT P/ ESC 1 1/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070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63" table:style-name="ce6">
            <text:p><text:s/>6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894</text:p>
          </table:table-cell>
          <table:table-cell office:value-type="string" table:style-name="ce3">
            <text:p>DEGRAU PLASTICO PARA ESCADA DE 2 POLEGADA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859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68.3" table:style-name="ce4">
            <text:p><text:s/>168,3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261</text:p>
          </table:table-cell>
          <table:table-cell office:value-type="string" table:style-name="ce5">
            <text:p>DEGRAU RETO ESC CONFORT HOME 1 1/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2032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18" table:style-name="ce6">
            <text:p><text:s/>1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695</text:p>
          </table:table-cell>
          <table:table-cell office:value-type="string" table:style-name="ce3">
            <text:p>DHM 04 MINI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446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15" table:style-name="ce4">
            <text:p><text:s/>41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327</text:p>
          </table:table-cell>
          <table:table-cell office:value-type="string" table:style-name="ce5">
            <text:p>DHM 1 1/2 VINIL STD ABS/INOX 316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463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6" table:style-name="ce6">
            <text:p><text:s/>8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33</text:p>
          </table:table-cell>
          <table:table-cell office:value-type="string" table:style-name="ce3">
            <text:p>DHM BRANCO 1 1/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03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9" table:style-name="ce4">
            <text:p><text:s/>4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31</text:p>
          </table:table-cell>
          <table:table-cell office:value-type="string" table:style-name="ce5">
            <text:p>DHM CROMADO 1 1/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01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7" table:style-name="ce6">
            <text:p><text:s/>6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004</text:p>
          </table:table-cell>
          <table:table-cell office:value-type="string" table:style-name="ce3">
            <text:p>DHM INOX PRATIC 50MM FLA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1463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70" table:style-name="ce4">
            <text:p><text:s/>2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307</text:p>
          </table:table-cell>
          <table:table-cell office:value-type="string" table:style-name="ce5">
            <text:p>DHM LATA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0821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83.4" table:style-name="ce6">
            <text:p><text:s/>183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484</text:p>
          </table:table-cell>
          <table:table-cell office:value-type="string" table:style-name="ce3">
            <text:p>DHM LATAO 50M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419.80.90</text:p>
          </table:table-cell>
          <table:table-cell office:value-type="string" table:style-name="ce3">
            <text:p>789900561376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83.4" table:style-name="ce4">
            <text:p><text:s/>183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43</text:p>
          </table:table-cell>
          <table:table-cell office:value-type="string" table:style-name="ce5">
            <text:p>DHM PRATIC ABS / INOX 1.1/2 POL.P/ TUBO DIA.50 M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274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9" table:style-name="ce6">
            <text:p><text:s/>7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2174</text:p>
          </table:table-cell>
          <table:table-cell office:value-type="string" table:style-name="ce3">
            <text:p>DHM PRATIC ABS / INOX 1.1/2 POL.P/ TUBO DIA.60 M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58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08" table:style-name="ce4">
            <text:p><text:s/>10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292</text:p>
          </table:table-cell>
          <table:table-cell office:value-type="string" table:style-name="ce5">
            <text:p>DHM PRATIC SL (SAIDA LATERAL) 50M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334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9" table:style-name="ce6">
            <text:p><text:s/>7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66</text:p>
          </table:table-cell>
          <table:table-cell office:value-type="string" table:style-name="ce3">
            <text:p>DHM VINIL 1.1/2 C/INSERTO LATAO TOP LN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36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0" table:style-name="ce4">
            <text:p><text:s/>1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59</text:p>
          </table:table-cell>
          <table:table-cell office:value-type="string" table:style-name="ce5">
            <text:p>DHM1 1/2 S/ROSCA-INSERTO LATAO STD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29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2" table:style-name="ce6">
            <text:p><text:s/>7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87</text:p>
          </table:table-cell>
          <table:table-cell office:value-type="string" table:style-name="ce3">
            <text:p>DIRECIONADOR C FIXADOR DR PRATIC 50MM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778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3" table:style-name="ce4">
            <text:p><text:s/>1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1926</text:p>
          </table:table-cell>
          <table:table-cell office:value-type="string" table:style-name="ce5">
            <text:p>DIRECIONADOR C/ FIXADOR DR PREMIUM DIA. 50MM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914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9" table:style-name="ce6">
            <text:p><text:s/>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92</text:p>
          </table:table-cell>
          <table:table-cell office:value-type="string" table:style-name="ce3">
            <text:p>DIRECIONADOR INFERIOR TAMPA BYPASS LATERAL DIR. ROBO RB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52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2" table:style-name="ce4">
            <text:p><text:s/>82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5203</text:p>
          </table:table-cell>
          <table:table-cell office:value-type="string" table:style-name="ce5">
            <text:p>DIRECIONADOR PLAST. P/ DHM BRANCO COM 2 EUTEX (0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0542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9.5299999999999994" table:style-name="ce6">
            <text:p><text:s/>9,5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86</text:p>
          </table:table-cell>
          <table:table-cell office:value-type="string" table:style-name="ce3">
            <text:p>DISCO RODA ROLAMENTO RODA ROBO LIMPADOR AUTOMATICO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20466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7" table:style-name="ce4">
            <text:p><text:s/>7,00<text:s/></text:p>
          </table:table-cell>
          <table:table-cell office:value-type="float" office:value="23" table:formula="of:=IFERROR(VLOOKUP([.A:.A];['SB1'.B:.G];6;FALSE);&quot;&quot;)" table:style-name="ce1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4548</text:p>
          </table:table-cell>
          <table:table-cell office:value-type="string" table:style-name="ce5">
            <text:p>DISP ASPIRACAO ITC ROSCA 1 1/2 BRANCO FIB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999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4" table:style-name="ce6">
            <text:p><text:s/>3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49</text:p>
          </table:table-cell>
          <table:table-cell office:value-type="string" table:style-name="ce3">
            <text:p>DISP ASPIRACAO ITC ROSCA 1 1/2 INOX FIBR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000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0" table:style-name="ce4">
            <text:p><text:s/>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429</text:p>
          </table:table-cell>
          <table:table-cell office:value-type="string" table:style-name="ce5">
            <text:p>DISP DHM VINIL C PROLONGADOR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493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6" table:style-name="ce6">
            <text:p><text:s/>8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28</text:p>
          </table:table-cell>
          <table:table-cell office:value-type="string" table:style-name="ce3">
            <text:p>DISP DHM VINIL COM PROLONGADOR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492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2" table:style-name="ce4">
            <text:p><text:s/>7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52</text:p>
          </table:table-cell>
          <table:table-cell office:value-type="string" table:style-name="ce5">
            <text:p>DISP HIDROMASSAGEM ITC BRANCO FIB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003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8" table:style-name="ce6">
            <text:p><text:s/>5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53</text:p>
          </table:table-cell>
          <table:table-cell office:value-type="string" table:style-name="ce3">
            <text:p>DISP HIDROMASSAGEM ITC INOX FIBR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004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8" table:style-name="ce4">
            <text:p><text:s/>7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46</text:p>
          </table:table-cell>
          <table:table-cell office:value-type="string" table:style-name="ce5">
            <text:p>DISP RETORNO ITC BRANCO FIB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997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8" table:style-name="ce6">
            <text:p><text:s/>3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47</text:p>
          </table:table-cell>
          <table:table-cell office:value-type="string" table:style-name="ce3">
            <text:p>DISP RETORNO ITC INOX FIBR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2998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6" table:style-name="ce4">
            <text:p><text:s/>5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735</text:p>
          </table:table-cell>
          <table:table-cell office:value-type="string" table:style-name="ce5">
            <text:p>DISPLAY DE MESA</text:p>
          </table:table-cell>
          <table:table-cell office:value-type="string" table:style-name="ce5">
            <text:p>MC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910.00.00</text:p>
          </table:table-cell>
          <table:table-cell table:style-name="ce5"/>
          <table:table-cell office:value-type="float" office:value="6.5" table:style-name="ce6">
            <text:p><text:s/>6,50<text:s/></text:p>
          </table:table-cell>
          <table:table-cell office:value-type="float" office:value="8.0399999999999991" table:style-name="ce6">
            <text:p><text:s/>8,0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185</text:p>
          </table:table-cell>
          <table:table-cell office:value-type="string" table:style-name="ce3">
            <text:p>DISPLAY DE MESA EM 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0.30.00</text:p>
          </table:table-cell>
          <table:table-cell office:value-type="string" table:style-name="ce3">
            <text:p>789900562915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" table:style-name="ce4">
            <text:p><text:s/>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940</text:p>
          </table:table-cell>
          <table:table-cell office:value-type="string" table:style-name="ce5">
            <text:p>DISPOSITIVO AIR BLOWER PRATIC 20MM A.INOX 316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912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98" table:style-name="ce6">
            <text:p><text:s/>9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217</text:p>
          </table:table-cell>
          <table:table-cell office:value-type="string" table:style-name="ce3">
            <text:p>DISPOSITIVO PROTECAO SURTO 275VAC CLASSE I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20.00</text:p>
          </table:table-cell>
          <table:table-cell office:value-type="string" table:style-name="ce3">
            <text:p>789900561923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92" table:style-name="ce4">
            <text:p><text:s/>19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218</text:p>
          </table:table-cell>
          <table:table-cell office:value-type="string" table:style-name="ce5">
            <text:p>DISPOSITIVO RESIDUAL DE SEG 25A 30M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20.00</text:p>
          </table:table-cell>
          <table:table-cell office:value-type="string" table:style-name="ce5">
            <text:p>789900561924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280" table:style-name="ce6">
            <text:p><text:s/>2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51</text:p>
          </table:table-cell>
          <table:table-cell office:value-type="string" table:style-name="ce3">
            <text:p>DOSADOR DE CLORO 2,0 KG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79.89.12</text:p>
          </table:table-cell>
          <table:table-cell office:value-type="string" table:style-name="ce3">
            <text:p>789900560021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" table:style-name="ce4">
            <text:p><text:s/>30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1041</text:p>
          </table:table-cell>
          <table:table-cell office:value-type="string" table:style-name="ce5">
            <text:p>DOSADOR DE CLORO 4,0 KG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89.12</text:p>
          </table:table-cell>
          <table:table-cell office:value-type="string" table:style-name="ce5">
            <text:p>789900561851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73" table:style-name="ce6">
            <text:p><text:s/>47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63</text:p>
          </table:table-cell>
          <table:table-cell office:value-type="string" table:style-name="ce3">
            <text:p>DOSADOR FLUTUANTE C/ CEST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79.89.12</text:p>
          </table:table-cell>
          <table:table-cell office:value-type="string" table:style-name="ce3">
            <text:p>789900561328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9" table:style-name="ce4">
            <text:p><text:s/>6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073</text:p>
          </table:table-cell>
          <table:table-cell office:value-type="string" table:style-name="ce5">
            <text:p>DOSADOR FLUTUANTE C/ TERMOMETR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89.12</text:p>
          </table:table-cell>
          <table:table-cell office:value-type="string" table:style-name="ce5">
            <text:p>789900561772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3" table:style-name="ce6">
            <text:p><text:s/>9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646</text:p>
          </table:table-cell>
          <table:table-cell office:value-type="string" table:style-name="ce3">
            <text:p>DOSADOR FLUTUANTE MINI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89.12</text:p>
          </table:table-cell>
          <table:table-cell office:value-type="string" table:style-name="ce3">
            <text:p>789900561422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" table:style-name="ce4">
            <text:p><text:s/>3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645</text:p>
          </table:table-cell>
          <table:table-cell office:value-type="string" table:style-name="ce5">
            <text:p>DOSADOR FLUTUANTE TELESCOP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89.12</text:p>
          </table:table-cell>
          <table:table-cell office:value-type="string" table:style-name="ce5">
            <text:p>789900561421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0" table:style-name="ce6">
            <text:p><text:s/>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326</text:p>
          </table:table-cell>
          <table:table-cell office:value-type="string" table:style-name="ce3">
            <text:p>DR 1 1/2 VINIL STD ABS/INOX 316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2462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8" table:style-name="ce4">
            <text:p><text:s/>5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41</text:p>
          </table:table-cell>
          <table:table-cell office:value-type="string" table:style-name="ce5">
            <text:p>DR ABS 1 1/2 ALVENARI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11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6" table:style-name="ce6">
            <text:p><text:s/>2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65</text:p>
          </table:table-cell>
          <table:table-cell office:value-type="string" table:style-name="ce3">
            <text:p>DR ABS 1 1/2 C/INSERTO LATAO TOP LN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35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9" table:style-name="ce4">
            <text:p><text:s/>7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51</text:p>
          </table:table-cell>
          <table:table-cell office:value-type="string" table:style-name="ce5">
            <text:p>DR ABS 1 1/2 FIBRA FORTE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21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5" table:style-name="ce6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58</text:p>
          </table:table-cell>
          <table:table-cell office:value-type="string" table:style-name="ce3">
            <text:p>DR ABS 1 1/2 S/ROSCA-INSERTO LATAO STD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28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1" table:style-name="ce4">
            <text:p><text:s/>4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55</text:p>
          </table:table-cell>
          <table:table-cell office:value-type="string" table:style-name="ce5">
            <text:p>DR ABS 1 1/2 TRADICIONA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25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1" table:style-name="ce6">
            <text:p><text:s/>3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967</text:p>
          </table:table-cell>
          <table:table-cell office:value-type="string" table:style-name="ce3">
            <text:p>DR INOX PRATIC 50MM FLA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144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30" table:style-name="ce4">
            <text:p><text:s/>2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30</text:p>
          </table:table-cell>
          <table:table-cell office:value-type="string" table:style-name="ce5">
            <text:p>DR LATAO INOX 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0100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90" table:style-name="ce6">
            <text:p><text:s/>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278</text:p>
          </table:table-cell>
          <table:table-cell office:value-type="string" table:style-name="ce3">
            <text:p>DR PRATIC 50 MM ALVENARIA C/ ARO INOX 316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2824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5" table:style-name="ce4">
            <text:p><text:s/>5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483</text:p>
          </table:table-cell>
          <table:table-cell office:value-type="string" table:style-name="ce5">
            <text:p>DR PRATIC 50MM ALVENARI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154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5" table:style-name="ce6">
            <text:p><text:s/>4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2173</text:p>
          </table:table-cell>
          <table:table-cell office:value-type="string" table:style-name="ce3">
            <text:p>DR PRATIC P/ TUBO DE 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57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4" table:style-name="ce4">
            <text:p><text:s/>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478</text:p>
          </table:table-cell>
          <table:table-cell office:value-type="string" table:style-name="ce5">
            <text:p>DRENO 10/50 CINZA P/ PISCINA VINI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026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5" table:style-name="ce6">
            <text:p><text:s/>5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477</text:p>
          </table:table-cell>
          <table:table-cell office:value-type="string" table:style-name="ce3">
            <text:p>DRENO 10/50 CINZA PISCINA FIBRA E ALVENARI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025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62" table:style-name="ce4">
            <text:p><text:s/>6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29</text:p>
          </table:table-cell>
          <table:table-cell office:value-type="string" table:style-name="ce5">
            <text:p>DRENO 10/50 P/ PISCINA FIBRA E ALVENARI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148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2" table:style-name="ce6">
            <text:p><text:s/>6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930</text:p>
          </table:table-cell>
          <table:table-cell office:value-type="string" table:style-name="ce3">
            <text:p>DRENO 10/50 P/ PISCINA VINI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2149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4" table:style-name="ce4">
            <text:p><text:s/>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66</text:p>
          </table:table-cell>
          <table:table-cell office:value-type="string" table:style-name="ce5">
            <text:p>DRENO 15X15 LATAO QUADRADO X 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2152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64" table:style-name="ce6">
            <text:p><text:s/>56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34</text:p>
          </table:table-cell>
          <table:table-cell office:value-type="string" table:style-name="ce3">
            <text:p>DRENO REDONDO LATAO X 1 1/2 C/ TAMPA FSB PRAT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419.80.90</text:p>
          </table:table-cell>
          <table:table-cell office:value-type="string" table:style-name="ce3">
            <text:p>789900560104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60" table:style-name="ce4">
            <text:p><text:s/>7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35</text:p>
          </table:table-cell>
          <table:table-cell office:value-type="string" table:style-name="ce5">
            <text:p>DRENO REDONDO LATAO X 2 POL.C/ TAMPA FSB PRAT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0105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60" table:style-name="ce6">
            <text:p><text:s/>7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1140</text:p>
          </table:table-cell>
          <table:table-cell office:value-type="string" table:style-name="ce3">
            <text:p>DRENO STANDARD C/ TAMPA FSB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01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93" table:style-name="ce4">
            <text:p><text:s/>19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1112</text:p>
          </table:table-cell>
          <table:table-cell office:value-type="string" table:style-name="ce5">
            <text:p>DRENO TOP LINE C/ TAMPA FSB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002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73" table:style-name="ce6">
            <text:p><text:s/>27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828</text:p>
          </table:table-cell>
          <table:table-cell office:value-type="string" table:style-name="ce3">
            <text:p>DRIVER FOUR FIX WI FI 150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32988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300" table:style-name="ce4">
            <text:p><text:s/>1.3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127</text:p>
          </table:table-cell>
          <table:table-cell office:value-type="string" table:style-name="ce5">
            <text:p>DRIVER FOUR FIX WI FI 300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24341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890" table:style-name="ce6">
            <text:p><text:s/>8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73</text:p>
          </table:table-cell>
          <table:table-cell office:value-type="string" table:style-name="ce3">
            <text:p>DRIVER FOUR FIX WI FI 60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1790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927" table:style-name="ce4">
            <text:p><text:s/>92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1151</text:p>
          </table:table-cell>
          <table:table-cell office:value-type="string" table:style-name="ce5">
            <text:p>DRIVER FOUR FIX WI FI 81W ( 50HZ )-EXPORTACA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1855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200" table:style-name="ce6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221</text:p>
          </table:table-cell>
          <table:table-cell office:value-type="string" table:style-name="ce3">
            <text:p>DRIVER REPETIDOR DE POTENCIA 300W (S/TR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1385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600" table:style-name="ce4">
            <text:p><text:s/>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821</text:p>
          </table:table-cell>
          <table:table-cell office:value-type="string" table:style-name="ce5">
            <text:p>DRIVER TOUCH 81W (50HZ )- EXPORTACA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13451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200" table:style-name="ce6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904</text:p>
          </table:table-cell>
          <table:table-cell office:value-type="string" table:style-name="ce3">
            <text:p>DRIVER TOUCH 81W C/ TRANSF E CONT REMOT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1384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950" table:style-name="ce4">
            <text:p><text:s/>9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781</text:p>
          </table:table-cell>
          <table:table-cell office:value-type="string" table:style-name="ce5">
            <text:p>DUCHA CASCATA DE 12 POL. ALUMINO CANO 3/4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0350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80" table:style-name="ce6">
            <text:p><text:s/>2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779</text:p>
          </table:table-cell>
          <table:table-cell office:value-type="string" table:style-name="ce3">
            <text:p>DUCHA CASCATA DE 8 POL. ALUMINIO CANO 3/4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16.99.00</text:p>
          </table:table-cell>
          <table:table-cell office:value-type="string" table:style-name="ce3">
            <text:p>789900560348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30" table:style-name="ce4">
            <text:p><text:s/>2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41</text:p>
          </table:table-cell>
          <table:table-cell office:value-type="string" table:style-name="ce5">
            <text:p>EIXO DA RODA P/ ROBO LIMPADOR AUTOMATICO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439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345" table:style-name="ce6">
            <text:p><text:s/>345,00<text:s/></text:p>
          </table:table-cell>
          <table:table-cell office:value-type="float" office:value="1" table:formula="of:=IFERROR(VLOOKUP([.A:.A];['SB1'.B:.G];6;FALSE);&quot;&quot;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70</text:p>
          </table:table-cell>
          <table:table-cell office:value-type="string" table:style-name="ce3">
            <text:p>EIXO INTERNO DA RODA P/ ROBO LIMPADOR AUT WAVE 1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71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" table:style-name="ce4">
            <text:p><text:s/>212,00<text:s/></text:p>
          </table:table-cell>
          <table:table-cell office:value-type="float" office:value="15" table:formula="of:=IFERROR(VLOOKUP([.A:.A];['SB1'.B:.G];6;FALSE);&quot;&quot;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242</text:p>
          </table:table-cell>
          <table:table-cell office:value-type="string" table:style-name="ce5">
            <text:p>EIXO INTERNO DA RODA P/ ROBO LIMPADOR AUTOMATICO <text:s/>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446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22" table:style-name="ce6">
            <text:p><text:s/>22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66</text:p>
          </table:table-cell>
          <table:table-cell office:value-type="string" table:style-name="ce3">
            <text:p>EIXO P/ ROBO LIMPADOR AUTOMATICO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67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5" table:style-name="ce4">
            <text:p><text:s/>345,00<text:s/></text:p>
          </table:table-cell>
          <table:table-cell office:value-type="float" office:value="18" table:formula="of:=IFERROR(VLOOKUP([.A:.A];['SB1'.B:.G];6;FALSE);&quot;&quot;)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5580</text:p>
          </table:table-cell>
          <table:table-cell office:value-type="string" table:style-name="ce5">
            <text:p>EIXO PLAST. PORTINHOLA C/ EIXO SKIMMER COMPACT (06 PC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970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2.54" table:style-name="ce6">
            <text:p><text:s/>12,5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230</text:p>
          </table:table-cell>
          <table:table-cell office:value-type="string" table:style-name="ce3">
            <text:p>EIXO PLASTICO DA PORTINHOLA BL/BP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969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2.54" table:style-name="ce4">
            <text:p><text:s/>12,5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50</text:p>
          </table:table-cell>
          <table:table-cell office:value-type="string" table:style-name="ce5">
            <text:p>EMC MOTOR <text:s/>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11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259" table:style-name="ce6">
            <text:p><text:s/>1.259,00<text:s/></text:p>
          </table:table-cell>
          <table:table-cell office:value-type="float" office:value="14" table:formula="of:=IFERROR(VLOOKUP([.A:.A];['SB1'.B:.G];6;FALSE);&quot;&quot;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31</text:p>
          </table:table-cell>
          <table:table-cell office:value-type="string" table:style-name="ce3">
            <text:p>ENCAIXE PERFIL CARRO ROBO LIMPADOR AUTOMATICO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89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" table:style-name="ce4">
            <text:p><text:s/>15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734</text:p>
          </table:table-cell>
          <table:table-cell office:value-type="string" table:style-name="ce5">
            <text:p>ENCAIXE+ PERFIL CARRO ROB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92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3" table:style-name="ce6">
            <text:p><text:s/>9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770</text:p>
          </table:table-cell>
          <table:table-cell office:value-type="string" table:style-name="ce3">
            <text:p>ENCOSTO REGULAVE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4421.99.00</text:p>
          </table:table-cell>
          <table:table-cell office:value-type="string" table:style-name="ce3">
            <text:p>789900560339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0" table:style-name="ce4">
            <text:p><text:s/>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64</text:p>
          </table:table-cell>
          <table:table-cell office:value-type="string" table:style-name="ce5">
            <text:p>ENGATE PLAST. MULTI-GIRATORI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0345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4.53" table:style-name="ce6">
            <text:p><text:s/>14,5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57</text:p>
          </table:table-cell>
          <table:table-cell office:value-type="string" table:style-name="ce3">
            <text:p>ENGRENAGEM DA ESCOVA ATIVA P/ROBO LIMPADOR AUT.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58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" table:style-name="ce4">
            <text:p><text:s/>10,00<text:s/></text:p>
          </table:table-cell>
          <table:table-cell office:value-type="float" office:value="8" table:formula="of:=IFERROR(VLOOKUP([.A:.A];['SB1'.B:.G];6;FALSE);&quot;&quot;)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243</text:p>
          </table:table-cell>
          <table:table-cell office:value-type="string" table:style-name="ce5">
            <text:p>ENGRENAGEM DA RODA P/ ROBO LIMPADOR AUTOMATICO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453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55" table:style-name="ce6">
            <text:p><text:s/>155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53</text:p>
          </table:table-cell>
          <table:table-cell office:value-type="string" table:style-name="ce3">
            <text:p>ENGRENAGEM P/ FILTRO LIMPADOR AUTOMATICO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54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" table:style-name="ce4">
            <text:p><text:s/>9,00<text:s/></text:p>
          </table:table-cell>
          <table:table-cell office:value-type="float" office:value="48" table:formula="of:=IFERROR(VLOOKUP([.A:.A];['SB1'.B:.G];6;FALSE);&quot;&quot;)" table:style-name="ce1">
            <text:p>4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15478</text:p>
          </table:table-cell>
          <table:table-cell office:value-type="string" table:style-name="ce5">
            <text:p>ENROLADOR CAPA BASE ACO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69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294" table:style-name="ce6">
            <text:p><text:s/>2.29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65</text:p>
          </table:table-cell>
          <table:table-cell office:value-type="string" table:style-name="ce3">
            <text:p>ENROLADOR DE ACO 98MM PARA CAP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273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200" table:style-name="ce4">
            <text:p><text:s/>3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687</text:p>
          </table:table-cell>
          <table:table-cell office:value-type="string" table:style-name="ce5">
            <text:p>ENROLADOR PLASTICO PARA CAPA TERMIC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0256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890" table:style-name="ce6">
            <text:p><text:s/>1.8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102</text:p>
          </table:table-cell>
          <table:table-cell office:value-type="string" table:style-name="ce3">
            <text:p>ESCADA CONF 2 03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188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980" table:style-name="ce4">
            <text:p><text:s/>2.9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103</text:p>
          </table:table-cell>
          <table:table-cell office:value-type="string" table:style-name="ce5">
            <text:p>ESCADA CONF 2 04 DG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19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600" table:style-name="ce6">
            <text:p><text:s/>3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97</text:p>
          </table:table-cell>
          <table:table-cell office:value-type="string" table:style-name="ce3">
            <text:p>ESCADA CONF AI316 2 POL. 03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1128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260" table:style-name="ce4">
            <text:p><text:s/>4.2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98</text:p>
          </table:table-cell>
          <table:table-cell office:value-type="string" table:style-name="ce5">
            <text:p>ESCADA CONF AI316 2 POL. 04 DG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113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900" table:style-name="ce6">
            <text:p><text:s/>4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412</text:p>
          </table:table-cell>
          <table:table-cell office:value-type="string" table:style-name="ce3">
            <text:p>ESCADA CONFORT HOME 1 1/2 C/ DEGRAU INOX ( 3 DEGRAUS 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834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400" table:style-name="ce4">
            <text:p><text:s/>1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413</text:p>
          </table:table-cell>
          <table:table-cell office:value-type="string" table:style-name="ce5">
            <text:p>ESCADA CONFORT HOME 1 1/2 C/ DEGRAU INOX ( 4 DEGRAUS 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835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690" table:style-name="ce6">
            <text:p><text:s/>1.6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414</text:p>
          </table:table-cell>
          <table:table-cell office:value-type="string" table:style-name="ce3">
            <text:p>ESCADA CONFORT HOME 1 1/2 C/ DEGRAU INOX ( 5 DEGRAUS 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837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930" table:style-name="ce4">
            <text:p><text:s/>1.9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52</text:p>
          </table:table-cell>
          <table:table-cell office:value-type="string" table:style-name="ce5">
            <text:p>ESCADA LIGHT 1 1/2 03 DG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26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870" table:style-name="ce6">
            <text:p><text:s/>2.8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93</text:p>
          </table:table-cell>
          <table:table-cell office:value-type="string" table:style-name="ce3">
            <text:p>ESCADA MAR 1 1/2 02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63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080" table:style-name="ce4">
            <text:p><text:s/>1.0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89</text:p>
          </table:table-cell>
          <table:table-cell office:value-type="string" table:style-name="ce5">
            <text:p>ESCADA MAR 1 1/2 02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59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905" table:style-name="ce6">
            <text:p><text:s/>90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94</text:p>
          </table:table-cell>
          <table:table-cell office:value-type="string" table:style-name="ce3">
            <text:p>ESCADA MAR 1 1/2 03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64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325" table:style-name="ce4">
            <text:p><text:s/>1.32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90</text:p>
          </table:table-cell>
          <table:table-cell office:value-type="string" table:style-name="ce5">
            <text:p>ESCADA MAR 1 1/2 03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60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990" table:style-name="ce6">
            <text:p><text:s/>9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95</text:p>
          </table:table-cell>
          <table:table-cell office:value-type="string" table:style-name="ce3">
            <text:p>ESCADA MAR 1 1/2 04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65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550" table:style-name="ce4">
            <text:p><text:s/>1.5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91</text:p>
          </table:table-cell>
          <table:table-cell office:value-type="string" table:style-name="ce5">
            <text:p>ESCADA MAR 1 1/2 04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611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110" table:style-name="ce6">
            <text:p><text:s/>1.1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96</text:p>
          </table:table-cell>
          <table:table-cell office:value-type="string" table:style-name="ce3">
            <text:p>ESCADA MAR 1 1/2 05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666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090" table:style-name="ce4">
            <text:p><text:s/>2.0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92</text:p>
          </table:table-cell>
          <table:table-cell office:value-type="string" table:style-name="ce5">
            <text:p>ESCADA MAR 1 1/2 05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62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495" table:style-name="ce6">
            <text:p><text:s/>1.4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85</text:p>
          </table:table-cell>
          <table:table-cell office:value-type="string" table:style-name="ce3">
            <text:p>ESCADA TRAD 1 1/2 02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55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970" table:style-name="ce4">
            <text:p><text:s/>9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81</text:p>
          </table:table-cell>
          <table:table-cell office:value-type="string" table:style-name="ce5">
            <text:p>ESCADA TRAD 1 1/2 02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512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750" table:style-name="ce6">
            <text:p><text:s/>7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86</text:p>
          </table:table-cell>
          <table:table-cell office:value-type="string" table:style-name="ce3">
            <text:p>ESCADA TRAD 1 1/2 03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56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200" table:style-name="ce4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82</text:p>
          </table:table-cell>
          <table:table-cell office:value-type="string" table:style-name="ce5">
            <text:p>ESCADA TRAD 1 1/2 03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529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926" table:style-name="ce6">
            <text:p><text:s/>92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87</text:p>
          </table:table-cell>
          <table:table-cell office:value-type="string" table:style-name="ce3">
            <text:p>ESCADA TRAD 1 1/2 04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574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490" table:style-name="ce4">
            <text:p><text:s/>1.4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83</text:p>
          </table:table-cell>
          <table:table-cell office:value-type="string" table:style-name="ce5">
            <text:p>ESCADA TRAD 1 1/2 04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53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070" table:style-name="ce6">
            <text:p><text:s/>1.0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88</text:p>
          </table:table-cell>
          <table:table-cell office:value-type="string" table:style-name="ce3">
            <text:p>ESCADA TRAD 1 1/2 05 DG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58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730" table:style-name="ce4">
            <text:p><text:s/>1.7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84</text:p>
          </table:table-cell>
          <table:table-cell office:value-type="string" table:style-name="ce5">
            <text:p>ESCADA TRAD 1 1/2 05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54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214" table:style-name="ce6">
            <text:p><text:s/>1.21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3855</text:p>
          </table:table-cell>
          <table:table-cell office:value-type="string" table:style-name="ce3">
            <text:p>ESCADA TRAD 2 02 DG PLASTI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634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800" table:style-name="ce4">
            <text:p><text:s/>1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3856</text:p>
          </table:table-cell>
          <table:table-cell office:value-type="string" table:style-name="ce5">
            <text:p>ESCADA TRAD 2 03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635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900" table:style-name="ce6">
            <text:p><text:s/>1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3857</text:p>
          </table:table-cell>
          <table:table-cell office:value-type="string" table:style-name="ce3">
            <text:p>ESCADA TRAD 2 04 DG PLASTI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636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200" table:style-name="ce4">
            <text:p><text:s/>2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3858</text:p>
          </table:table-cell>
          <table:table-cell office:value-type="string" table:style-name="ce5">
            <text:p>ESCADA TRAD 2 05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637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850" table:style-name="ce6">
            <text:p><text:s/>2.8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89</text:p>
          </table:table-cell>
          <table:table-cell office:value-type="string" table:style-name="ce3">
            <text:p>ESCADA TRAD AI316 1.1/2 - 02 DG PLASTI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1043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100" table:style-name="ce4">
            <text:p><text:s/>1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90</text:p>
          </table:table-cell>
          <table:table-cell office:value-type="string" table:style-name="ce5">
            <text:p>ESCADA TRAD AI316 1.1/2 - 03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105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440" table:style-name="ce6">
            <text:p><text:s/>1.4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91</text:p>
          </table:table-cell>
          <table:table-cell office:value-type="string" table:style-name="ce3">
            <text:p>ESCADA TRAD AI316 1.1/2 - 04 DG PLASTI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106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490" table:style-name="ce4">
            <text:p><text:s/>1.4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92</text:p>
          </table:table-cell>
          <table:table-cell office:value-type="string" table:style-name="ce5">
            <text:p>ESCADA TRAD AI316 1.1/2 - 05 DG PLASTI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107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600" table:style-name="ce6">
            <text:p><text:s/>1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75</text:p>
          </table:table-cell>
          <table:table-cell office:value-type="string" table:style-name="ce3">
            <text:p>ESCOVA ACO INOX (25CM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045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6" table:style-name="ce4">
            <text:p><text:s/>9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814</text:p>
          </table:table-cell>
          <table:table-cell office:value-type="string" table:style-name="ce5">
            <text:p>ESCOVA BRANCA APARELHO P/ FILTRAR PISCINA MOD.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603.50.00</text:p>
          </table:table-cell>
          <table:table-cell office:value-type="string" table:style-name="ce5">
            <text:p>789900562123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853" table:style-name="ce6">
            <text:p><text:s/>853,00<text:s/></text:p>
          </table:table-cell>
          <table:table-cell office:value-type="float" office:value="67" table:formula="of:=IFERROR(VLOOKUP([.A:.A];['SB1'.B:.G];6;FALSE);&quot;&quot;)" table:style-name="ce1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14</text:p>
          </table:table-cell>
          <table:table-cell office:value-type="string" table:style-name="ce3">
            <text:p>ESCOVA BRANCA COMBINADA P/ ROBO LIMP AUT RB4I/WAVE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603.50.00</text:p>
          </table:table-cell>
          <table:table-cell office:value-type="string" table:style-name="ce3">
            <text:p>789900562072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2" table:style-name="ce4">
            <text:p><text:s/>6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818</text:p>
          </table:table-cell>
          <table:table-cell office:value-type="string" table:style-name="ce5">
            <text:p>ESCOVA BRANCA COMBINADA PARA ASP AUTO LIMPANTE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603.50.00</text:p>
          </table:table-cell>
          <table:table-cell office:value-type="string" table:style-name="ce5">
            <text:p>789900562127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17" table:style-name="ce6">
            <text:p><text:s/>11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817</text:p>
          </table:table-cell>
          <table:table-cell office:value-type="string" table:style-name="ce3">
            <text:p>ESCOVA CB PVC CZ.COMB.DYN APAR.P/ FILTRAR PISC.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603.50.00</text:p>
          </table:table-cell>
          <table:table-cell office:value-type="string" table:style-name="ce3">
            <text:p>789900562126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6" table:style-name="ce4">
            <text:p><text:s/>116,00<text:s/></text:p>
          </table:table-cell>
          <table:table-cell office:value-type="float" office:value="11" table:formula="of:=IFERROR(VLOOKUP([.A:.A];['SB1'.B:.G];6;FALSE);&quot;&quot;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816</text:p>
          </table:table-cell>
          <table:table-cell office:value-type="string" table:style-name="ce5">
            <text:p>ESCOVA CINZA PARA ASPIRADOR AUTO LIMPANTE RB4I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603.50.00</text:p>
          </table:table-cell>
          <table:table-cell office:value-type="string" table:style-name="ce5">
            <text:p>789900562125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1" table:style-name="ce6">
            <text:p><text:s/>141,00<text:s/></text:p>
          </table:table-cell>
          <table:table-cell office:value-type="float" office:value="11" table:formula="of:=IFERROR(VLOOKUP([.A:.A];['SB1'.B:.G];6;FALSE);&quot;&quot;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815</text:p>
          </table:table-cell>
          <table:table-cell office:value-type="string" table:style-name="ce3">
            <text:p>ESCOVA CINZA ROBO LIMPADOR AUTOMATICO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603.50.00</text:p>
          </table:table-cell>
          <table:table-cell office:value-type="string" table:style-name="ce3">
            <text:p>789900562124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2" table:style-name="ce4">
            <text:p><text:s/>16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289</text:p>
          </table:table-cell>
          <table:table-cell office:value-type="string" table:style-name="ce5">
            <text:p>ESCOVA CURVA SLI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803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0" table:style-name="ce6">
            <text:p><text:s/>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1050</text:p>
          </table:table-cell>
          <table:table-cell office:value-type="string" table:style-name="ce3">
            <text:p>ESCOVA NYLON 90 CM <text:s/>PROFISSIONAL COM BASE DE ALUMINI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958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" table:style-name="ce4">
            <text:p><text:s/>2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74</text:p>
          </table:table-cell>
          <table:table-cell office:value-type="string" table:style-name="ce5">
            <text:p>ESCOVA NYLON CURVA (44CM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044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1" table:style-name="ce6">
            <text:p><text:s/>4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72</text:p>
          </table:table-cell>
          <table:table-cell office:value-type="string" table:style-name="ce3">
            <text:p>ESCOVA NYLON CURVA LUXO (44CM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042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" table:style-name="ce4">
            <text:p><text:s/>4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73</text:p>
          </table:table-cell>
          <table:table-cell office:value-type="string" table:style-name="ce5">
            <text:p>ESCOVA NYLON RETA (33CM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043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3" table:style-name="ce6">
            <text:p><text:s/>3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63</text:p>
          </table:table-cell>
          <table:table-cell office:value-type="string" table:style-name="ce3">
            <text:p>ESCOVA PARA RODO ASPIRADOR OLIMPICO 4 RODA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033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8" table:style-name="ce4">
            <text:p><text:s/>5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72</text:p>
          </table:table-cell>
          <table:table-cell office:value-type="string" table:style-name="ce5">
            <text:p>ESCOVA PVC CINZA COMB. ROBO LIMPADOR AUT.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603.50.00</text:p>
          </table:table-cell>
          <table:table-cell office:value-type="string" table:style-name="ce5">
            <text:p>789900562121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32" table:style-name="ce6">
            <text:p><text:s/>132,00<text:s/></text:p>
          </table:table-cell>
          <table:table-cell office:value-type="float" office:value="20" table:formula="of:=IFERROR(VLOOKUP([.A:.A];['SB1'.B:.G];6;FALSE);&quot;&quot;)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71</text:p>
          </table:table-cell>
          <table:table-cell office:value-type="string" table:style-name="ce3">
            <text:p>ESCOVA PVC CZ. APARELHO P/ FILTRAR PISCINA MOD.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603.50.00</text:p>
          </table:table-cell>
          <table:table-cell office:value-type="string" table:style-name="ce3">
            <text:p>789900562120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" table:style-name="ce4">
            <text:p><text:s/>159,00<text:s/></text:p>
          </table:table-cell>
          <table:table-cell office:value-type="float" office:value="17" table:formula="of:=IFERROR(VLOOKUP([.A:.A];['SB1'.B:.G];6;FALSE);&quot;&quot;)" table:style-name="ce1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8874</text:p>
          </table:table-cell>
          <table:table-cell office:value-type="string" table:style-name="ce5">
            <text:p>ESPIGAO PVC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4716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4.25" table:style-name="ce6">
            <text:p><text:s/>14,2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00</text:p>
          </table:table-cell>
          <table:table-cell office:value-type="string" table:style-name="ce3">
            <text:p>ESPREGUICADEIRA COM AIR BLOWER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984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5000" table:style-name="ce4">
            <text:p><text:s/>5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22</text:p>
          </table:table-cell>
          <table:table-cell office:value-type="string" table:style-name="ce5">
            <text:p>ESTICADOR COM GANCHO PARA RAI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92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654" table:style-name="ce6">
            <text:p><text:s/>6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49</text:p>
          </table:table-cell>
          <table:table-cell office:value-type="string" table:style-name="ce3">
            <text:p>ESTOJO DE TEST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27.89.99</text:p>
          </table:table-cell>
          <table:table-cell office:value-type="string" table:style-name="ce3">
            <text:p>789900560019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6" table:style-name="ce4">
            <text:p><text:s/>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946</text:p>
          </table:table-cell>
          <table:table-cell office:value-type="string" table:style-name="ce5">
            <text:p>ESTRUTURA FIXA ENROLADOR INOX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261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554.39" table:style-name="ce6">
            <text:p><text:s/>554,3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945</text:p>
          </table:table-cell>
          <table:table-cell office:value-type="string" table:style-name="ce3">
            <text:p>ESTRUTURA MOVEL C/ ENGRENAGEM E TUBO DE ENCAIXE (MOD 2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262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038.3399999999999" table:style-name="ce4">
            <text:p><text:s/>1.038,3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48</text:p>
          </table:table-cell>
          <table:table-cell office:value-type="string" table:style-name="ce5">
            <text:p>EVACUADOR AGUA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09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9" table:style-name="ce6">
            <text:p><text:s/>29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8862</text:p>
          </table:table-cell>
          <table:table-cell office:value-type="string" table:style-name="ce3">
            <text:p>EVAPORADOR PARA TROCADOR SD 13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99.00</text:p>
          </table:table-cell>
          <table:table-cell table:style-name="ce3"/>
          <table:table-cell office:value-type="float" office:value="9.75" table:style-name="ce4">
            <text:p><text:s/>9,75<text:s/></text:p>
          </table:table-cell>
          <table:table-cell office:value-type="float" office:value="7522" table:style-name="ce4">
            <text:p><text:s/>7.52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58</text:p>
          </table:table-cell>
          <table:table-cell office:value-type="string" table:style-name="ce5">
            <text:p>EVAPORADOR PARA TROCADOR SD 15/ 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99.00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3040" table:style-name="ce6">
            <text:p><text:s/>3.0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63</text:p>
          </table:table-cell>
          <table:table-cell office:value-type="string" table:style-name="ce3">
            <text:p>EVAPORADOR PARA TROCADOR SD 16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99.00</text:p>
          </table:table-cell>
          <table:table-cell office:value-type="string" table:style-name="ce3">
            <text:p>7899005630502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3077" table:style-name="ce4">
            <text:p><text:s/>13.07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859</text:p>
          </table:table-cell>
          <table:table-cell office:value-type="string" table:style-name="ce5">
            <text:p>EVAPORADOR PARA TROCADOR SD 4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99.00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3620" table:style-name="ce6">
            <text:p><text:s/>3.6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60</text:p>
          </table:table-cell>
          <table:table-cell office:value-type="string" table:style-name="ce3">
            <text:p>EVAPORADOR PARA TROCADOR SD 60/ 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99.00</text:p>
          </table:table-cell>
          <table:table-cell table:style-name="ce3"/>
          <table:table-cell office:value-type="float" office:value="9.75" table:style-name="ce4">
            <text:p><text:s/>9,75<text:s/></text:p>
          </table:table-cell>
          <table:table-cell office:value-type="float" office:value="4662" table:style-name="ce4">
            <text:p><text:s/>4.66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156</text:p>
          </table:table-cell>
          <table:table-cell office:value-type="string" table:style-name="ce5">
            <text:p>FECHO ELETROMAGNETICO P/ PORTA DE SAUN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5.19.90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212" table:style-name="ce6">
            <text:p><text:s/>21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46</text:p>
          </table:table-cell>
          <table:table-cell office:value-type="string" table:style-name="ce3">
            <text:p>FILTRO BAG APARELHO P/ FILTRAR PISCINA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484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251" table:style-name="ce4">
            <text:p><text:s/>251,00<text:s/></text:p>
          </table:table-cell>
          <table:table-cell office:value-type="float" office:value="47" table:formula="of:=IFERROR(VLOOKUP([.A:.A];['SB1'.B:.G];6;FALSE);&quot;&quot;)" table:style-name="ce1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716</text:p>
          </table:table-cell>
          <table:table-cell office:value-type="string" table:style-name="ce5">
            <text:p>FILTRO BAG P/ ROBO PARA FILTRAR PISCINA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0749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358" table:style-name="ce6">
            <text:p><text:s/>358,00<text:s/></text:p>
          </table:table-cell>
          <table:table-cell office:value-type="float" office:value="11" table:formula="of:=IFERROR(VLOOKUP([.A:.A];['SB1'.B:.G];6;FALSE);&quot;&quot;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60</text:p>
          </table:table-cell>
          <table:table-cell office:value-type="string" table:style-name="ce3">
            <text:p>FILTRO CARTUCHO P/ROBO LIMPADOR AUTOMATICO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613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390" table:style-name="ce4">
            <text:p><text:s/>1.390,00<text:s/></text:p>
          </table:table-cell>
          <table:table-cell office:value-type="float" office:value="15" table:formula="of:=IFERROR(VLOOKUP([.A:.A];['SB1'.B:.G];6;FALSE);&quot;&quot;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14580</text:p>
          </table:table-cell>
          <table:table-cell office:value-type="string" table:style-name="ce5">
            <text:p>FILTRO PARA COLETOR SOLAR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21.00</text:p>
          </table:table-cell>
          <table:table-cell office:value-type="string" table:style-name="ce5">
            <text:p>789900561075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65" table:style-name="ce6">
            <text:p><text:s/>4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037</text:p>
          </table:table-cell>
          <table:table-cell office:value-type="string" table:style-name="ce3">
            <text:p>FILTRO PARA SAUN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21.00</text:p>
          </table:table-cell>
          <table:table-cell office:value-type="string" table:style-name="ce3">
            <text:p>789900561749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7" table:style-name="ce4">
            <text:p><text:s/>49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464</text:p>
          </table:table-cell>
          <table:table-cell office:value-type="string" table:style-name="ce5">
            <text:p>FILTRO SECANTE PARA TC SD105 A SD1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602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03.60000000000002" table:style-name="ce6">
            <text:p><text:s/>303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81</text:p>
          </table:table-cell>
          <table:table-cell office:value-type="string" table:style-name="ce3">
            <text:p>FILTRO SECANTE PARA TC SD60 A SD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244" table:style-name="ce4">
            <text:p><text:s/>24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083</text:p>
          </table:table-cell>
          <table:table-cell office:value-type="string" table:style-name="ce5">
            <text:p>FIXADOR PLASTICO P/ MESA PLASTIC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3.99.00</text:p>
          </table:table-cell>
          <table:table-cell office:value-type="string" table:style-name="ce5">
            <text:p>789900561263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3.930000000000007" table:style-name="ce6">
            <text:p><text:s/>73,9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3711</text:p>
          </table:table-cell>
          <table:table-cell office:value-type="string" table:style-name="ce3">
            <text:p>FLANGE ACABAMENTO DO BANC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64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6" table:style-name="ce4">
            <text:p><text:s/>3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964</text:p>
          </table:table-cell>
          <table:table-cell office:value-type="string" table:style-name="ce5">
            <text:p>FLANGE ACABAMENTO SKIMMER COMPACT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974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5.48" table:style-name="ce6">
            <text:p><text:s/>55,4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952</text:p>
          </table:table-cell>
          <table:table-cell office:value-type="string" table:style-name="ce3">
            <text:p>FLANGE INOX ACABAMENTO SKIMMER B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447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17" table:style-name="ce4">
            <text:p><text:s/>21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154</text:p>
          </table:table-cell>
          <table:table-cell office:value-type="string" table:style-name="ce5">
            <text:p>FLANGE TUBO UNIAO GERADOR CLORO G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341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6" table:style-name="ce6">
            <text:p><text:s/>3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333</text:p>
          </table:table-cell>
          <table:table-cell office:value-type="string" table:style-name="ce3">
            <text:p>FLUTUADOR DA MANGUEIRA ROBO LIMPADOR AUT. PISCINA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957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6" table:style-name="ce4">
            <text:p><text:s/>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27</text:p>
          </table:table-cell>
          <table:table-cell office:value-type="string" table:style-name="ce5">
            <text:p>FLUTUADOR INTERNO ROBO LIMP AUT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880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9.1999999999999993" table:style-name="ce6">
            <text:p><text:s/>9,20<text:s/></text:p>
          </table:table-cell>
          <table:table-cell office:value-type="float" office:value="15" table:formula="of:=IFERROR(VLOOKUP([.A:.A];['SB1'.B:.G];6;FALSE);&quot;&quot;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73</text:p>
          </table:table-cell>
          <table:table-cell office:value-type="string" table:style-name="ce3">
            <text:p>FLUTUADOR P/ ROBO LIMP AUT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1974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.12" table:style-name="ce4">
            <text:p><text:s/>98,1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312</text:p>
          </table:table-cell>
          <table:table-cell office:value-type="string" table:style-name="ce5">
            <text:p>FLUXOSTATO P/GERADOR CLORO G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35.30.19</text:p>
          </table:table-cell>
          <table:table-cell office:value-type="string" table:style-name="ce5">
            <text:p>789900563454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53" table:style-name="ce6">
            <text:p><text:s/>15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524</text:p>
          </table:table-cell>
          <table:table-cell office:value-type="string" table:style-name="ce3">
            <text:p>FONTE CHAVEADA 100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3258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621" table:style-name="ce4">
            <text:p><text:s/>62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522</text:p>
          </table:table-cell>
          <table:table-cell office:value-type="string" table:style-name="ce5">
            <text:p>FONTE CHAVEADA 150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3256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673" table:style-name="ce6">
            <text:p><text:s/>67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523</text:p>
          </table:table-cell>
          <table:table-cell office:value-type="string" table:style-name="ce3">
            <text:p>FONTE CHAVEADA 20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3257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78" table:style-name="ce4">
            <text:p><text:s/>27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521</text:p>
          </table:table-cell>
          <table:table-cell office:value-type="string" table:style-name="ce5">
            <text:p>FONTE CHAVEADA 60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32551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10" table:style-name="ce6">
            <text:p><text:s/>4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170</text:p>
          </table:table-cell>
          <table:table-cell office:value-type="string" table:style-name="ce3">
            <text:p>FONTE CHAVEADA GERADOR CLORO GS12/GS1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3349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392" table:style-name="ce4">
            <text:p><text:s/>1.39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168</text:p>
          </table:table-cell>
          <table:table-cell office:value-type="string" table:style-name="ce5">
            <text:p>FONTE CHAVEADA GERADOR CLORO GS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33480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876" table:style-name="ce6">
            <text:p><text:s/>87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172</text:p>
          </table:table-cell>
          <table:table-cell office:value-type="string" table:style-name="ce3">
            <text:p>FONTE CHAVEADA GERADOR CLORO GS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33503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52" table:style-name="ce4">
            <text:p><text:s/>45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66</text:p>
          </table:table-cell>
          <table:table-cell office:value-type="string" table:style-name="ce5">
            <text:p>FONTE DE ALIMENTACAO P/AP. DE FILTRAR PISC RB2/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30.33.90</text:p>
          </table:table-cell>
          <table:table-cell office:value-type="string" table:style-name="ce5">
            <text:p>789900562117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214" table:style-name="ce6">
            <text:p><text:s/>1.214,00<text:s/></text:p>
          </table:table-cell>
          <table:table-cell office:value-type="float" office:value="6" table:formula="of:=IFERROR(VLOOKUP([.A:.A];['SB1'.B:.G];6;FALSE);&quot;&quot;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69</text:p>
          </table:table-cell>
          <table:table-cell office:value-type="string" table:style-name="ce3">
            <text:p>FONTE DE ALIMENTACAO P/AP. DE FILTRAR PISC RB4I-110V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131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67" table:style-name="ce4">
            <text:p><text:s/>1.26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68</text:p>
          </table:table-cell>
          <table:table-cell office:value-type="string" table:style-name="ce5">
            <text:p>FONTE DE ALIMENTACAO P/AP. DE FILTRAR PISC RB4I-220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21302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618" table:style-name="ce6">
            <text:p><text:s/>2.618,00<text:s/></text:p>
          </table:table-cell>
          <table:table-cell office:value-type="float" office:value="1" table:formula="of:=IFERROR(VLOOKUP([.A:.A];['SB1'.B:.G];6;FALSE);&quot;&quot;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6458</text:p>
          </table:table-cell>
          <table:table-cell office:value-type="string" table:style-name="ce3">
            <text:p>FONTE DE ALIMENTACAO P/AP. DE FILTRAR PISC RB4I-BIVOLT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4.40.29</text:p>
          </table:table-cell>
          <table:table-cell office:value-type="string" table:style-name="ce3">
            <text:p>789900563279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857" table:style-name="ce4">
            <text:p><text:s/>2.857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6458</text:p>
          </table:table-cell>
          <table:table-cell office:value-type="string" table:style-name="ce5">
            <text:p>FONTE DE ALIMENTACAO P/AP. DE FILTRAR PISC RB4I-BIVOLT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3279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857" table:style-name="ce6">
            <text:p><text:s/>2.857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67</text:p>
          </table:table-cell>
          <table:table-cell office:value-type="string" table:style-name="ce3">
            <text:p>FONTE DE ALIMENTACAO P/AP. DE FILTRAR PISC WAVE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30.33.90</text:p>
          </table:table-cell>
          <table:table-cell office:value-type="string" table:style-name="ce3">
            <text:p>789900562118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979" table:style-name="ce4">
            <text:p><text:s/>1.979,00<text:s/></text:p>
          </table:table-cell>
          <table:table-cell office:value-type="float" office:value="8" table:formula="of:=IFERROR(VLOOKUP([.A:.A];['SB1'.B:.G];6;FALSE);&quot;&quot;)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4304</text:p>
          </table:table-cell>
          <table:table-cell office:value-type="string" table:style-name="ce5">
            <text:p>FONTE DE ALIMENTACAO P/AP. DE FILTRAR PISC WAVE2X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4.40.29</text:p>
          </table:table-cell>
          <table:table-cell office:value-type="string" table:style-name="ce5">
            <text:p>789900562841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079" table:style-name="ce6">
            <text:p><text:s/>3.079,00<text:s/></text:p>
          </table:table-cell>
          <table:table-cell office:value-type="float" office:value="6" table:formula="of:=IFERROR(VLOOKUP([.A:.A];['SB1'.B:.G];6;FALSE);&quot;&quot;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6037</text:p>
          </table:table-cell>
          <table:table-cell office:value-type="string" table:style-name="ce3">
            <text:p>FRASCO VIDRO ALIMENTADOR ESSENCI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491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.4" table:style-name="ce4">
            <text:p><text:s/>26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319</text:p>
          </table:table-cell>
          <table:table-cell office:value-type="string" table:style-name="ce5">
            <text:p>FRONTAL PARA DHM BRANC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104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3.77" table:style-name="ce6">
            <text:p><text:s/>23,7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318</text:p>
          </table:table-cell>
          <table:table-cell office:value-type="string" table:style-name="ce3">
            <text:p>FRONTAL PARA DHM CROMAD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1037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6.99" table:style-name="ce4">
            <text:p><text:s/>36,9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112</text:p>
          </table:table-cell>
          <table:table-cell office:value-type="string" table:style-name="ce5">
            <text:p>FUNIL C/ DIRECIONADOR P/ DHM 50 PRATIC C/ ROSCA 3/4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265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4.3" table:style-name="ce6">
            <text:p><text:s/>14,3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2171</text:p>
          </table:table-cell>
          <table:table-cell office:value-type="string" table:style-name="ce3">
            <text:p>FUNIL C/ DIRECIONADOR P/ DHM 60 PRATIC C/ ROSCA 1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264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.88" table:style-name="ce4">
            <text:p><text:s/>11,8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403</text:p>
          </table:table-cell>
          <table:table-cell office:value-type="string" table:style-name="ce5">
            <text:p>FUSIVEL 3A GERADOR DE CLORO SSC20 MINI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36.10.00</text:p>
          </table:table-cell>
          <table:table-cell office:value-type="string" table:style-name="ce5">
            <text:p>789900563011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7" table:style-name="ce6">
            <text:p><text:s/>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976</text:p>
          </table:table-cell>
          <table:table-cell office:value-type="string" table:style-name="ce3">
            <text:p>FUSIVEL DE VIDRO 2A PEQUEN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40.90</text:p>
          </table:table-cell>
          <table:table-cell office:value-type="string" table:style-name="ce3">
            <text:p>789900562795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" table:style-name="ce4">
            <text:p><text:s/>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6066</text:p>
          </table:table-cell>
          <table:table-cell office:value-type="string" table:style-name="ce5">
            <text:p>GABARITO INSTALACAO CERCA DE PROTECA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0751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5" table:style-name="ce6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6065</text:p>
          </table:table-cell>
          <table:table-cell office:value-type="string" table:style-name="ce3">
            <text:p>GABARITO INSTALACAO PORTA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08.90.90</text:p>
          </table:table-cell>
          <table:table-cell office:value-type="string" table:style-name="ce3">
            <text:p>789900560750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9" table:style-name="ce4">
            <text:p><text:s/>2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514</text:p>
          </table:table-cell>
          <table:table-cell office:value-type="string" table:style-name="ce5">
            <text:p>GABINETE COMPLETO PARA TROCADOR SD 105 / 130 / 16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office:value-type="string" table:style-name="ce5">
            <text:p>7899005625546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4695" table:style-name="ce6">
            <text:p><text:s/>4.6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511</text:p>
          </table:table-cell>
          <table:table-cell office:value-type="string" table:style-name="ce3">
            <text:p>GABINETE COMPLETO PARA TROCADOR SD 2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table:style-name="ce3"/>
          <table:table-cell office:value-type="float" office:value="6.5" table:style-name="ce4">
            <text:p><text:s/>6,50<text:s/></text:p>
          </table:table-cell>
          <table:table-cell office:value-type="float" office:value="2120" table:style-name="ce4">
            <text:p><text:s/>2.1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512</text:p>
          </table:table-cell>
          <table:table-cell office:value-type="string" table:style-name="ce5">
            <text:p>GABINETE COMPLETO PARA TROCADOR SD 4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table:style-name="ce5"/>
          <table:table-cell office:value-type="float" office:value="6.5" table:style-name="ce6">
            <text:p><text:s/>6,50<text:s/></text:p>
          </table:table-cell>
          <table:table-cell office:value-type="float" office:value="2891" table:style-name="ce6">
            <text:p><text:s/>2.89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513</text:p>
          </table:table-cell>
          <table:table-cell office:value-type="string" table:style-name="ce3">
            <text:p>GABINETE COMPLETO PARA TROCADOR SD 60 / 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25836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016" table:style-name="ce4">
            <text:p><text:s/>3.01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796</text:p>
          </table:table-cell>
          <table:table-cell office:value-type="string" table:style-name="ce5">
            <text:p>GABINETE GERADOR DE VAPOR UNIVERSA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table:style-name="ce5"/>
          <table:table-cell office:value-type="float" office:value="0" table:style-name="ce6">
            <text:p><text:s/>-<text:s/></text:p>
          </table:table-cell>
          <table:table-cell office:value-type="float" office:value="1068" table:style-name="ce6">
            <text:p><text:s/>1.06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800</text:p>
          </table:table-cell>
          <table:table-cell office:value-type="string" table:style-name="ce3">
            <text:p>GABINETE P/ GERADOR DE CALOR 10 / 12 / 15 KW - (RP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28622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823" table:style-name="ce4">
            <text:p><text:s/>1.82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799</text:p>
          </table:table-cell>
          <table:table-cell office:value-type="string" table:style-name="ce5">
            <text:p>GABINETE P/ GERADOR DE CALOR 4 / 6 / 7,5 KW - (RP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office:value-type="string" table:style-name="ce5">
            <text:p>7899005628615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243" table:style-name="ce6">
            <text:p><text:s/>1.2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013</text:p>
          </table:table-cell>
          <table:table-cell office:value-type="string" table:style-name="ce3">
            <text:p>GABINETE PLASTICO GERADOR VAPOR <text:s/>18,0 A 27,0 KW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532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50" table:style-name="ce4">
            <text:p><text:s/>1.6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021</text:p>
          </table:table-cell>
          <table:table-cell office:value-type="string" table:style-name="ce5">
            <text:p>GABINETE PLASTICO GERADOR VAPOR <text:s/>6,0 A 15,0 KW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533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540" table:style-name="ce6">
            <text:p><text:s/>1.5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263</text:p>
          </table:table-cell>
          <table:table-cell office:value-type="string" table:style-name="ce3">
            <text:p>GABINETE ROTOMOLDADO CORTADO P/ TH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40.90</text:p>
          </table:table-cell>
          <table:table-cell table:style-name="ce3"/>
          <table:table-cell office:value-type="float" office:value="0" table:style-name="ce4">
            <text:p><text:s/>-<text:s/></text:p>
          </table:table-cell>
          <table:table-cell office:value-type="float" office:value="1316" table:style-name="ce4">
            <text:p><text:s/>1.31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039</text:p>
          </table:table-cell>
          <table:table-cell office:value-type="string" table:style-name="ce5">
            <text:p>GANCHO INOX PARA SUPORTE RAIA AB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table:style-name="ce5"/>
          <table:table-cell office:value-type="float" office:value="5" table:style-name="ce6">
            <text:p><text:s/>5,00<text:s/></text:p>
          </table:table-cell>
          <table:table-cell office:value-type="float" office:value="51" table:style-name="ce6">
            <text:p><text:s/>5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23</text:p>
          </table:table-cell>
          <table:table-cell office:value-type="string" table:style-name="ce3">
            <text:p>GANCHO PARA RAI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93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57" table:style-name="ce4">
            <text:p><text:s/>5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517</text:p>
          </table:table-cell>
          <table:table-cell office:value-type="string" table:style-name="ce5">
            <text:p>GER CALOR COMERCIAL P/S. SECA 04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90</text:p>
          </table:table-cell>
          <table:table-cell office:value-type="string" table:style-name="ce5">
            <text:p>7899005619286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2370" table:style-name="ce6">
            <text:p><text:s/>2.3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518</text:p>
          </table:table-cell>
          <table:table-cell office:value-type="string" table:style-name="ce3">
            <text:p>GER CALOR COMERCIAL P/S. SECA 06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90</text:p>
          </table:table-cell>
          <table:table-cell office:value-type="string" table:style-name="ce3">
            <text:p>7899005617855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100" table:style-name="ce4">
            <text:p><text:s/>3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519</text:p>
          </table:table-cell>
          <table:table-cell office:value-type="string" table:style-name="ce5">
            <text:p>GER CALOR COMERCIAL P/S. SECA 07,5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90</text:p>
          </table:table-cell>
          <table:table-cell office:value-type="string" table:style-name="ce5">
            <text:p>789900561784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3300" table:style-name="ce6">
            <text:p><text:s/>3.3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520</text:p>
          </table:table-cell>
          <table:table-cell office:value-type="string" table:style-name="ce3">
            <text:p>GER CALOR COMERCIAL P/S. SECA 10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90</text:p>
          </table:table-cell>
          <table:table-cell office:value-type="string" table:style-name="ce3">
            <text:p>7899005617534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600" table:style-name="ce4">
            <text:p><text:s/>3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521</text:p>
          </table:table-cell>
          <table:table-cell office:value-type="string" table:style-name="ce5">
            <text:p>GER CALOR COMERCIAL P/S. SECA 12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90</text:p>
          </table:table-cell>
          <table:table-cell office:value-type="string" table:style-name="ce5">
            <text:p>7899005615684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5600" table:style-name="ce6">
            <text:p><text:s/>5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522</text:p>
          </table:table-cell>
          <table:table-cell office:value-type="string" table:style-name="ce3">
            <text:p>GER CALOR COMERCIAL P/S. SECA 15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90</text:p>
          </table:table-cell>
          <table:table-cell office:value-type="string" table:style-name="ce3">
            <text:p>789900561569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5900" table:style-name="ce4">
            <text:p><text:s/>5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565</text:p>
          </table:table-cell>
          <table:table-cell office:value-type="string" table:style-name="ce5">
            <text:p>GER CALOR P/S. SECA 04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79.90</text:p>
          </table:table-cell>
          <table:table-cell office:value-type="string" table:style-name="ce5">
            <text:p>789900561333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760" table:style-name="ce6">
            <text:p><text:s/>1.7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566</text:p>
          </table:table-cell>
          <table:table-cell office:value-type="string" table:style-name="ce3">
            <text:p>GER CALOR P/S. SECA 06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79.90</text:p>
          </table:table-cell>
          <table:table-cell office:value-type="string" table:style-name="ce3">
            <text:p>7899005613345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200" table:style-name="ce4">
            <text:p><text:s/>2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567</text:p>
          </table:table-cell>
          <table:table-cell office:value-type="string" table:style-name="ce5">
            <text:p>GER CALOR P/S. SECA 07,5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79.90</text:p>
          </table:table-cell>
          <table:table-cell office:value-type="string" table:style-name="ce5">
            <text:p>7899005613352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400" table:style-name="ce6">
            <text:p><text:s/>2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568</text:p>
          </table:table-cell>
          <table:table-cell office:value-type="string" table:style-name="ce3">
            <text:p>GER CALOR P/S. SECA 10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79.90</text:p>
          </table:table-cell>
          <table:table-cell office:value-type="string" table:style-name="ce3">
            <text:p>789900561336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980" table:style-name="ce4">
            <text:p><text:s/>2.9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569</text:p>
          </table:table-cell>
          <table:table-cell office:value-type="string" table:style-name="ce5">
            <text:p>GER CALOR P/S. SECA 12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79.90</text:p>
          </table:table-cell>
          <table:table-cell office:value-type="string" table:style-name="ce5">
            <text:p>789900561337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900" table:style-name="ce6">
            <text:p><text:s/>3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570</text:p>
          </table:table-cell>
          <table:table-cell office:value-type="string" table:style-name="ce3">
            <text:p>GER CALOR P/S. SECA 15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79.90</text:p>
          </table:table-cell>
          <table:table-cell office:value-type="string" table:style-name="ce3">
            <text:p>789900561338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100" table:style-name="ce4">
            <text:p><text:s/>4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707</text:p>
          </table:table-cell>
          <table:table-cell office:value-type="string" table:style-name="ce5">
            <text:p>GER CLORO A BASE DE SAL GS-15 C/ FLUXOSTAT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79.89.12</text:p>
          </table:table-cell>
          <table:table-cell office:value-type="string" table:style-name="ce5">
            <text:p>789900562870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900" table:style-name="ce6">
            <text:p><text:s/>4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080</text:p>
          </table:table-cell>
          <table:table-cell office:value-type="string" table:style-name="ce3">
            <text:p>GER CLORO A BASE DE SAL GS-20 C/ FLUXOSTAT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30.90</text:p>
          </table:table-cell>
          <table:table-cell office:value-type="string" table:style-name="ce3">
            <text:p>789900561760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200" table:style-name="ce4">
            <text:p><text:s/>8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826</text:p>
          </table:table-cell>
          <table:table-cell office:value-type="string" table:style-name="ce5">
            <text:p>GER CLORO A BASE DE SAL GS-45 C/ FLUXOSTAT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30.90</text:p>
          </table:table-cell>
          <table:table-cell office:value-type="string" table:style-name="ce5">
            <text:p>789900561534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3250" table:style-name="ce6">
            <text:p><text:s/>13.2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482</text:p>
          </table:table-cell>
          <table:table-cell office:value-type="string" table:style-name="ce3">
            <text:p>GER VAPOR CL I 06 KW 220V B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506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80" table:style-name="ce4">
            <text:p><text:s/>3.4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1483</text:p>
          </table:table-cell>
          <table:table-cell office:value-type="string" table:style-name="ce5">
            <text:p>GER VAPOR CL I 06 KW 220V TR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0507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480" table:style-name="ce6">
            <text:p><text:s/>3.4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484</text:p>
          </table:table-cell>
          <table:table-cell office:value-type="string" table:style-name="ce3">
            <text:p>GER VAPOR CL I 06 KW 380V TR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508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80" table:style-name="ce4">
            <text:p><text:s/>3.4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1485</text:p>
          </table:table-cell>
          <table:table-cell office:value-type="string" table:style-name="ce5">
            <text:p>GER VAPOR CL I 09 KW 220V B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0509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560" table:style-name="ce6">
            <text:p><text:s/>3.5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486</text:p>
          </table:table-cell>
          <table:table-cell office:value-type="string" table:style-name="ce3">
            <text:p>GER VAPOR CL I 09 KW 220V TR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510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60" table:style-name="ce4">
            <text:p><text:s/>3.5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1487</text:p>
          </table:table-cell>
          <table:table-cell office:value-type="string" table:style-name="ce5">
            <text:p>GER VAPOR CL I 09 KW 380V TR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0511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560" table:style-name="ce6">
            <text:p><text:s/>3.5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488</text:p>
          </table:table-cell>
          <table:table-cell office:value-type="string" table:style-name="ce3">
            <text:p>GER VAPOR CL I 12 KW 220V B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512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30" table:style-name="ce4">
            <text:p><text:s/>4.2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1489</text:p>
          </table:table-cell>
          <table:table-cell office:value-type="string" table:style-name="ce5">
            <text:p>GER VAPOR CL I 12 KW 220V TR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0513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690" table:style-name="ce6">
            <text:p><text:s/>3.6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490</text:p>
          </table:table-cell>
          <table:table-cell office:value-type="string" table:style-name="ce3">
            <text:p>GER VAPOR CL I 12 KW 380V TR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514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690" table:style-name="ce4">
            <text:p><text:s/>3.6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1491</text:p>
          </table:table-cell>
          <table:table-cell office:value-type="string" table:style-name="ce5">
            <text:p>GER VAPOR CL I 15 KW 220V TR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0515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200" table:style-name="ce6">
            <text:p><text:s/>4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492</text:p>
          </table:table-cell>
          <table:table-cell office:value-type="string" table:style-name="ce3">
            <text:p>GER VAPOR CL I 15 KW 380V TR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516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00" table:style-name="ce4">
            <text:p><text:s/>4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300</text:p>
          </table:table-cell>
          <table:table-cell office:value-type="string" table:style-name="ce5">
            <text:p>GER VAPOR CL I 18 KW 220V TR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0814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700" table:style-name="ce6">
            <text:p><text:s/>4.7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301</text:p>
          </table:table-cell>
          <table:table-cell office:value-type="string" table:style-name="ce3">
            <text:p>GER VAPOR CL I 18 KW 380V TR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815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00" table:style-name="ce4">
            <text:p><text:s/>4.7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302</text:p>
          </table:table-cell>
          <table:table-cell office:value-type="string" table:style-name="ce5">
            <text:p>GER VAPOR CL I 24 KW 220V TR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0816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200" table:style-name="ce6">
            <text:p><text:s/>5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303</text:p>
          </table:table-cell>
          <table:table-cell office:value-type="string" table:style-name="ce3">
            <text:p>GER VAPOR CL I 24 KW 380V TR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817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200" table:style-name="ce4">
            <text:p><text:s/>5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304</text:p>
          </table:table-cell>
          <table:table-cell office:value-type="string" table:style-name="ce5">
            <text:p>GER VAPOR CL I 27 KW 220V TR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0818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670" table:style-name="ce6">
            <text:p><text:s/>5.6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305</text:p>
          </table:table-cell>
          <table:table-cell office:value-type="string" table:style-name="ce3">
            <text:p>GER VAPOR CL I 27 KW 380V TR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0819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70" table:style-name="ce4">
            <text:p><text:s/>5.6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527</text:p>
          </table:table-cell>
          <table:table-cell office:value-type="string" table:style-name="ce5">
            <text:p>GER VAPOR STEAM INOX 04 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3015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670" table:style-name="ce6">
            <text:p><text:s/>2.6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622</text:p>
          </table:table-cell>
          <table:table-cell office:value-type="string" table:style-name="ce3">
            <text:p>GER VAPOR STEAM INOX 06 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1418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0" table:style-name="ce4">
            <text:p><text:s/>3.3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623</text:p>
          </table:table-cell>
          <table:table-cell office:value-type="string" table:style-name="ce5">
            <text:p>GER VAPOR STEAM INOX 09 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1419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460" table:style-name="ce6">
            <text:p><text:s/>3.4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624</text:p>
          </table:table-cell>
          <table:table-cell office:value-type="string" table:style-name="ce3">
            <text:p>GER VAPOR STEAM INOX 12 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1420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690" table:style-name="ce4">
            <text:p><text:s/>3.6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528</text:p>
          </table:table-cell>
          <table:table-cell office:value-type="string" table:style-name="ce5">
            <text:p>GER VAPOR STEAM INOX 15 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3016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900" table:style-name="ce6">
            <text:p><text:s/>3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529</text:p>
          </table:table-cell>
          <table:table-cell office:value-type="string" table:style-name="ce3">
            <text:p>GER VAPOR STEAM INOX 18 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3017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00" table:style-name="ce4">
            <text:p><text:s/>4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32</text:p>
          </table:table-cell>
          <table:table-cell office:value-type="string" table:style-name="ce5">
            <text:p>GER VAPOR UNIV 06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1277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230" table:style-name="ce6">
            <text:p><text:s/>3.2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33</text:p>
          </table:table-cell>
          <table:table-cell office:value-type="string" table:style-name="ce3">
            <text:p>GER VAPOR UNIV 09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19.00</text:p>
          </table:table-cell>
          <table:table-cell office:value-type="string" table:style-name="ce3">
            <text:p>789900561278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0" table:style-name="ce4">
            <text:p><text:s/>3.3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34</text:p>
          </table:table-cell>
          <table:table-cell office:value-type="string" table:style-name="ce5">
            <text:p>GER VAPOR UNIV 12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19.00</text:p>
          </table:table-cell>
          <table:table-cell office:value-type="string" table:style-name="ce5">
            <text:p>789900561279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590" table:style-name="ce6">
            <text:p><text:s/>3.5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289</text:p>
          </table:table-cell>
          <table:table-cell office:value-type="string" table:style-name="ce3">
            <text:p>GRADE C/4 TAMPA ANTI AP A.INOX 316 FLA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331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170" table:style-name="ce4">
            <text:p><text:s/>2.1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988</text:p>
          </table:table-cell>
          <table:table-cell office:value-type="string" table:style-name="ce5">
            <text:p>GRADE DE FUNDO LATAO 30X30 C/ TAMPA FSB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2794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90" table:style-name="ce6">
            <text:p><text:s/>5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771</text:p>
          </table:table-cell>
          <table:table-cell office:value-type="string" table:style-name="ce3">
            <text:p>GRADE DE PROTECAO PARA FORN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4421.99.00</text:p>
          </table:table-cell>
          <table:table-cell office:value-type="string" table:style-name="ce3">
            <text:p>789900560340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30" table:style-name="ce4">
            <text:p><text:s/>7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019</text:p>
          </table:table-cell>
          <table:table-cell office:value-type="string" table:style-name="ce5">
            <text:p>GRADE FUNDO 15X15 C/ TAMPA FSB E BASE AB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152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5" table:style-name="ce6">
            <text:p><text:s/>8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772</text:p>
          </table:table-cell>
          <table:table-cell office:value-type="string" table:style-name="ce3">
            <text:p>GRADE FUNDO 15X15 C/TPA ANTI AP QUAD A.INOX 316 FLA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859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550" table:style-name="ce4">
            <text:p><text:s/>5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412</text:p>
          </table:table-cell>
          <table:table-cell office:value-type="string" table:style-name="ce5">
            <text:p>GRADE FUNDO 15X15 C/TPA ANTI AP QUAD A.INOX 316 LUX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382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60" table:style-name="ce6">
            <text:p><text:s/>2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413</text:p>
          </table:table-cell>
          <table:table-cell office:value-type="string" table:style-name="ce3">
            <text:p>GRADE FUNDO 15X15 C/TPA ANTI AP RED A. INOX 316 LUX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383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60" table:style-name="ce4">
            <text:p><text:s/>2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771</text:p>
          </table:table-cell>
          <table:table-cell office:value-type="string" table:style-name="ce5">
            <text:p>GRADE FUNDO 15X15 C/TPA ANTI AP RED A.INOX 316 FLA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2858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625" table:style-name="ce6">
            <text:p><text:s/>62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744</text:p>
          </table:table-cell>
          <table:table-cell office:value-type="string" table:style-name="ce3">
            <text:p>GRADE FUNDO 30X15 ANTI AP INOX 316 LUX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486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50" table:style-name="ce4">
            <text:p><text:s/>3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540</text:p>
          </table:table-cell>
          <table:table-cell office:value-type="string" table:style-name="ce5">
            <text:p>GRADE FUNDO 30X30 ANTI AP INOX 316 LUX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481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650" table:style-name="ce6">
            <text:p><text:s/>6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495</text:p>
          </table:table-cell>
          <table:table-cell office:value-type="string" table:style-name="ce3">
            <text:p>GRADE LATERAL TIV 25/45/65/7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. <text:s/>.</text:p>
          </table:table-cell>
          <table:table-cell office:value-type="string" table:style-name="ce3">
            <text:p>789900563440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75" table:style-name="ce4">
            <text:p><text:s/>37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634</text:p>
          </table:table-cell>
          <table:table-cell office:value-type="string" table:style-name="ce5">
            <text:p>GRADE PL SD105 A 180 C/ SUP METALIC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053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24" table:style-name="ce6">
            <text:p><text:s/>42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372</text:p>
          </table:table-cell>
          <table:table-cell office:value-type="string" table:style-name="ce3">
            <text:p>GRADE PLASTICA PRETA SD2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14.90.20</text:p>
          </table:table-cell>
          <table:table-cell office:value-type="string" table:style-name="ce3">
            <text:p>789900562982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21" table:style-name="ce4">
            <text:p><text:s/>22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373</text:p>
          </table:table-cell>
          <table:table-cell office:value-type="string" table:style-name="ce5">
            <text:p>GRADE PLASTICA PRETA SD40 A SD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4.90.20</text:p>
          </table:table-cell>
          <table:table-cell office:value-type="string" table:style-name="ce5">
            <text:p>789900562983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49" table:style-name="ce6">
            <text:p><text:s/>24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645</text:p>
          </table:table-cell>
          <table:table-cell office:value-type="string" table:style-name="ce3">
            <text:p>GRAMPO PARA CABINHO ASPIR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44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.5" table:style-name="ce4">
            <text:p><text:s/>2,5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6701</text:p>
          </table:table-cell>
          <table:table-cell office:value-type="string" table:style-name="ce5">
            <text:p>GRELHA EM INOX RALO QUEBRA OND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50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4.4" table:style-name="ce6">
            <text:p><text:s/>14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878</text:p>
          </table:table-cell>
          <table:table-cell office:value-type="string" table:style-name="ce3">
            <text:p>GRELHA FLEX PARA PIS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8.90.00</text:p>
          </table:table-cell>
          <table:table-cell office:value-type="string" table:style-name="ce3">
            <text:p>789900560529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48" table:style-name="ce4">
            <text:p><text:s/>14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389</text:p>
          </table:table-cell>
          <table:table-cell office:value-type="string" table:style-name="ce5">
            <text:p>GUARNICAO P/ SKIMMER BE VINI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381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12" table:style-name="ce6">
            <text:p><text:s/>21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250</text:p>
          </table:table-cell>
          <table:table-cell office:value-type="string" table:style-name="ce3">
            <text:p>GUARNICÄO VINIL DA/DR/R.Q. VINI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463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6.92" table:style-name="ce4">
            <text:p><text:s/>6,9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09</text:p>
          </table:table-cell>
          <table:table-cell office:value-type="string" table:style-name="ce5">
            <text:p>GUIA DA CORREIA ROBO LIMP AUT RB4I/WAVE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67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8" table:style-name="ce6">
            <text:p><text:s/>6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35</text:p>
          </table:table-cell>
          <table:table-cell office:value-type="string" table:style-name="ce3">
            <text:p>GUIA DA RODA APARELHO P/ FILTRAR PISCINA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378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70" table:style-name="ce4">
            <text:p><text:s/>70,00<text:s/></text:p>
          </table:table-cell>
          <table:table-cell office:value-type="float" office:value="69" table:formula="of:=IFERROR(VLOOKUP([.A:.A];['SB1'.B:.G];6;FALSE);&quot;&quot;)" table:style-name="ce1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5334</text:p>
          </table:table-cell>
          <table:table-cell office:value-type="string" table:style-name="ce5">
            <text:p>GUIA DA RODA ROBO LIMPADOR AUT. PISCINA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958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79" table:style-name="ce6">
            <text:p><text:s/>7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404</text:p>
          </table:table-cell>
          <table:table-cell office:value-type="string" table:style-name="ce3">
            <text:p>GUIA P/ COLETOR SOLA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90.90</text:p>
          </table:table-cell>
          <table:table-cell office:value-type="string" table:style-name="ce3">
            <text:p>789900561503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" table:style-name="ce4">
            <text:p><text:s/>1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266</text:p>
          </table:table-cell>
          <table:table-cell office:value-type="string" table:style-name="ce5">
            <text:p>HELICE PARA TROCADOR SD 105 / 130 / 16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5103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726" table:style-name="ce6">
            <text:p><text:s/>72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84</text:p>
          </table:table-cell>
          <table:table-cell office:value-type="string" table:style-name="ce3">
            <text:p>HELICE PARA TROCADOR SD 25 / 40 / 60 / 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90.20</text:p>
          </table:table-cell>
          <table:table-cell office:value-type="string" table:style-name="ce3">
            <text:p>789900561637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640.84" table:style-name="ce4">
            <text:p><text:s/>640,8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753</text:p>
          </table:table-cell>
          <table:table-cell office:value-type="string" table:style-name="ce5">
            <text:p>HELICE PLAST. VENTILADOR DC - TI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4.90.2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387" table:style-name="ce6">
            <text:p><text:s/>38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521</text:p>
          </table:table-cell>
          <table:table-cell office:value-type="string" table:style-name="ce3">
            <text:p>HELICE PLASTICA 450MM P/ TROCADOR SD105 /130/16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90.20</text:p>
          </table:table-cell>
          <table:table-cell office:value-type="string" table:style-name="ce3">
            <text:p>789900562581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16" table:style-name="ce4">
            <text:p><text:s/>51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969</text:p>
          </table:table-cell>
          <table:table-cell office:value-type="string" table:style-name="ce5">
            <text:p>HELICE PLASTICA P/ MOTOR BOMBA DE CALOR (RP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234" table:style-name="ce6">
            <text:p><text:s/>23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991</text:p>
          </table:table-cell>
          <table:table-cell office:value-type="string" table:style-name="ce3">
            <text:p>INTERRUPTOR ELETRICO DE FLUXOSTATO (RP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35.30.19</text:p>
          </table:table-cell>
          <table:table-cell office:value-type="string" table:style-name="ce3">
            <text:p>789900562842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42" table:style-name="ce4">
            <text:p><text:s/>34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16</text:p>
          </table:table-cell>
          <table:table-cell office:value-type="string" table:style-name="ce5">
            <text:p>INTERRUPTOR GER. CLORO BASE DE SAL MOD. SSC25 MINI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9872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530" table:style-name="ce6">
            <text:p><text:s/>5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568</text:p>
          </table:table-cell>
          <table:table-cell office:value-type="string" table:style-name="ce3">
            <text:p>INTERRUPTOR PRETO 3 POSICOE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50.90</text:p>
          </table:table-cell>
          <table:table-cell office:value-type="string" table:style-name="ce3">
            <text:p>789900561792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3.6" table:style-name="ce4">
            <text:p><text:s/>43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771</text:p>
          </table:table-cell>
          <table:table-cell office:value-type="string" table:style-name="ce5">
            <text:p>JAQUETA SODRAMAR TAMANHO G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01.30.00</text:p>
          </table:table-cell>
          <table:table-cell office:value-type="string" table:style-name="ce5">
            <text:p>789900561708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66" table:style-name="ce6">
            <text:p><text:s/>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772</text:p>
          </table:table-cell>
          <table:table-cell office:value-type="string" table:style-name="ce3">
            <text:p>JAQUETA SODRAMAR TAMANHO GG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6101.30.00</text:p>
          </table:table-cell>
          <table:table-cell office:value-type="string" table:style-name="ce3">
            <text:p>789900561709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" table:style-name="ce4">
            <text:p><text:s/>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770</text:p>
          </table:table-cell>
          <table:table-cell office:value-type="string" table:style-name="ce5">
            <text:p>JAQUETA SODRAMAR TAMANHO 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01.30.00</text:p>
          </table:table-cell>
          <table:table-cell office:value-type="string" table:style-name="ce5">
            <text:p>789900561707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66" table:style-name="ce6">
            <text:p><text:s/>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769</text:p>
          </table:table-cell>
          <table:table-cell office:value-type="string" table:style-name="ce3">
            <text:p>JAQUETA SODRAMAR TAMANHO P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6101.30.00</text:p>
          </table:table-cell>
          <table:table-cell office:value-type="string" table:style-name="ce3">
            <text:p>789900561706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" table:style-name="ce4">
            <text:p><text:s/>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788</text:p>
          </table:table-cell>
          <table:table-cell office:value-type="string" table:style-name="ce5">
            <text:p>JUNTA DE ENCAIXE P/ FLEX. ACO INOX 1 1/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016.93.00</text:p>
          </table:table-cell>
          <table:table-cell table:style-name="ce5"/>
          <table:table-cell office:value-type="float" office:value="5.2" table:style-name="ce6">
            <text:p><text:s/>5,20<text:s/></text:p>
          </table:table-cell>
          <table:table-cell office:value-type="float" office:value="74" table:style-name="ce6">
            <text:p><text:s/>7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789</text:p>
          </table:table-cell>
          <table:table-cell office:value-type="string" table:style-name="ce3">
            <text:p>JUNTA DE ENCAIXE P/ FLEX. ACO INOX 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4016.93.00</text:p>
          </table:table-cell>
          <table:table-cell table:style-name="ce3"/>
          <table:table-cell office:value-type="float" office:value="5.2" table:style-name="ce4">
            <text:p><text:s/>5,20<text:s/></text:p>
          </table:table-cell>
          <table:table-cell office:value-type="float" office:value="82" table:style-name="ce4">
            <text:p><text:s/>8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880</text:p>
          </table:table-cell>
          <table:table-cell office:value-type="string" table:style-name="ce5">
            <text:p>KIT ACABAMENTO EM PLAST. <text:s/>P/ POLTRONA IBIZ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720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0" table:style-name="ce6">
            <text:p><text:s/>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882</text:p>
          </table:table-cell>
          <table:table-cell office:value-type="string" table:style-name="ce3">
            <text:p>KIT ACABAMENTO EM PLAST. P/ ESPREGUICADEIRA IBIZ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719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0" table:style-name="ce4">
            <text:p><text:s/>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879</text:p>
          </table:table-cell>
          <table:table-cell office:value-type="string" table:style-name="ce5">
            <text:p>KIT ACABAMENTO PLASTICO P/POLTRONA CARIBE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099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5.799999999999997" table:style-name="ce6">
            <text:p><text:s/>35,8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966</text:p>
          </table:table-cell>
          <table:table-cell office:value-type="string" table:style-name="ce3">
            <text:p>KIT ACABAMENTO SKIMMER BL BRANC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43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75.74" table:style-name="ce4">
            <text:p><text:s/>175,7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537</text:p>
          </table:table-cell>
          <table:table-cell office:value-type="string" table:style-name="ce5">
            <text:p>KIT ACABAMENTO SKIMMER BL PRAT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408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84.99" table:style-name="ce6">
            <text:p><text:s/>184,9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965</text:p>
          </table:table-cell>
          <table:table-cell office:value-type="string" table:style-name="ce3">
            <text:p>KIT ACABAMENTO SKIMMER BP BRANC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42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6.27" table:style-name="ce4">
            <text:p><text:s/>116,2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898</text:p>
          </table:table-cell>
          <table:table-cell office:value-type="string" table:style-name="ce5">
            <text:p>KIT ACABAMENTO SKIMMER BP PRAT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3515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2" table:style-name="ce6">
            <text:p><text:s/>4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6996</text:p>
          </table:table-cell>
          <table:table-cell office:value-type="string" table:style-name="ce3">
            <text:p>KIT ADAPTADOR GRADE E DRENO FUNDO P/ TAMPA FSB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419.80.90</text:p>
          </table:table-cell>
          <table:table-cell office:value-type="string" table:style-name="ce3">
            <text:p>789900561205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66" table:style-name="ce4">
            <text:p><text:s/>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1887</text:p>
          </table:table-cell>
          <table:table-cell office:value-type="string" table:style-name="ce5">
            <text:p>KIT BORRACHAS P/ REFLETOR <text:s/>INST DA 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008.29.00</text:p>
          </table:table-cell>
          <table:table-cell office:value-type="string" table:style-name="ce5">
            <text:p>789900560989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5.01" table:style-name="ce6">
            <text:p><text:s/>15,01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304</text:p>
          </table:table-cell>
          <table:table-cell office:value-type="string" table:style-name="ce3">
            <text:p>KIT CHAVE 8 POSICOE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50.90</text:p>
          </table:table-cell>
          <table:table-cell office:value-type="string" table:style-name="ce3">
            <text:p>789900561930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4" table:style-name="ce4">
            <text:p><text:s/>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6445</text:p>
          </table:table-cell>
          <table:table-cell office:value-type="string" table:style-name="ce5">
            <text:p>KIT DE INTERLIGACAO-2 CAPS-2 ABR.-2 ADAPTADORE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90.90</text:p>
          </table:table-cell>
          <table:table-cell office:value-type="string" table:style-name="ce5">
            <text:p>789900560795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0" table:style-name="ce6">
            <text:p><text:s/>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171</text:p>
          </table:table-cell>
          <table:table-cell office:value-type="string" table:style-name="ce3">
            <text:p>KIT DEGEL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32.10.90</text:p>
          </table:table-cell>
          <table:table-cell office:value-type="string" table:style-name="ce3">
            <text:p>789900560925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83" table:style-name="ce4">
            <text:p><text:s/>38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2056</text:p>
          </table:table-cell>
          <table:table-cell office:value-type="string" table:style-name="ce5">
            <text:p>KIT DISPOSITIVOS VINIL STANDAR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990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68" table:style-name="ce6">
            <text:p><text:s/>56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2057</text:p>
          </table:table-cell>
          <table:table-cell office:value-type="string" table:style-name="ce3">
            <text:p>KIT DISPOSITIVOS VINIL TOP LINE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91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045" table:style-name="ce4">
            <text:p><text:s/>1.04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353</text:p>
          </table:table-cell>
          <table:table-cell office:value-type="string" table:style-name="ce5">
            <text:p>KIT FIXACAO DEGRAU INOX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539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9.06" table:style-name="ce6">
            <text:p><text:s/>29,0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6948</text:p>
          </table:table-cell>
          <table:table-cell office:value-type="string" table:style-name="ce3">
            <text:p>KIT FIXACAO GARRAS REF PLANO UNIVERSAL IODO E LED 133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99.00</text:p>
          </table:table-cell>
          <table:table-cell office:value-type="string" table:style-name="ce3">
            <text:p>7899005611808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4.53" table:style-name="ce4">
            <text:p><text:s/>24,5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619</text:p>
          </table:table-cell>
          <table:table-cell office:value-type="string" table:style-name="ce5">
            <text:p>KIT FLANGEAMENTO DA/DR/DHM - STANDART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938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4.35" table:style-name="ce6">
            <text:p><text:s/>34,3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620</text:p>
          </table:table-cell>
          <table:table-cell office:value-type="string" table:style-name="ce3">
            <text:p>KIT FLANGEAMENTO DA/DR/DHM - TOP LINE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39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7.3" table:style-name="ce4">
            <text:p><text:s/>47,3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237</text:p>
          </table:table-cell>
          <table:table-cell office:value-type="string" table:style-name="ce5">
            <text:p>KIT FLANGEAMENTO EM PLAST. P/NICHO G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985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01.73" table:style-name="ce6">
            <text:p><text:s/>101,7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238</text:p>
          </table:table-cell>
          <table:table-cell office:value-type="string" table:style-name="ce3">
            <text:p>KIT FLANGEAMENTO EM PLASTICO P/ NICHO P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83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2.27" table:style-name="ce4">
            <text:p><text:s/>42,2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239</text:p>
          </table:table-cell>
          <table:table-cell office:value-type="string" table:style-name="ce5">
            <text:p>KIT FLANGEAMENTO EM PLASTICO P/NICHO M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984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5.48" table:style-name="ce6">
            <text:p><text:s/>55,4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621</text:p>
          </table:table-cell>
          <table:table-cell office:value-type="string" table:style-name="ce3">
            <text:p>KIT FLANGEAMENTO P/ DRENO DE FUNDO - STD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40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1.92" table:style-name="ce4">
            <text:p><text:s/>81,9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622</text:p>
          </table:table-cell>
          <table:table-cell office:value-type="string" table:style-name="ce5">
            <text:p>KIT FLANGEAMENTO P/ DRENO DE FUNDO - TOP LINE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941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0.599999999999994" table:style-name="ce6">
            <text:p><text:s/>80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240</text:p>
          </table:table-cell>
          <table:table-cell office:value-type="string" table:style-name="ce3">
            <text:p>KIT FLANGEAMENTOEM PLASTICO P/NNICHO GG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86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50.62" table:style-name="ce4">
            <text:p><text:s/>150,6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6444</text:p>
          </table:table-cell>
          <table:table-cell office:value-type="string" table:style-name="ce5">
            <text:p>KIT HIDRAULICO FINAL C/3 CAPS -3 ABRAC E 3 ADAPTADORE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90.90</text:p>
          </table:table-cell>
          <table:table-cell office:value-type="string" table:style-name="ce5">
            <text:p>789900560794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5" table:style-name="ce6">
            <text:p><text:s/>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732</text:p>
          </table:table-cell>
          <table:table-cell office:value-type="string" table:style-name="ce3">
            <text:p>KIT INSTALACAO COBRE 1 1/2 P/ GV 6/9/12 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0301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30" table:style-name="ce4">
            <text:p><text:s/>1.0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733</text:p>
          </table:table-cell>
          <table:table-cell office:value-type="string" table:style-name="ce5">
            <text:p>KIT INSTALACAO COBRE 2POL. P/ GV 15/18/24/27 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0302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530" table:style-name="ce6">
            <text:p><text:s/>1.5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71</text:p>
          </table:table-cell>
          <table:table-cell office:value-type="string" table:style-name="ce3">
            <text:p>KIT INSTALACAO FLEXIVEL INOX 1 1/2 P/ GV 6/9/12K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775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0" table:style-name="ce4">
            <text:p><text:s/>8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72</text:p>
          </table:table-cell>
          <table:table-cell office:value-type="string" table:style-name="ce5">
            <text:p>KIT INSTALACAO FLEXIVEL INOX 2POL. P/ GV 15/18/24/27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776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280" table:style-name="ce6">
            <text:p><text:s/>1.2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130</text:p>
          </table:table-cell>
          <table:table-cell office:value-type="string" table:style-name="ce3">
            <text:p>KIT LIMPEZA PISCINAS ABOVE GROUND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1203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" table:style-name="ce4">
            <text:p><text:s/>29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54</text:p>
          </table:table-cell>
          <table:table-cell office:value-type="string" table:style-name="ce5">
            <text:p>KIT LIMPEZA PISCINAS FIB/ALV (ASP. 8 RODAS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024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38" table:style-name="ce6">
            <text:p><text:s/>23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53</text:p>
          </table:table-cell>
          <table:table-cell office:value-type="string" table:style-name="ce3">
            <text:p>KIT LIMPEZA PISCINAS VINIL/FIB/ALV(ASA DELTA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023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6" table:style-name="ce4">
            <text:p><text:s/>20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988</text:p>
          </table:table-cell>
          <table:table-cell office:value-type="string" table:style-name="ce5">
            <text:p>KIT LIMPEZA SLIM PISCINAS ALV/FIB/VINI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845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7" table:style-name="ce6">
            <text:p><text:s/>14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343</text:p>
          </table:table-cell>
          <table:table-cell office:value-type="string" table:style-name="ce3">
            <text:p>KIT PARAFUSO DRENO DE FUNDO STANDARD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6834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60.78" table:style-name="ce4">
            <text:p><text:s/>60,7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128</text:p>
          </table:table-cell>
          <table:table-cell office:value-type="string" table:style-name="ce5">
            <text:p>KIT PARAFUSO DRENO DE FUNDO TOP LINE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355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65" table:style-name="ce6">
            <text:p><text:s/>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3712</text:p>
          </table:table-cell>
          <table:table-cell office:value-type="string" table:style-name="ce3">
            <text:p>KIT PARAFUSOS CHUMBADOR BANC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257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4" table:style-name="ce4">
            <text:p><text:s/>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1111</text:p>
          </table:table-cell>
          <table:table-cell office:value-type="string" table:style-name="ce5">
            <text:p>KIT PARAFUSOS TAMPA DE ALTA VAZA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674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5.200000000000003" table:style-name="ce6">
            <text:p><text:s/>35,2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220</text:p>
          </table:table-cell>
          <table:table-cell office:value-type="string" table:style-name="ce3">
            <text:p>KIT REPARO COLETOR SOLAR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90.90</text:p>
          </table:table-cell>
          <table:table-cell office:value-type="string" table:style-name="ce3">
            <text:p>789900561221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3" table:style-name="ce4">
            <text:p><text:s/>5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80</text:p>
          </table:table-cell>
          <table:table-cell office:value-type="string" table:style-name="ce5">
            <text:p>KIT REPARO VINI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5.90.90</text:p>
          </table:table-cell>
          <table:table-cell office:value-type="string" table:style-name="ce5">
            <text:p>789900560150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6" table:style-name="ce6">
            <text:p><text:s/>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3760</text:p>
          </table:table-cell>
          <table:table-cell office:value-type="string" table:style-name="ce3">
            <text:p>KIT TELA EM PLAST. P/ ESPREGUI. CARIBE (AZUL CLARO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7268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24" table:style-name="ce4">
            <text:p><text:s/>32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3757</text:p>
          </table:table-cell>
          <table:table-cell office:value-type="string" table:style-name="ce5">
            <text:p>KIT TELA EM PLAST. P/ ESPREGUI. CARIBE (AZUL MARINHO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680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78.7" table:style-name="ce6">
            <text:p><text:s/>278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3761</text:p>
          </table:table-cell>
          <table:table-cell office:value-type="string" table:style-name="ce3">
            <text:p>KIT TELA EM PLAST. P/ ESPREGUI. IBIZA (AZUL CLARO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7381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78.7" table:style-name="ce4">
            <text:p><text:s/>278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3758</text:p>
          </table:table-cell>
          <table:table-cell office:value-type="string" table:style-name="ce5">
            <text:p>KIT TELA EM PLAST. P/ ESPREGUI. IBIZA (AZUL MARINHO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6810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95.5" table:style-name="ce6">
            <text:p><text:s/>295,5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886</text:p>
          </table:table-cell>
          <table:table-cell office:value-type="string" table:style-name="ce3">
            <text:p>KIT TELA EM PLAST. P/ ESPREGUICADEIRA CARIBE (BRANCO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102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40" table:style-name="ce4">
            <text:p><text:s/>5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887</text:p>
          </table:table-cell>
          <table:table-cell office:value-type="string" table:style-name="ce5">
            <text:p>KIT TELA EM PLAST. P/ ESPREGUICADEIRA IBIZA (BRANCO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718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540" table:style-name="ce6">
            <text:p><text:s/>5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3759</text:p>
          </table:table-cell>
          <table:table-cell office:value-type="string" table:style-name="ce3">
            <text:p>KIT TELA EM PLAST. P/ POLT. CARIBE / IBIZA (AZUL CLARO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7398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50" table:style-name="ce4">
            <text:p><text:s/>2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3756</text:p>
          </table:table-cell>
          <table:table-cell office:value-type="string" table:style-name="ce5">
            <text:p>KIT TELA EM PLAST. P/ POLT. CARIBE / IBIZA (AZUL MAR.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6797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80" table:style-name="ce6">
            <text:p><text:s/>1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885</text:p>
          </table:table-cell>
          <table:table-cell office:value-type="string" table:style-name="ce3">
            <text:p>KIT TELA EM PLAST. P/ POLTRONAS CARIBE / IBIZA (BRANCO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101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50" table:style-name="ce4">
            <text:p><text:s/>2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647</text:p>
          </table:table-cell>
          <table:table-cell office:value-type="string" table:style-name="ce5">
            <text:p>LACO DE ALUMINIO SALVA VIDA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1423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66" table:style-name="ce6">
            <text:p><text:s/>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3710</text:p>
          </table:table-cell>
          <table:table-cell office:value-type="string" table:style-name="ce3">
            <text:p>LAMPADA <text:s/>IODO H3 P/ REFLET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9.21.10</text:p>
          </table:table-cell>
          <table:table-cell office:value-type="string" table:style-name="ce3">
            <text:p>789900561678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72.599999999999994" table:style-name="ce4">
            <text:p><text:s/>72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82</text:p>
          </table:table-cell>
          <table:table-cell office:value-type="string" table:style-name="ce5">
            <text:p>LAMPADA 35W UVC POWE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39.21.10</text:p>
          </table:table-cell>
          <table:table-cell office:value-type="string" table:style-name="ce5">
            <text:p>7899005613567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71.8" table:style-name="ce6">
            <text:p><text:s/>371,8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283</text:p>
          </table:table-cell>
          <table:table-cell office:value-type="string" table:style-name="ce3">
            <text:p>LAMPADA 55W UVC POWE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39.21.10</text:p>
          </table:table-cell>
          <table:table-cell office:value-type="string" table:style-name="ce3">
            <text:p>789900561357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77.4" table:style-name="ce4">
            <text:p><text:s/>477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84</text:p>
          </table:table-cell>
          <table:table-cell office:value-type="string" table:style-name="ce5">
            <text:p>LAMPADA 95W UVC POWE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39.21.10</text:p>
          </table:table-cell>
          <table:table-cell office:value-type="string" table:style-name="ce5">
            <text:p>7899005613581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542.29999999999995" table:style-name="ce6">
            <text:p><text:s/>542,3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38</text:p>
          </table:table-cell>
          <table:table-cell office:value-type="string" table:style-name="ce3">
            <text:p>LAMPADA DE 24V AMARELA PARA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578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1.58" table:style-name="ce4">
            <text:p><text:s/>41,5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151</text:p>
          </table:table-cell>
          <table:table-cell office:value-type="string" table:style-name="ce5">
            <text:p>LAMPADA DE 24V AZUL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41.41.22</text:p>
          </table:table-cell>
          <table:table-cell office:value-type="string" table:style-name="ce5">
            <text:p>7899005629148</text:p>
          </table:table-cell>
          <table:table-cell office:value-type="float" office:value="1.3" table:style-name="ce6">
            <text:p><text:s/>1,30<text:s/></text:p>
          </table:table-cell>
          <table:table-cell office:value-type="float" office:value="17" table:style-name="ce6">
            <text:p><text:s/>1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39</text:p>
          </table:table-cell>
          <table:table-cell office:value-type="string" table:style-name="ce3">
            <text:p>LAMPADA DE 24V VERDE PARA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579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1.58" table:style-name="ce4">
            <text:p><text:s/>41,5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40</text:p>
          </table:table-cell>
          <table:table-cell office:value-type="string" table:style-name="ce5">
            <text:p>LAMPADA DE 24V VERMELHA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580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1.58" table:style-name="ce6">
            <text:p><text:s/>41,5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45</text:p>
          </table:table-cell>
          <table:table-cell office:value-type="string" table:style-name="ce3">
            <text:p>LAMPADA DE 50 WATTS DICROICA P/ REFLETORE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9.21.10</text:p>
          </table:table-cell>
          <table:table-cell office:value-type="string" table:style-name="ce3">
            <text:p>789900561085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6.42" table:style-name="ce4">
            <text:p><text:s/>26,4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991</text:p>
          </table:table-cell>
          <table:table-cell office:value-type="string" table:style-name="ce5">
            <text:p>LAMPADA PARA SUV 17 M3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6599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175.98" table:style-name="ce6">
            <text:p><text:s/>1.175,9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990</text:p>
          </table:table-cell>
          <table:table-cell office:value-type="string" table:style-name="ce3">
            <text:p>LAMPADA PARA SUV 7M³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6582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914.34" table:style-name="ce4">
            <text:p><text:s/>914,3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3271</text:p>
          </table:table-cell>
          <table:table-cell office:value-type="string" table:style-name="ce5">
            <text:p>LATERAL ESCADA TRADICIONAL 04 DEGRAUS C/CHUMB/PONTEIR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426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656" table:style-name="ce6">
            <text:p><text:s/>65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576</text:p>
          </table:table-cell>
          <table:table-cell office:value-type="string" table:style-name="ce3">
            <text:p>LENTE PARA LUMINARIA EM POLICARBONAT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99.00</text:p>
          </table:table-cell>
          <table:table-cell office:value-type="string" table:style-name="ce3">
            <text:p>789900561609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89.5" table:style-name="ce4">
            <text:p><text:s/>89,5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float" office:value="22190" table:style-name="ce5">
            <text:p>22190</text:p>
          </table:table-cell>
          <table:table-cell office:value-type="string" table:style-name="ce5">
            <text:p>LUMIN COB 10W RGB AI316 CB1,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919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05" table:style-name="ce6">
            <text:p><text:s/>40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13</text:p>
          </table:table-cell>
          <table:table-cell office:value-type="string" table:style-name="ce3">
            <text:p>LUMIN COB 10W RGB AI316 CB1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2808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73" table:style-name="ce4">
            <text:p><text:s/>57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600</text:p>
          </table:table-cell>
          <table:table-cell office:value-type="string" table:style-name="ce5">
            <text:p>LUMIN COB 10W RGB AI316 CB20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2851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633" table:style-name="ce6">
            <text:p><text:s/>63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635</text:p>
          </table:table-cell>
          <table:table-cell office:value-type="string" table:style-name="ce3">
            <text:p>LUMIN COB 18W RGB AI316 CB 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32421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50" table:style-name="ce4">
            <text:p><text:s/>4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28</text:p>
          </table:table-cell>
          <table:table-cell office:value-type="string" table:style-name="ce5">
            <text:p>LUMIN COB PLASTICO <text:s/>RGB 5W CB1,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2165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60" table:style-name="ce6">
            <text:p><text:s/>1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294</text:p>
          </table:table-cell>
          <table:table-cell office:value-type="string" table:style-name="ce3">
            <text:p>LUMIN COB PLASTICO <text:s/>RGB 5W CB1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24495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19" table:style-name="ce4">
            <text:p><text:s/>41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42</text:p>
          </table:table-cell>
          <table:table-cell office:value-type="string" table:style-name="ce5">
            <text:p>LUMIN HIPER LED 27W RGB LATAO CABO 1,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289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83.4" table:style-name="ce6">
            <text:p><text:s/>183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01</text:p>
          </table:table-cell>
          <table:table-cell office:value-type="string" table:style-name="ce3">
            <text:p>LUMIN HIPER LED 27W RGB LATAO CABO 1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2935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714" table:style-name="ce4">
            <text:p><text:s/>71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456</text:p>
          </table:table-cell>
          <table:table-cell office:value-type="string" table:style-name="ce5">
            <text:p>LUMIN HIPER LED 50 PREMIUM 9W RGB ACAB INOX USINAD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4045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67" table:style-name="ce6">
            <text:p><text:s/>36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875</text:p>
          </table:table-cell>
          <table:table-cell office:value-type="string" table:style-name="ce3">
            <text:p>LUMIN HIPER LED 9W AZ PL P/ TUBO50 C/ ACAB INOX CB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716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10" table:style-name="ce4">
            <text:p><text:s/>3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255</text:p>
          </table:table-cell>
          <table:table-cell office:value-type="string" table:style-name="ce5">
            <text:p>LUMIN HIPER LED 9W BC PL P/ TUBO50 C/ ACAB INOX CB1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7961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525" table:style-name="ce6">
            <text:p><text:s/>52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874</text:p>
          </table:table-cell>
          <table:table-cell office:value-type="string" table:style-name="ce3">
            <text:p>LUMIN HIPER LED 9W BC PL P/ TUBO50 C/ACAB INOX CB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7152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10" table:style-name="ce4">
            <text:p><text:s/>3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213</text:p>
          </table:table-cell>
          <table:table-cell office:value-type="string" table:style-name="ce5">
            <text:p>LUMIN HIPER LED 9W RGB P/ TUBO25 C/ ACAB PLAST CB1,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3895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20" table:style-name="ce6">
            <text:p><text:s/>2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05</text:p>
          </table:table-cell>
          <table:table-cell office:value-type="string" table:style-name="ce3">
            <text:p>LUMIN LED 133 PRATIC RGB CB1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302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00" table:style-name="ce4">
            <text:p><text:s/>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803</text:p>
          </table:table-cell>
          <table:table-cell office:value-type="string" table:style-name="ce5">
            <text:p>LUMIN LED ECO 4,5W RGB PLAST. CB 1,50 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2865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50" table:style-name="ce6">
            <text:p><text:s/>1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801</text:p>
          </table:table-cell>
          <table:table-cell office:value-type="string" table:style-name="ce3">
            <text:p>LUMIN LED ECO 9,0W RGB PLAST. CB 1,50 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28561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68" table:style-name="ce4">
            <text:p><text:s/>16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930</text:p>
          </table:table-cell>
          <table:table-cell office:value-type="string" table:style-name="ce5">
            <text:p>LUMIN LED ECO 9W CINZA RGB PL 1,50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3122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60" table:style-name="ce6">
            <text:p><text:s/>1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49</text:p>
          </table:table-cell>
          <table:table-cell office:value-type="string" table:style-name="ce3">
            <text:p>LUMIN LED ECO 9W MONO AZUL INOX 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3219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80" table:style-name="ce4">
            <text:p><text:s/>1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450</text:p>
          </table:table-cell>
          <table:table-cell office:value-type="string" table:style-name="ce5">
            <text:p>LUMIN LED ECO 9W MONO BRANCO INOX 1,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32209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80" table:style-name="ce6">
            <text:p><text:s/>1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381</text:p>
          </table:table-cell>
          <table:table-cell office:value-type="string" table:style-name="ce3">
            <text:p>LUMIN LED ECO 9W RGB INOX 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3218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80" table:style-name="ce4">
            <text:p><text:s/>1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018</text:p>
          </table:table-cell>
          <table:table-cell office:value-type="string" table:style-name="ce5">
            <text:p>LUMIN LED ECO 9W RGB INOX 1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33145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14" table:style-name="ce6">
            <text:p><text:s/>31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47</text:p>
          </table:table-cell>
          <table:table-cell office:value-type="string" table:style-name="ce3">
            <text:p>LUMIN SMD 133 PRATIC RGB CB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3017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95" table:style-name="ce4">
            <text:p><text:s/>3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40</text:p>
          </table:table-cell>
          <table:table-cell office:value-type="string" table:style-name="ce5">
            <text:p>LUMIN SMD 36W PRATIC BR CB1,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304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203" table:style-name="ce6">
            <text:p><text:s/>1.20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39</text:p>
          </table:table-cell>
          <table:table-cell office:value-type="string" table:style-name="ce3">
            <text:p>LUMIN SMD 36W PRATIC BR CB1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325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303" table:style-name="ce4">
            <text:p><text:s/>1.30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326</text:p>
          </table:table-cell>
          <table:table-cell office:value-type="string" table:style-name="ce5">
            <text:p>LUMIN SMD 36W PRATIC RGB CB1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324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365" table:style-name="ce6">
            <text:p><text:s/>1.3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45</text:p>
          </table:table-cell>
          <table:table-cell office:value-type="string" table:style-name="ce3">
            <text:p>LUMIN SMD 5W RGB CB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283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24" table:style-name="ce4">
            <text:p><text:s/>22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99</text:p>
          </table:table-cell>
          <table:table-cell office:value-type="string" table:style-name="ce5">
            <text:p>LUMIN SMD 5W RGB CB1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287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40" table:style-name="ce6">
            <text:p><text:s/>3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294</text:p>
          </table:table-cell>
          <table:table-cell office:value-type="string" table:style-name="ce3">
            <text:p>LUMIN SMD 9W MONO AZ CB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2812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85" table:style-name="ce4">
            <text:p><text:s/>28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97</text:p>
          </table:table-cell>
          <table:table-cell office:value-type="string" table:style-name="ce5">
            <text:p>LUMIN SMD 9W MONO AZ CB1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2850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35" table:style-name="ce6">
            <text:p><text:s/>4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295</text:p>
          </table:table-cell>
          <table:table-cell office:value-type="string" table:style-name="ce3">
            <text:p>LUMIN SMD 9W MONO BR CB1,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282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85" table:style-name="ce4">
            <text:p><text:s/>28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98</text:p>
          </table:table-cell>
          <table:table-cell office:value-type="string" table:style-name="ce5">
            <text:p>LUMIN SMD 9W MONO BR CB1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2867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30" table:style-name="ce6">
            <text:p><text:s/>4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44</text:p>
          </table:table-cell>
          <table:table-cell office:value-type="string" table:style-name="ce3">
            <text:p>LUMIN SMD 9W RGB CB1,5 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12805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40" table:style-name="ce4">
            <text:p><text:s/>2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96</text:p>
          </table:table-cell>
          <table:table-cell office:value-type="string" table:style-name="ce5">
            <text:p>LUMIN SMD 9W RGB CB15M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1284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00" table:style-name="ce6">
            <text:p><text:s/>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026</text:p>
          </table:table-cell>
          <table:table-cell office:value-type="string" table:style-name="ce3">
            <text:p>LUMINARIA DE MADEIRA P/ SAUNA SECA (S/ SOQUETE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4420.90.00</text:p>
          </table:table-cell>
          <table:table-cell office:value-type="string" table:style-name="ce3">
            <text:p>789900563321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0" table:style-name="ce4">
            <text:p><text:s/>3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579</text:p>
          </table:table-cell>
          <table:table-cell office:value-type="string" table:style-name="ce5">
            <text:p>LUMINARIA LED 9W RGB THIN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3449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40" table:style-name="ce6">
            <text:p><text:s/>4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579</text:p>
          </table:table-cell>
          <table:table-cell office:value-type="string" table:style-name="ce3">
            <text:p>LUMINARIA LED 9W RGB THIN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405.49.00</text:p>
          </table:table-cell>
          <table:table-cell office:value-type="string" table:style-name="ce3">
            <text:p>789900563449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40" table:style-name="ce4">
            <text:p><text:s/>4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031</text:p>
          </table:table-cell>
          <table:table-cell office:value-type="string" table:style-name="ce5">
            <text:p>LUMINARIA P/FONTE 24V A.INOX 304 23C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405.49.00</text:p>
          </table:table-cell>
          <table:table-cell office:value-type="string" table:style-name="ce5">
            <text:p>789900563337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460" table:style-name="ce6">
            <text:p><text:s/>2.4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772</text:p>
          </table:table-cell>
          <table:table-cell office:value-type="string" table:style-name="ce3">
            <text:p>LUMINARIA PARA SAUNA S/ LAMPAD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405.19.90</text:p>
          </table:table-cell>
          <table:table-cell office:value-type="string" table:style-name="ce3">
            <text:p>789900563318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" table:style-name="ce4">
            <text:p><text:s/>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786</text:p>
          </table:table-cell>
          <table:table-cell office:value-type="string" table:style-name="ce5">
            <text:p>LUVA PLASTICA PARA DA PRATIC <text:s/>50MM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393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2" table:style-name="ce6">
            <text:p><text:s/>1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6682</text:p>
          </table:table-cell>
          <table:table-cell office:value-type="string" table:style-name="ce3">
            <text:p>MANCAL COMPLETO (SUPORTE CORR. UNIV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493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59" table:style-name="ce4">
            <text:p><text:s/>25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805</text:p>
          </table:table-cell>
          <table:table-cell office:value-type="string" table:style-name="ce5">
            <text:p>MANGUEIRA DO CHUVEIRO DE MAO DA DUCHA PAINE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512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7" table:style-name="ce6">
            <text:p><text:s/>4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883</text:p>
          </table:table-cell>
          <table:table-cell office:value-type="string" table:style-name="ce3">
            <text:p>MANGUEIRA FLUTUANTE 1 1/2 C/ 25M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2.90</text:p>
          </table:table-cell>
          <table:table-cell office:value-type="string" table:style-name="ce3">
            <text:p>789900563295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5" table:style-name="ce4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34</text:p>
          </table:table-cell>
          <table:table-cell office:value-type="string" table:style-name="ce5">
            <text:p>MANGUEIRA FLUTUANTE 2"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2.90</text:p>
          </table:table-cell>
          <table:table-cell office:value-type="string" table:style-name="ce5">
            <text:p>789900560004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81" table:style-name="ce6">
            <text:p><text:s/>8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956</text:p>
          </table:table-cell>
          <table:table-cell office:value-type="string" table:style-name="ce3">
            <text:p>MANIPLO TRAVA <text:s/>DO <text:s/>ENROLADOR DE CAPA INOX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5615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4.25" table:style-name="ce4">
            <text:p><text:s/>24,2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340</text:p>
          </table:table-cell>
          <table:table-cell office:value-type="string" table:style-name="ce5">
            <text:p>MANIPULO ROBO LIMPADOR AUT. PISCINA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963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76" table:style-name="ce6">
            <text:p><text:s/>27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39</text:p>
          </table:table-cell>
          <table:table-cell office:value-type="string" table:style-name="ce3">
            <text:p>MANIPULO ROBO LIMPADOR AUTOMATICO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00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" table:style-name="ce4">
            <text:p><text:s/>98,00<text:s/></text:p>
          </table:table-cell>
          <table:table-cell office:value-type="float" office:value="4" table:formula="of:=IFERROR(VLOOKUP([.A:.A];['SB1'.B:.G];6;FALSE);&quot;&quot;)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22</text:p>
          </table:table-cell>
          <table:table-cell office:value-type="string" table:style-name="ce5">
            <text:p>MANIPULO ROBO LIMPADOR AUTOMATICO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1983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32" table:style-name="ce6">
            <text:p><text:s/>232,00<text:s/></text:p>
          </table:table-cell>
          <table:table-cell office:value-type="float" office:value="4" table:formula="of:=IFERROR(VLOOKUP([.A:.A];['SB1'.B:.G];6;FALSE);&quot;&quot;)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4308</text:p>
          </table:table-cell>
          <table:table-cell office:value-type="string" table:style-name="ce3">
            <text:p>MANIVELA ENROLADOR DE CAP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469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57" table:style-name="ce4">
            <text:p><text:s/>35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45</text:p>
          </table:table-cell>
          <table:table-cell office:value-type="string" table:style-name="ce5">
            <text:p>MANOPLA PLAST. DE APOIO 1 P/ CABOS DE 6 METRO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015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9.7" table:style-name="ce6">
            <text:p><text:s/>29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46</text:p>
          </table:table-cell>
          <table:table-cell office:value-type="string" table:style-name="ce3">
            <text:p>MANOPLA PLAST. DE APOIO 1.1/8 P/ CABOS 2 A 5 MT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0161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9" table:style-name="ce4">
            <text:p><text:s/>1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774</text:p>
          </table:table-cell>
          <table:table-cell office:value-type="string" table:style-name="ce5">
            <text:p>MEDIDOR UMIDADE TEMPERATURA MADEI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32.89.82</text:p>
          </table:table-cell>
          <table:table-cell office:value-type="string" table:style-name="ce5">
            <text:p>7899005633190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20" table:style-name="ce6">
            <text:p><text:s/>3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391</text:p>
          </table:table-cell>
          <table:table-cell office:value-type="string" table:style-name="ce3">
            <text:p>MESA COM TUBO 1 1/2 EM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828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200" table:style-name="ce4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216</text:p>
          </table:table-cell>
          <table:table-cell office:value-type="string" table:style-name="ce5">
            <text:p>MINI CONTATOR 2CV 220VAC 50/60HZ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866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16" table:style-name="ce6">
            <text:p><text:s/>51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137</text:p>
          </table:table-cell>
          <table:table-cell office:value-type="string" table:style-name="ce3">
            <text:p>MINI CONTATOR B6-30-10 24V <text:s/>60HZ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700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03" table:style-name="ce4">
            <text:p><text:s/>20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90</text:p>
          </table:table-cell>
          <table:table-cell office:value-type="string" table:style-name="ce5">
            <text:p>MINI CONTATOR BOBINA 220 VAC 50/60 HZ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368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91" table:style-name="ce6">
            <text:p><text:s/>29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219</text:p>
          </table:table-cell>
          <table:table-cell office:value-type="string" table:style-name="ce3">
            <text:p>MINI DISJUNTOR 10A CLASSE 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20.00</text:p>
          </table:table-cell>
          <table:table-cell office:value-type="string" table:style-name="ce3">
            <text:p>7899005619255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80" table:style-name="ce4">
            <text:p><text:s/>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220</text:p>
          </table:table-cell>
          <table:table-cell office:value-type="string" table:style-name="ce5">
            <text:p>MINI DISJUNTOR 16A CLASSE C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20.00</text:p>
          </table:table-cell>
          <table:table-cell office:value-type="string" table:style-name="ce5">
            <text:p>7899005619262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80" table:style-name="ce6">
            <text:p><text:s/>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047</text:p>
          </table:table-cell>
          <table:table-cell office:value-type="string" table:style-name="ce3">
            <text:p>MINI FILTRO CESTO CATA FOLHA EASY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21.00</text:p>
          </table:table-cell>
          <table:table-cell office:value-type="string" table:style-name="ce3">
            <text:p>789900561850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0" table:style-name="ce4">
            <text:p><text:s/>4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43</text:p>
          </table:table-cell>
          <table:table-cell office:value-type="string" table:style-name="ce5">
            <text:p>MODULO WI-FI PARA TROCADOR DE CALOR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3006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150" table:style-name="ce6">
            <text:p><text:s/>1.1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892</text:p>
          </table:table-cell>
          <table:table-cell office:value-type="string" table:style-name="ce3">
            <text:p>MODULO WIFI M2 P/ TOUCH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32.89.82</text:p>
          </table:table-cell>
          <table:table-cell office:value-type="string" table:style-name="ce3">
            <text:p>789900563194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40" table:style-name="ce4">
            <text:p><text:s/>4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04</text:p>
          </table:table-cell>
          <table:table-cell office:value-type="string" table:style-name="ce5">
            <text:p>MOLA TRAVA MANIPULO ROBO LIMPADOR AUTOMATICO WAVE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0626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6" table:style-name="ce6">
            <text:p><text:s/>6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4935</text:p>
          </table:table-cell>
          <table:table-cell office:value-type="string" table:style-name="ce3">
            <text:p>MONITOR DE TENSAO 220V JPX-175 P/ LINHA TH/SD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26.10.29</text:p>
          </table:table-cell>
          <table:table-cell office:value-type="string" table:style-name="ce3">
            <text:p>789900562871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7" table:style-name="ce4">
            <text:p><text:s/>49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936</text:p>
          </table:table-cell>
          <table:table-cell office:value-type="string" table:style-name="ce5">
            <text:p>MONITOR DE TENSAO 380V JPX-175 P/ LINHA TH/SD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026.10.29</text:p>
          </table:table-cell>
          <table:table-cell office:value-type="string" table:style-name="ce5">
            <text:p>789900562872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97" table:style-name="ce6">
            <text:p><text:s/>49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487</text:p>
          </table:table-cell>
          <table:table-cell office:value-type="string" table:style-name="ce3">
            <text:p>MONITOR DE TENSAO DE 380 VOLTS TRIF PARA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606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5.14" table:style-name="ce4">
            <text:p><text:s/>535,1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5963</text:p>
          </table:table-cell>
          <table:table-cell office:value-type="string" table:style-name="ce5">
            <text:p>MOSTRUARIO GERADOR DE VAPOR COMPACT LINE 6,0 / 9,0 K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744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84" table:style-name="ce6">
            <text:p><text:s/>48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965</text:p>
          </table:table-cell>
          <table:table-cell office:value-type="string" table:style-name="ce3">
            <text:p>MOSTRUARIO TROCADOR <text:s/>HORIZONTAL TH25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50.90</text:p>
          </table:table-cell>
          <table:table-cell office:value-type="string" table:style-name="ce3">
            <text:p>789900562159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6" table:style-name="ce4">
            <text:p><text:s/>90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366</text:p>
          </table:table-cell>
          <table:table-cell office:value-type="string" table:style-name="ce5">
            <text:p>MOSTRUARIO TROCADOR <text:s/>SD 15 / 25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9.50.90</text:p>
          </table:table-cell>
          <table:table-cell office:value-type="string" table:style-name="ce5">
            <text:p>789900561727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123" table:style-name="ce6">
            <text:p><text:s/>2.12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63</text:p>
          </table:table-cell>
          <table:table-cell office:value-type="string" table:style-name="ce3">
            <text:p>MOTOR 0,25 CV ROBO LIMP AUT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1.31.10</text:p>
          </table:table-cell>
          <table:table-cell office:value-type="string" table:style-name="ce3">
            <text:p>7899005621142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267" table:style-name="ce4">
            <text:p><text:s/>3.267,00<text:s/></text:p>
          </table:table-cell>
          <table:table-cell office:value-type="float" office:value="23" table:formula="of:=IFERROR(VLOOKUP([.A:.A];['SB1'.B:.G];6;FALSE);&quot;&quot;)" table:style-name="ce1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74</text:p>
          </table:table-cell>
          <table:table-cell office:value-type="string" table:style-name="ce5">
            <text:p>MOTOR 0,25 CV, CC - ROBO LIMPADOR AUTOMATICO RB4I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1.31.10</text:p>
          </table:table-cell>
          <table:table-cell office:value-type="string" table:style-name="ce5">
            <text:p>7899005620343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4472" table:style-name="ce6">
            <text:p><text:s/>4.472,00<text:s/></text:p>
          </table:table-cell>
          <table:table-cell office:value-type="float" office:value="19" table:formula="of:=IFERROR(VLOOKUP([.A:.A];['SB1'.B:.G];6;FALSE);&quot;&quot;)" table:style-name="ce1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65</text:p>
          </table:table-cell>
          <table:table-cell office:value-type="string" table:style-name="ce3">
            <text:p>MOTOR 0,25CV CC - ROBO LIMP AUT MOD 2X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1.31.10</text:p>
          </table:table-cell>
          <table:table-cell office:value-type="string" table:style-name="ce3">
            <text:p>7899005621166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4793" table:style-name="ce4">
            <text:p><text:s/>14.793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176</text:p>
          </table:table-cell>
          <table:table-cell office:value-type="string" table:style-name="ce5">
            <text:p>MOTOR MONOFASICO P/ FILTRO RECARREGAVE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1.40.19</text:p>
          </table:table-cell>
          <table:table-cell office:value-type="string" table:style-name="ce5">
            <text:p>7899005624365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67" table:style-name="ce6">
            <text:p><text:s/>16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10</text:p>
          </table:table-cell>
          <table:table-cell office:value-type="string" table:style-name="ce3">
            <text:p>MOTOR PARA VENTILADOR DO TROCADOR SD 105 A SD 16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15226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546" table:style-name="ce4">
            <text:p><text:s/>1.54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265</text:p>
          </table:table-cell>
          <table:table-cell office:value-type="string" table:style-name="ce5">
            <text:p>MOTOR PARA VENTILADOR TROCADOR SD 25 A 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office:value-type="string" table:style-name="ce5">
            <text:p>7899005615097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154" table:style-name="ce6">
            <text:p><text:s/>1.1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64</text:p>
          </table:table-cell>
          <table:table-cell office:value-type="string" table:style-name="ce3">
            <text:p>MOTOR ROBO LIMP AUT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1.31.10</text:p>
          </table:table-cell>
          <table:table-cell office:value-type="string" table:style-name="ce3">
            <text:p>7899005621159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4999" table:style-name="ce4">
            <text:p><text:s/>4.999,00<text:s/></text:p>
          </table:table-cell>
          <table:table-cell office:value-type="float" office:value="18" table:formula="of:=IFERROR(VLOOKUP([.A:.A];['SB1'.B:.G];6;FALSE);&quot;&quot;)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105</text:p>
          </table:table-cell>
          <table:table-cell office:value-type="string" table:style-name="ce5">
            <text:p>MOTOR ROBO LIMP AUT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1.31.10</text:p>
          </table:table-cell>
          <table:table-cell office:value-type="string" table:style-name="ce5">
            <text:p>7899005624327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6123" table:style-name="ce6">
            <text:p><text:s/>6.123,00<text:s/></text:p>
          </table:table-cell>
          <table:table-cell office:value-type="float" office:value="22" table:formula="of:=IFERROR(VLOOKUP([.A:.A];['SB1'.B:.G];6;FALSE);&quot;&quot;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5153</text:p>
          </table:table-cell>
          <table:table-cell office:value-type="string" table:style-name="ce3">
            <text:p>MOTOR VENT ANT HOR P/TROCADOR SD105A16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2913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093" table:style-name="ce4">
            <text:p><text:s/>1.09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262</text:p>
          </table:table-cell>
          <table:table-cell office:value-type="string" table:style-name="ce5">
            <text:p>MOTOR VENT ROT ANTI-HORARIO SD25 A SD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table:style-name="ce5"/>
          <table:table-cell office:value-type="float" office:value="6.5" table:style-name="ce6">
            <text:p><text:s/>6,50<text:s/></text:p>
          </table:table-cell>
          <table:table-cell office:value-type="float" office:value="682" table:style-name="ce6">
            <text:p><text:s/>68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970</text:p>
          </table:table-cell>
          <table:table-cell office:value-type="string" table:style-name="ce3">
            <text:p>MOTOR VENT. ANTI-HOR. P/ TROCADOR TH 10 A 80 (RP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28523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756.77" table:style-name="ce4">
            <text:p><text:s/>756,7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486</text:p>
          </table:table-cell>
          <table:table-cell office:value-type="string" table:style-name="ce5">
            <text:p>MOTOR VENTILADOR COMPLETO SD 105/1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table:style-name="ce5"/>
          <table:table-cell office:value-type="float" office:value="6.5" table:style-name="ce6">
            <text:p><text:s/>6,50<text:s/></text:p>
          </table:table-cell>
          <table:table-cell office:value-type="float" office:value="1718" table:style-name="ce6">
            <text:p><text:s/>1.7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485</text:p>
          </table:table-cell>
          <table:table-cell office:value-type="string" table:style-name="ce3">
            <text:p>MOTOR VENTILADOR COMPLETO SD 40/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34524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925" table:style-name="ce4">
            <text:p><text:s/>92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760</text:p>
          </table:table-cell>
          <table:table-cell office:value-type="string" table:style-name="ce5">
            <text:p>MOTOR VENTILADOR DC - TI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1.40.19</text:p>
          </table:table-cell>
          <table:table-cell table:style-name="ce5"/>
          <table:table-cell office:value-type="float" office:value="6.5" table:style-name="ce6">
            <text:p><text:s/>6,50<text:s/></text:p>
          </table:table-cell>
          <table:table-cell office:value-type="float" office:value="1130" table:style-name="ce6">
            <text:p><text:s/>1.1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806</text:p>
          </table:table-cell>
          <table:table-cell office:value-type="string" table:style-name="ce3">
            <text:p>MULTI GIRATORIO DUCHA 25 X 25 CM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352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" table:style-name="ce4">
            <text:p><text:s/>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146</text:p>
          </table:table-cell>
          <table:table-cell office:value-type="string" table:style-name="ce5">
            <text:p>NICHOM <text:s/>MINI BI IODO / LIGHT /P/LUMINARIA LED 61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99.00</text:p>
          </table:table-cell>
          <table:table-cell office:value-type="string" table:style-name="ce5">
            <text:p>789900560976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62.37" table:style-name="ce6">
            <text:p><text:s/>62,3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60</text:p>
          </table:table-cell>
          <table:table-cell office:value-type="string" table:style-name="ce3">
            <text:p>PAINEL AUTOMACAO P/ AQUECIMENTO SOLAR C/ APOIO ELETRI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313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323" table:style-name="ce4">
            <text:p><text:s/>3.32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834</text:p>
          </table:table-cell>
          <table:table-cell office:value-type="string" table:style-name="ce5">
            <text:p>PAINEL DE PART C/ CAIXA HERM P/ SD E TH 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583" table:style-name="ce6">
            <text:p><text:s/>58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832</text:p>
          </table:table-cell>
          <table:table-cell office:value-type="string" table:style-name="ce3">
            <text:p>PAINEL DE PART C/ CAIXA HERM SD10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818" table:style-name="ce4">
            <text:p><text:s/>8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830</text:p>
          </table:table-cell>
          <table:table-cell office:value-type="string" table:style-name="ce5">
            <text:p>PAINEL DE PART C/ CAIXA HERM TH6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656" table:style-name="ce6">
            <text:p><text:s/>65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829</text:p>
          </table:table-cell>
          <table:table-cell office:value-type="string" table:style-name="ce3">
            <text:p>PAINEL DE PARTIDA C/ CAIXA HERMETICA P/ SD E TH 4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3221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642" table:style-name="ce4">
            <text:p><text:s/>64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260</text:p>
          </table:table-cell>
          <table:table-cell office:value-type="string" table:style-name="ce5">
            <text:p>PAINEL DE PARTIDA C/ CX. HERMETICA SD6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2002" table:style-name="ce6">
            <text:p><text:s/>2.00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59</text:p>
          </table:table-cell>
          <table:table-cell office:value-type="string" table:style-name="ce3">
            <text:p>PAINEL DIGITAL P/ BATERIA DE TROCADOR DE CALOR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312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400" table:style-name="ce4">
            <text:p><text:s/>2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912</text:p>
          </table:table-cell>
          <table:table-cell office:value-type="string" table:style-name="ce5">
            <text:p>PAINEL DIGITAL P/BATERIA TIV 25/45/65/75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1778" table:style-name="ce6">
            <text:p><text:s/>1.77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357</text:p>
          </table:table-cell>
          <table:table-cell office:value-type="string" table:style-name="ce3">
            <text:p>PAINEL DIGITAL P/TROCADOR DE CALOR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310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200" table:style-name="ce4">
            <text:p><text:s/>1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436</text:p>
          </table:table-cell>
          <table:table-cell office:value-type="string" table:style-name="ce5">
            <text:p>PAINEL DIGITAL TIV 15 / TB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3384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379" table:style-name="ce6">
            <text:p><text:s/>1.37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065</text:p>
          </table:table-cell>
          <table:table-cell office:value-type="string" table:style-name="ce3">
            <text:p>PAINEL ELETRICO COM CONTROLE TOUCH SD2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3315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634" table:style-name="ce4">
            <text:p><text:s/>4.63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893</text:p>
          </table:table-cell>
          <table:table-cell office:value-type="string" table:style-name="ce5">
            <text:p>PAINEL ELETRICO PARA TROCADOR SD 105 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7369" table:style-name="ce6">
            <text:p><text:s/>7.36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949</text:p>
          </table:table-cell>
          <table:table-cell office:value-type="string" table:style-name="ce3">
            <text:p>PAINEL ELETRICO PARA TROCADOR SD 105 B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932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221" table:style-name="ce4">
            <text:p><text:s/>7.22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950</text:p>
          </table:table-cell>
          <table:table-cell office:value-type="string" table:style-name="ce5">
            <text:p>PAINEL ELETRICO PARA TROCADOR SD 105 C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7270" table:style-name="ce6">
            <text:p><text:s/>7.2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748</text:p>
          </table:table-cell>
          <table:table-cell office:value-type="string" table:style-name="ce3">
            <text:p>PAINEL ELETRICO PARA TROCADOR SD 130 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7830" table:style-name="ce4">
            <text:p><text:s/>7.8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951</text:p>
          </table:table-cell>
          <table:table-cell office:value-type="string" table:style-name="ce5">
            <text:p>PAINEL ELETRICO PARA TROCADOR SD 130 B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7221" table:style-name="ce6">
            <text:p><text:s/>7.22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952</text:p>
          </table:table-cell>
          <table:table-cell office:value-type="string" table:style-name="ce3">
            <text:p>PAINEL ELETRICO PARA TROCADOR SD 130 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7270" table:style-name="ce4">
            <text:p><text:s/>7.2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953</text:p>
          </table:table-cell>
          <table:table-cell office:value-type="string" table:style-name="ce5">
            <text:p>PAINEL ELETRICO PARA TROCADOR SD 160 B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7221" table:style-name="ce6">
            <text:p><text:s/>7.22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954</text:p>
          </table:table-cell>
          <table:table-cell office:value-type="string" table:style-name="ce3">
            <text:p>PAINEL ELETRICO PARA TROCADOR SD 160 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7270" table:style-name="ce4">
            <text:p><text:s/>7.2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944</text:p>
          </table:table-cell>
          <table:table-cell office:value-type="string" table:style-name="ce5">
            <text:p>PAINEL ELETRICO PARA TROCADOR SD 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3405" table:style-name="ce6">
            <text:p><text:s/>3.40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427</text:p>
          </table:table-cell>
          <table:table-cell office:value-type="string" table:style-name="ce3">
            <text:p>PAINEL ELETRICO PARA TROCADOR SD 4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4404" table:style-name="ce4">
            <text:p><text:s/>4.40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486</text:p>
          </table:table-cell>
          <table:table-cell office:value-type="string" table:style-name="ce5">
            <text:p>PAINEL ELETRICO PARA TROCADOR SD 60 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668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951" table:style-name="ce6">
            <text:p><text:s/>4.95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945</text:p>
          </table:table-cell>
          <table:table-cell office:value-type="string" table:style-name="ce3">
            <text:p>PAINEL ELETRICO PARA TROCADOR SD 60 B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5064" table:style-name="ce4">
            <text:p><text:s/>5.06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946</text:p>
          </table:table-cell>
          <table:table-cell office:value-type="string" table:style-name="ce5">
            <text:p>PAINEL ELETRICO PARA TROCADOR SD 60 C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5088" table:style-name="ce6">
            <text:p><text:s/>5.08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747</text:p>
          </table:table-cell>
          <table:table-cell office:value-type="string" table:style-name="ce3">
            <text:p>PAINEL ELETRICO PARA TROCADOR SD 80 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4980" table:style-name="ce4">
            <text:p><text:s/>4.9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947</text:p>
          </table:table-cell>
          <table:table-cell office:value-type="string" table:style-name="ce5">
            <text:p>PAINEL ELETRICO PARA TROCADOR SD 80 B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5064" table:style-name="ce6">
            <text:p><text:s/>5.06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948</text:p>
          </table:table-cell>
          <table:table-cell office:value-type="string" table:style-name="ce3">
            <text:p>PAINEL ELETRICO PARA TROCADOR SD 80 C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5088" table:style-name="ce4">
            <text:p><text:s/>5.08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26</text:p>
          </table:table-cell>
          <table:table-cell office:value-type="string" table:style-name="ce5">
            <text:p>PAINEL FRONTAL GER. CLORO BASE DE SAL MOD. SSC25 MINI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9285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540" table:style-name="ce6">
            <text:p><text:s/>540,00<text:s/></text:p>
          </table:table-cell>
          <table:table-cell office:value-type="float" office:value="1" table:formula="of:=IFERROR(VLOOKUP([.A:.A];['SB1'.B:.G];6;FALSE);&quot;&quot;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7499</text:p>
          </table:table-cell>
          <table:table-cell office:value-type="string" table:style-name="ce3">
            <text:p>PAINEL FRONTAL TIV 25/45/65/7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. <text:s/>.</text:p>
          </table:table-cell>
          <table:table-cell office:value-type="string" table:style-name="ce3">
            <text:p>789900563438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98" table:style-name="ce4">
            <text:p><text:s/>3.39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41</text:p>
          </table:table-cell>
          <table:table-cell office:value-type="string" table:style-name="ce5">
            <text:p>PAINEL FULL DE AUTOMACAO (COLETOR SOLAR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3239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900" table:style-name="ce6">
            <text:p><text:s/>3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42</text:p>
          </table:table-cell>
          <table:table-cell office:value-type="string" table:style-name="ce3">
            <text:p>PAINEL FULL DE AUTOMACAO (TROCADOR DE CALOR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3800" table:style-name="ce4">
            <text:p><text:s/>3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076</text:p>
          </table:table-cell>
          <table:table-cell office:value-type="string" table:style-name="ce5">
            <text:p>PAINEL I POOL FULL PARA COLETOR SOLAR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7.10.90</text:p>
          </table:table-cell>
          <table:table-cell office:value-type="string" table:style-name="ce5">
            <text:p>7899005617589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290" table:style-name="ce6">
            <text:p><text:s/>4.2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075</text:p>
          </table:table-cell>
          <table:table-cell office:value-type="string" table:style-name="ce3">
            <text:p>PAINEL I POOL FULL PARA TROCADOR DE CALOR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7.10.90</text:p>
          </table:table-cell>
          <table:table-cell office:value-type="string" table:style-name="ce3">
            <text:p>789900561759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800" table:style-name="ce4">
            <text:p><text:s/>3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787</text:p>
          </table:table-cell>
          <table:table-cell office:value-type="string" table:style-name="ce5">
            <text:p>PAINEL LATERAL DIR ROBO LIMP AUT WAVE 2X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3280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4" table:style-name="ce6">
            <text:p><text:s/>144,00<text:s/></text:p>
          </table:table-cell>
          <table:table-cell office:value-type="float" office:value="9" table:formula="of:=IFERROR(VLOOKUP([.A:.A];['SB1'.B:.G];6;FALSE);&quot;&quot;)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3097</text:p>
          </table:table-cell>
          <table:table-cell office:value-type="string" table:style-name="ce3">
            <text:p>PAINEL LATERAL DIR ROBO LIMPADOR AUT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212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2" table:style-name="ce4">
            <text:p><text:s/>132,00<text:s/></text:p>
          </table:table-cell>
          <table:table-cell office:value-type="float" office:value="8" table:formula="of:=IFERROR(VLOOKUP([.A:.A];['SB1'.B:.G];6;FALSE);&quot;&quot;)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5343</text:p>
          </table:table-cell>
          <table:table-cell office:value-type="string" table:style-name="ce5">
            <text:p>PAINEL LATERAL DIR ROBO LIMPADOR AUT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966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27" table:style-name="ce6">
            <text:p><text:s/>227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5788</text:p>
          </table:table-cell>
          <table:table-cell office:value-type="string" table:style-name="ce3">
            <text:p>PAINEL LATERAL ESQ ROBO LIMP AUT WAVE 2X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3282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5" table:style-name="ce4">
            <text:p><text:s/>115,00<text:s/></text:p>
          </table:table-cell>
          <table:table-cell office:value-type="float" office:value="12" table:formula="of:=IFERROR(VLOOKUP([.A:.A];['SB1'.B:.G];6;FALSE);&quot;&quot;)" table:style-name="ce1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240</text:p>
          </table:table-cell>
          <table:table-cell office:value-type="string" table:style-name="ce5">
            <text:p>PAINEL LATERAL ESQ ROBO LIMPADOR AUT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422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59" table:style-name="ce6">
            <text:p><text:s/>59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41</text:p>
          </table:table-cell>
          <table:table-cell office:value-type="string" table:style-name="ce3">
            <text:p>PAINEL LATERAL ESQ ROBO LIMPADOR AUT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20992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66" table:style-name="ce4">
            <text:p><text:s/>16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350</text:p>
          </table:table-cell>
          <table:table-cell office:value-type="string" table:style-name="ce5">
            <text:p>PAINEL LATERAL ESQ ROBO LIMPADOR AUT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972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79" table:style-name="ce6">
            <text:p><text:s/>179,00<text:s/></text:p>
          </table:table-cell>
          <table:table-cell office:value-type="float" office:value="19" table:formula="of:=IFERROR(VLOOKUP([.A:.A];['SB1'.B:.G];6;FALSE);&quot;&quot;)" table:style-name="ce1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87</text:p>
          </table:table-cell>
          <table:table-cell office:value-type="string" table:style-name="ce3">
            <text:p>PAINEL LATERAL ROBO LIMPADOR AUT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20473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65" table:style-name="ce4">
            <text:p><text:s/>165,00<text:s/></text:p>
          </table:table-cell>
          <table:table-cell office:value-type="float" office:value="6" table:formula="of:=IFERROR(VLOOKUP([.A:.A];['SB1'.B:.G];6;FALSE);&quot;&quot;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491</text:p>
          </table:table-cell>
          <table:table-cell office:value-type="string" table:style-name="ce5">
            <text:p>PAINEL LATERAL TIV 25/45/65/7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. <text:s/>.</text:p>
          </table:table-cell>
          <table:table-cell office:value-type="string" table:style-name="ce5">
            <text:p>789900563442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56" table:style-name="ce6">
            <text:p><text:s/>45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51</text:p>
          </table:table-cell>
          <table:table-cell office:value-type="string" table:style-name="ce3">
            <text:p>PAINEL SUPERIOR PARA TROCADOR SD 105/ 130/ 16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table:style-name="ce3"/>
          <table:table-cell office:value-type="float" office:value="3.25" table:style-name="ce4">
            <text:p><text:s/>3,25<text:s/></text:p>
          </table:table-cell>
          <table:table-cell office:value-type="float" office:value="2500" table:style-name="ce4">
            <text:p><text:s/>2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893</text:p>
          </table:table-cell>
          <table:table-cell office:value-type="string" table:style-name="ce5">
            <text:p>PAINEL TROCADOR SD40 C/ CONTRL TOUCH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0" table:style-name="ce6">
            <text:p><text:s/>-<text:s/></text:p>
          </table:table-cell>
          <table:table-cell office:value-type="float" office:value="5607" table:style-name="ce6">
            <text:p><text:s/>5.60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152</text:p>
          </table:table-cell>
          <table:table-cell office:value-type="string" table:style-name="ce3">
            <text:p>PARAF 1/4X5/8 (DA/DR/R.Q.ONDA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33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60" table:style-name="ce4">
            <text:p><text:s/>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126</text:p>
          </table:table-cell>
          <table:table-cell office:value-type="string" table:style-name="ce5">
            <text:p>PARAF 4,2X16MM (CX PASSAGEM/R.Q.ONDA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076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.1500000000000004" table:style-name="ce6">
            <text:p><text:s/>4,1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132</text:p>
          </table:table-cell>
          <table:table-cell office:value-type="string" table:style-name="ce3">
            <text:p>PARAF 5,5X19MM (DA/DR/SKIMMER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56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4.35" table:style-name="ce4">
            <text:p><text:s/>34,3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131</text:p>
          </table:table-cell>
          <table:table-cell office:value-type="string" table:style-name="ce5">
            <text:p>PARAF 5,5X25MM (DRENO/SKIMMER/REFL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34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4.35" table:style-name="ce6">
            <text:p><text:s/>34,3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129</text:p>
          </table:table-cell>
          <table:table-cell office:value-type="string" table:style-name="ce3">
            <text:p>PARAF 5/32X5/16 (DR/DRENO/MINI REFL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48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4.04" table:style-name="ce4">
            <text:p><text:s/>4,0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335</text:p>
          </table:table-cell>
          <table:table-cell office:value-type="string" table:style-name="ce5">
            <text:p>PARAF CAB OVA PHILLIPS C/PT 1/4X1 1/4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379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7.4" table:style-name="ce6">
            <text:p><text:s/>37,4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334</text:p>
          </table:table-cell>
          <table:table-cell office:value-type="string" table:style-name="ce3">
            <text:p>PARAF CAB OVAL PHILLIPS 5,5X32MM INOX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936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34.35" table:style-name="ce4">
            <text:p><text:s/>34,3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26</text:p>
          </table:table-cell>
          <table:table-cell office:value-type="string" table:style-name="ce5">
            <text:p>PARAF CESTO FILTRO ROBO LIMP AUT WAVE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84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" table:style-name="ce6">
            <text:p><text:s/>2,00<text:s/></text:p>
          </table:table-cell>
          <table:table-cell office:value-type="float" office:value="99" table:formula="of:=IFERROR(VLOOKUP([.A:.A];['SB1'.B:.G];6;FALSE);&quot;&quot;)" table:style-name="ce1">
            <text:p>9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43</text:p>
          </table:table-cell>
          <table:table-cell office:value-type="string" table:style-name="ce3">
            <text:p>PARAF QD ELET DIST ROBO LIMP AUT WAVE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101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.6" table:style-name="ce4">
            <text:p><text:s/>2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62</text:p>
          </table:table-cell>
          <table:table-cell office:value-type="string" table:style-name="ce5">
            <text:p>PARAF RODA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22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" table:style-name="ce6">
            <text:p><text:s/>3,00<text:s/></text:p>
          </table:table-cell>
          <table:table-cell office:value-type="float" office:value="100" table:formula="of:=IFERROR(VLOOKUP([.A:.A];['SB1'.B:.G];6;FALSE);&quot;&quot;)" table:style-name="ce1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01</text:p>
          </table:table-cell>
          <table:table-cell office:value-type="string" table:style-name="ce3">
            <text:p>PARAF RODA ROBO LIMPADOR AUTOMATICO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59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" table:style-name="ce4">
            <text:p><text:s/>3,00<text:s/></text:p>
          </table:table-cell>
          <table:table-cell office:value-type="float" office:value="96" table:formula="of:=IFERROR(VLOOKUP([.A:.A];['SB1'.B:.G];6;FALSE);&quot;&quot;)" table:style-name="ce1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250</text:p>
          </table:table-cell>
          <table:table-cell office:value-type="string" table:style-name="ce5">
            <text:p>PARAF ROTOR APAR. P/FILTRAR PISCINA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19521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20" table:style-name="ce6">
            <text:p><text:s/>20,00<text:s/></text:p>
          </table:table-cell>
          <table:table-cell office:value-type="float" office:value="37" table:formula="of:=IFERROR(VLOOKUP([.A:.A];['SB1'.B:.G];6;FALSE);&quot;&quot;)" table:style-name="ce1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0773</text:p>
          </table:table-cell>
          <table:table-cell office:value-type="string" table:style-name="ce3">
            <text:p>PEDRA DOLOMITA P/ FORNO CX. C/ 5KG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2518.20.00</text:p>
          </table:table-cell>
          <table:table-cell office:value-type="string" table:style-name="ce3">
            <text:p>789900560342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6" table:style-name="ce4">
            <text:p><text:s/>4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76</text:p>
          </table:table-cell>
          <table:table-cell office:value-type="string" table:style-name="ce5">
            <text:p>PENEIRA CATA FOLHA C/ P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4.00.00</text:p>
          </table:table-cell>
          <table:table-cell office:value-type="string" table:style-name="ce5">
            <text:p>789900560046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8" table:style-name="ce6">
            <text:p><text:s/>4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398</text:p>
          </table:table-cell>
          <table:table-cell office:value-type="string" table:style-name="ce3">
            <text:p>PENEIRA METALICA LUX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604.00.00</text:p>
          </table:table-cell>
          <table:table-cell office:value-type="string" table:style-name="ce3">
            <text:p>789900562466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9" table:style-name="ce4">
            <text:p><text:s/>6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77</text:p>
          </table:table-cell>
          <table:table-cell office:value-type="string" table:style-name="ce5">
            <text:p>PENEIRA METALICA TIPO PUC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4.00.00</text:p>
          </table:table-cell>
          <table:table-cell office:value-type="string" table:style-name="ce5">
            <text:p>789900560047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4" table:style-name="ce6">
            <text:p><text:s/>6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79</text:p>
          </table:table-cell>
          <table:table-cell office:value-type="string" table:style-name="ce3">
            <text:p>PENEIRA PELICAN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4.00.00</text:p>
          </table:table-cell>
          <table:table-cell office:value-type="string" table:style-name="ce3">
            <text:p>789900560049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" table:style-name="ce4">
            <text:p><text:s/>8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400</text:p>
          </table:table-cell>
          <table:table-cell office:value-type="string" table:style-name="ce5">
            <text:p>PENEIRA PELICANO LUX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604.00.00</text:p>
          </table:table-cell>
          <table:table-cell office:value-type="string" table:style-name="ce5">
            <text:p>789900562467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84" table:style-name="ce6">
            <text:p><text:s/>8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78</text:p>
          </table:table-cell>
          <table:table-cell office:value-type="string" table:style-name="ce3">
            <text:p>PENEIRA PLU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4.00.00</text:p>
          </table:table-cell>
          <table:table-cell office:value-type="string" table:style-name="ce3">
            <text:p>789900560048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" table:style-name="ce4">
            <text:p><text:s/>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288</text:p>
          </table:table-cell>
          <table:table-cell office:value-type="string" table:style-name="ce5">
            <text:p>PENEIRA SLIM C/ P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4.00.00</text:p>
          </table:table-cell>
          <table:table-cell office:value-type="string" table:style-name="ce5">
            <text:p>789900560802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8" table:style-name="ce6">
            <text:p><text:s/>2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33</text:p>
          </table:table-cell>
          <table:table-cell office:value-type="string" table:style-name="ce3">
            <text:p>PERFIL CARRO ROBO LIMPADOR AUTOMATICO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91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9892</text:p>
          </table:table-cell>
          <table:table-cell office:value-type="string" table:style-name="ce5">
            <text:p>PERFIL LINEAR FLANGEAMENTO DE PISCINA (METRO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04.22.00</text:p>
          </table:table-cell>
          <table:table-cell office:value-type="string" table:style-name="ce5">
            <text:p>789900560914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6" table:style-name="ce6">
            <text:p><text:s/>7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75</text:p>
          </table:table-cell>
          <table:table-cell office:value-type="string" table:style-name="ce3">
            <text:p>PERFIL MACARRAO FLEXIVEL P/ CALAFETAGE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04.22.00</text:p>
          </table:table-cell>
          <table:table-cell office:value-type="string" table:style-name="ce3">
            <text:p>789900560145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" table:style-name="ce4">
            <text:p><text:s/>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4781</text:p>
          </table:table-cell>
          <table:table-cell office:value-type="string" table:style-name="ce5">
            <text:p>PERFIL PLASTICO CHANFRADO 7CM P/ PISCINA VINI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04.22.00</text:p>
          </table:table-cell>
          <table:table-cell office:value-type="string" table:style-name="ce5">
            <text:p>789900561097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" table:style-name="ce6">
            <text:p><text:s/>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784</text:p>
          </table:table-cell>
          <table:table-cell office:value-type="string" table:style-name="ce3">
            <text:p>PERFIL PLASTICO CURVO 10CM P/ PISCINA VINI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04.22.00</text:p>
          </table:table-cell>
          <table:table-cell office:value-type="string" table:style-name="ce3">
            <text:p>789900561098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6" table:style-name="ce4">
            <text:p><text:s/>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76</text:p>
          </table:table-cell>
          <table:table-cell office:value-type="string" table:style-name="ce5">
            <text:p>PERFIL REBAIXADO PVC AZU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04.22.00</text:p>
          </table:table-cell>
          <table:table-cell office:value-type="string" table:style-name="ce5">
            <text:p>789900560146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1" table:style-name="ce6">
            <text:p><text:s/>2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77</text:p>
          </table:table-cell>
          <table:table-cell office:value-type="string" table:style-name="ce3">
            <text:p>PERFIL TIPO T FLEXIVEL P/ CALAFETAGE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04.22.00</text:p>
          </table:table-cell>
          <table:table-cell office:value-type="string" table:style-name="ce3">
            <text:p>789900560147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" table:style-name="ce4">
            <text:p><text:s/>1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686</text:p>
          </table:table-cell>
          <table:table-cell office:value-type="string" table:style-name="ce5">
            <text:p>PERMUTADOR TITANIO P/ TH-10 – TC 0,7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9.90.90</text:p>
          </table:table-cell>
          <table:table-cell office:value-type="string" table:style-name="ce5">
            <text:p>789900562924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457" table:style-name="ce6">
            <text:p><text:s/>2.45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56</text:p>
          </table:table-cell>
          <table:table-cell office:value-type="string" table:style-name="ce3">
            <text:p>PINO AZUL RODA APARELHO P/ FILTRAR PISCINA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17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" table:style-name="ce4">
            <text:p><text:s/>8,00<text:s/></text:p>
          </table:table-cell>
          <table:table-cell office:value-type="float" office:value="16" table:formula="of:=IFERROR(VLOOKUP([.A:.A];['SB1'.B:.G];6;FALSE);&quot;&quot;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75</text:p>
          </table:table-cell>
          <table:table-cell office:value-type="string" table:style-name="ce5">
            <text:p>PINO CONECTOR CABO 3 UNID. ROBO LIMP. AUTOM. RB4/WAV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35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0" table:style-name="ce6">
            <text:p><text:s/>20,00<text:s/></text:p>
          </table:table-cell>
          <table:table-cell office:value-type="float" office:value="12" table:formula="of:=IFERROR(VLOOKUP([.A:.A];['SB1'.B:.G];6;FALSE);&quot;&quot;)" table:style-name="ce1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10012</text:p>
          </table:table-cell>
          <table:table-cell office:value-type="string" table:style-name="ce3">
            <text:p>PINO EM PLASTICO PARA ASPIRADORE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955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.46" table:style-name="ce4">
            <text:p><text:s/>3,4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69</text:p>
          </table:table-cell>
          <table:table-cell office:value-type="string" table:style-name="ce5">
            <text:p>PINO GRANAD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0390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.04" table:style-name="ce6">
            <text:p><text:s/>4,0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71</text:p>
          </table:table-cell>
          <table:table-cell office:value-type="string" table:style-name="ce3">
            <text:p>PINO PLASTICO P/ ASPIRADOR GRANDE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041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.04" table:style-name="ce4">
            <text:p><text:s/>4,0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03</text:p>
          </table:table-cell>
          <table:table-cell office:value-type="string" table:style-name="ce5">
            <text:p>PINO TRAVA MANIPULO ROBO LIMPADOR AUTOMATICO WAVE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61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0" table:style-name="ce6">
            <text:p><text:s/>10,00<text:s/></text:p>
          </table:table-cell>
          <table:table-cell office:value-type="float" office:value="11" table:formula="of:=IFERROR(VLOOKUP([.A:.A];['SB1'.B:.G];6;FALSE);&quot;&quot;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15</text:p>
          </table:table-cell>
          <table:table-cell office:value-type="string" table:style-name="ce3">
            <text:p>PLACA ANTI RETORNO APARELHO P/ FILTRAR PISCINA WAVE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73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" table:style-name="ce4">
            <text:p><text:s/>2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764</text:p>
          </table:table-cell>
          <table:table-cell office:value-type="string" table:style-name="ce5">
            <text:p>PLACA COMANDO COMPRESSOR TIV - 65/7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32.90.99</text:p>
          </table:table-cell>
          <table:table-cell office:value-type="string" table:style-name="ce5">
            <text:p>789900563553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5210" table:style-name="ce6">
            <text:p><text:s/>5.2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02</text:p>
          </table:table-cell>
          <table:table-cell office:value-type="string" table:style-name="ce3">
            <text:p>PLACA DE BORDO GER CLORO GS20 BRN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9292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790" table:style-name="ce4">
            <text:p><text:s/>2.7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243</text:p>
          </table:table-cell>
          <table:table-cell office:value-type="string" table:style-name="ce5">
            <text:p>PLACA DE BORDO PRINCIPAL GER CLORO GS4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4563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190" table:style-name="ce6">
            <text:p><text:s/>1.190,00<text:s/></text:p>
          </table:table-cell>
          <table:table-cell office:value-type="float" office:value="6" table:formula="of:=IFERROR(VLOOKUP([.A:.A];['SB1'.B:.G];6;FALSE);&quot;&quot;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5766</text:p>
          </table:table-cell>
          <table:table-cell office:value-type="string" table:style-name="ce3">
            <text:p>PLACA DE COMANDO ELET. TIV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32.90.99</text:p>
          </table:table-cell>
          <table:table-cell office:value-type="string" table:style-name="ce3">
            <text:p>7899005635545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006" table:style-name="ce4">
            <text:p><text:s/>2.00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6925</text:p>
          </table:table-cell>
          <table:table-cell office:value-type="string" table:style-name="ce5">
            <text:p>PLACA DE LED 61 SMD (AZUL) P/LUMINARI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405.99.00</text:p>
          </table:table-cell>
          <table:table-cell office:value-type="string" table:style-name="ce5">
            <text:p>7899005611709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34.72999999999999" table:style-name="ce6">
            <text:p><text:s/>134,7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993</text:p>
          </table:table-cell>
          <table:table-cell office:value-type="string" table:style-name="ce3">
            <text:p>PLACA DISTRIB GERADOR CLORO GS45 V1.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31912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477" table:style-name="ce4">
            <text:p><text:s/>1.477,00<text:s/></text:p>
          </table:table-cell>
          <table:table-cell office:value-type="float" office:value="7" table:formula="of:=IFERROR(VLOOKUP([.A:.A];['SB1'.B:.G];6;FALSE);&quot;&quot;)" table:style-name="ce1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5995</text:p>
          </table:table-cell>
          <table:table-cell office:value-type="string" table:style-name="ce5">
            <text:p>PLACA DISTRIB GERADOR CLORO GS45 V1.7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31929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707" table:style-name="ce6">
            <text:p><text:s/>1.70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242</text:p>
          </table:table-cell>
          <table:table-cell office:value-type="string" table:style-name="ce3">
            <text:p>PLACA DISTRIBUICAO GERADOR DE CLORO GS45 V1,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4556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630" table:style-name="ce4">
            <text:p><text:s/>1.630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164</text:p>
          </table:table-cell>
          <table:table-cell office:value-type="string" table:style-name="ce5">
            <text:p>PLACA ELETRONICA GERADOR CLORO GS1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33466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332" table:style-name="ce6">
            <text:p><text:s/>1.33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162</text:p>
          </table:table-cell>
          <table:table-cell office:value-type="string" table:style-name="ce3">
            <text:p>PLACA ELETRONICA GERADOR CLORO GS1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33459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332" table:style-name="ce4">
            <text:p><text:s/>1.33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160</text:p>
          </table:table-cell>
          <table:table-cell office:value-type="string" table:style-name="ce5">
            <text:p>PLACA ELETRONICA GERADOR CLORO GS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33442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332" table:style-name="ce6">
            <text:p><text:s/>1.33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166</text:p>
          </table:table-cell>
          <table:table-cell office:value-type="string" table:style-name="ce3">
            <text:p>PLACA ELETRONICA GERADOR CLORO GS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33473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180" table:style-name="ce4">
            <text:p><text:s/>1.1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922</text:p>
          </table:table-cell>
          <table:table-cell office:value-type="string" table:style-name="ce5">
            <text:p>PLACA ELETRONICA P/ CONTR. TOUCH DE TEMPERATUR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32.90.99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483" table:style-name="ce6">
            <text:p><text:s/>48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60</text:p>
          </table:table-cell>
          <table:table-cell office:value-type="string" table:style-name="ce3">
            <text:p>PLACA VISOR DIGITAL GER. DE CLORO A BASE DE SAL V.5.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9254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344" table:style-name="ce4">
            <text:p><text:s/>3.34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62</text:p>
          </table:table-cell>
          <table:table-cell office:value-type="string" table:style-name="ce5">
            <text:p>PLACA VISOR DIGITAL GER. DE CLORO A BASE DE SAL V.5.6.1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31936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4237" table:style-name="ce6">
            <text:p><text:s/>4.23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244</text:p>
          </table:table-cell>
          <table:table-cell office:value-type="string" table:style-name="ce3">
            <text:p>PLACA VISOR DIGITAL GERADOR DE CLORO GS4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4570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4039" table:style-name="ce4">
            <text:p><text:s/>4.03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547</text:p>
          </table:table-cell>
          <table:table-cell office:value-type="string" table:style-name="ce5">
            <text:p>PLUG AUSTRALIANO P/ CABO GER DE CLOR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534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08.9" table:style-name="ce6">
            <text:p><text:s/>108,90<text:s/></text:p>
          </table:table-cell>
          <table:table-cell office:value-type="float" office:value="16" table:formula="of:=IFERROR(VLOOKUP([.A:.A];['SB1'.B:.G];6;FALSE);&quot;&quot;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60</text:p>
          </table:table-cell>
          <table:table-cell office:value-type="string" table:style-name="ce3">
            <text:p>PLUG AZUL RODA ROBO LIMPADOR AUTOMATICO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21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10" table:formula="of:=IFERROR(VLOOKUP([.A:.A];['SB1'.B:.G];6;FALSE);&quot;&quot;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3544</text:p>
          </table:table-cell>
          <table:table-cell office:value-type="string" table:style-name="ce5">
            <text:p>PLUG BR BRANCO P/ CABO GER DE CLOR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5331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44" table:style-name="ce6">
            <text:p><text:s/>144,00<text:s/></text:p>
          </table:table-cell>
          <table:table-cell office:value-type="float" office:value="30" table:formula="of:=IFERROR(VLOOKUP([.A:.A];['SB1'.B:.G];6;FALSE);&quot;&quot;)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233</text:p>
          </table:table-cell>
          <table:table-cell office:value-type="string" table:style-name="ce3">
            <text:p>PLUG DO CABO P/ ROBO LIMPADOR AUTOMATICO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354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63" table:style-name="ce4">
            <text:p><text:s/>163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64</text:p>
          </table:table-cell>
          <table:table-cell office:value-type="string" table:style-name="ce5">
            <text:p>PLUG DO CABO ROBO LIMPADOR AUTOMATICO RB2/RB4I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24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64" table:style-name="ce6">
            <text:p><text:s/>164,00<text:s/></text:p>
          </table:table-cell>
          <table:table-cell office:value-type="float" office:value="14" table:formula="of:=IFERROR(VLOOKUP([.A:.A];['SB1'.B:.G];6;FALSE);&quot;&quot;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11</text:p>
          </table:table-cell>
          <table:table-cell office:value-type="string" table:style-name="ce3">
            <text:p>POLIA DA RODA ROBO LIMP AUT RB4I/WAVE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69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" table:style-name="ce4">
            <text:p><text:s/>157,00<text:s/></text:p>
          </table:table-cell>
          <table:table-cell office:value-type="float" office:value="20" table:formula="of:=IFERROR(VLOOKUP([.A:.A];['SB1'.B:.G];6;FALSE);&quot;&quot;)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708</text:p>
          </table:table-cell>
          <table:table-cell office:value-type="string" table:style-name="ce5">
            <text:p>POLIA EIXO ROB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66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38" table:style-name="ce6">
            <text:p><text:s/>23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55</text:p>
          </table:table-cell>
          <table:table-cell office:value-type="string" table:style-name="ce3">
            <text:p>POLIA MAIOR P/ ROBO LIMPADOR AUTOMATICO 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83.90.00</text:p>
          </table:table-cell>
          <table:table-cell office:value-type="string" table:style-name="ce3">
            <text:p>789900561956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" table:style-name="ce4">
            <text:p><text:s/>27,00<text:s/></text:p>
          </table:table-cell>
          <table:table-cell office:value-type="float" office:value="22" table:formula="of:=IFERROR(VLOOKUP([.A:.A];['SB1'.B:.G];6;FALSE);&quot;&quot;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256</text:p>
          </table:table-cell>
          <table:table-cell office:value-type="string" table:style-name="ce5">
            <text:p>POLIA MENOR P/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82.10.10</text:p>
          </table:table-cell>
          <table:table-cell office:value-type="string" table:style-name="ce5">
            <text:p>7899005619576</text:p>
          </table:table-cell>
          <table:table-cell office:value-type="float" office:value="7.8" table:style-name="ce6">
            <text:p><text:s/>7,80<text:s/></text:p>
          </table:table-cell>
          <table:table-cell office:value-type="float" office:value="20" table:style-name="ce6">
            <text:p><text:s/>20,00<text:s/></text:p>
          </table:table-cell>
          <table:table-cell office:value-type="float" office:value="6" table:formula="of:=IFERROR(VLOOKUP([.A:.A];['SB1'.B:.G];6;FALSE);&quot;&quot;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73</text:p>
          </table:table-cell>
          <table:table-cell office:value-type="string" table:style-name="ce3">
            <text:p>POLIA MENOR P/ ROBO LIMPADOR AUTOMATICO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82.10.10</text:p>
          </table:table-cell>
          <table:table-cell office:value-type="string" table:style-name="ce3">
            <text:p>7899005620336</text:p>
          </table:table-cell>
          <table:table-cell office:value-type="float" office:value="7.8" table:style-name="ce4">
            <text:p><text:s/>7,80<text:s/></text:p>
          </table:table-cell>
          <table:table-cell office:value-type="float" office:value="21" table:style-name="ce4">
            <text:p><text:s/>21,00<text:s/></text:p>
          </table:table-cell>
          <table:table-cell office:value-type="float" office:value="16" table:formula="of:=IFERROR(VLOOKUP([.A:.A];['SB1'.B:.G];6;FALSE);&quot;&quot;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1952</text:p>
          </table:table-cell>
          <table:table-cell office:value-type="string" table:style-name="ce5">
            <text:p>POLIA RODA APARELHO P/ FILTRAR PISCINA RB6</text:p>
          </table:table-cell>
          <table:table-cell office:value-type="string" table:style-name="ce5">
            <text:p>M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82.10.10</text:p>
          </table:table-cell>
          <table:table-cell table:style-name="ce5"/>
          <table:table-cell office:value-type="float" office:value="7.8" table:style-name="ce6">
            <text:p><text:s/>7,80<text:s/></text:p>
          </table:table-cell>
          <table:table-cell office:value-type="float" office:value="165" table:style-name="ce6">
            <text:p><text:s/>1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39</text:p>
          </table:table-cell>
          <table:table-cell office:value-type="string" table:style-name="ce3">
            <text:p>POLIA RODA APARELHO P/ FILTRAR PISCINA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82.10.10</text:p>
          </table:table-cell>
          <table:table-cell office:value-type="string" table:style-name="ce3">
            <text:p>7899005619415</text:p>
          </table:table-cell>
          <table:table-cell office:value-type="float" office:value="7.8" table:style-name="ce4">
            <text:p><text:s/>7,80<text:s/></text:p>
          </table:table-cell>
          <table:table-cell office:value-type="float" office:value="165" table:style-name="ce4">
            <text:p><text:s/>165,00<text:s/></text:p>
          </table:table-cell>
          <table:table-cell office:value-type="float" office:value="20" table:formula="of:=IFERROR(VLOOKUP([.A:.A];['SB1'.B:.G];6;FALSE);&quot;&quot;)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6262</text:p>
          </table:table-cell>
          <table:table-cell office:value-type="string" table:style-name="ce5">
            <text:p>PONTEIRA D/E DEG RETO CONFORT HOME 1 1/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32049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67" table:style-name="ce6">
            <text:p><text:s/>6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04</text:p>
          </table:table-cell>
          <table:table-cell office:value-type="string" table:style-name="ce3">
            <text:p>PONTEIRA DE ENCOSTO EM PLAST. P/ ESCAD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0741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6" table:style-name="ce4">
            <text:p><text:s/>1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05</text:p>
          </table:table-cell>
          <table:table-cell office:value-type="string" table:style-name="ce5">
            <text:p>PONTEIRA DE ENCOSTO EM PLAST. P/ PISCINA VINI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0758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9" table:style-name="ce6">
            <text:p><text:s/>3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263</text:p>
          </table:table-cell>
          <table:table-cell office:value-type="string" table:style-name="ce3">
            <text:p>PONTEIRA DIR/ESQ DEG SEGURANCA 1 1/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3205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93" table:style-name="ce4">
            <text:p><text:s/>9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35</text:p>
          </table:table-cell>
          <table:table-cell office:value-type="string" table:style-name="ce5">
            <text:p>PONTEIRA PARA MANGUEIRA DE 1.1/2 POL.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005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9.9" table:style-name="ce6">
            <text:p><text:s/>9,9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36</text:p>
          </table:table-cell>
          <table:table-cell office:value-type="string" table:style-name="ce3">
            <text:p>PONTEIRA PARA MANGUEIRA DE 2 POL.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006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51" table:style-name="ce4">
            <text:p><text:s/>5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5007</text:p>
          </table:table-cell>
          <table:table-cell office:value-type="string" table:style-name="ce5">
            <text:p>PONTEIRA PLAST.ENCOSTO P/ESCADA DE 02 PO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8600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5" table:style-name="ce6">
            <text:p><text:s/>2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5012</text:p>
          </table:table-cell>
          <table:table-cell office:value-type="string" table:style-name="ce3">
            <text:p>PONTEIRA PLASTICA BRANCA (DEGRAU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482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8.7" table:style-name="ce4">
            <text:p><text:s/>18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841</text:p>
          </table:table-cell>
          <table:table-cell office:value-type="string" table:style-name="ce5">
            <text:p>PONTEIRA PLASTICA PARA PENEIRA METALIC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8" table:style-name="ce6">
            <text:p><text:s/>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721</text:p>
          </table:table-cell>
          <table:table-cell office:value-type="string" table:style-name="ce3">
            <text:p>PONTEIRA PLASTICA PRETA (DEGRAU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479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0.9" table:style-name="ce4">
            <text:p><text:s/>20,9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5145</text:p>
          </table:table-cell>
          <table:table-cell office:value-type="string" table:style-name="ce5">
            <text:p>PORCA CALOTA PARA DEGRAU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9454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8.08" table:style-name="ce6">
            <text:p><text:s/>8,0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878</text:p>
          </table:table-cell>
          <table:table-cell office:value-type="string" table:style-name="ce3">
            <text:p>PORCA UNIAO 2 CELULA GER DE CLORO SSC2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8745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45" table:style-name="ce4">
            <text:p><text:s/>45,00<text:s/></text:p>
          </table:table-cell>
          <table:table-cell office:value-type="float" office:value="71" table:formula="of:=IFERROR(VLOOKUP([.A:.A];['SB1'.B:.G];6;FALSE);&quot;&quot;)" table:style-name="ce1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8848</text:p>
          </table:table-cell>
          <table:table-cell office:value-type="string" table:style-name="ce5">
            <text:p>PORTA BULBO PARA TROCADOR SD 40/ 60/ 80/ 105/ 13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4.90.20</text:p>
          </table:table-cell>
          <table:table-cell office:value-type="string" table:style-name="ce5">
            <text:p>789900561628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1.58" table:style-name="ce6">
            <text:p><text:s/>41,5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430</text:p>
          </table:table-cell>
          <table:table-cell office:value-type="string" table:style-name="ce3">
            <text:p>PORTA EM CEDRO DE ACESSIBILIDADE PARA SAUNA SEC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4421.99.00</text:p>
          </table:table-cell>
          <table:table-cell office:value-type="string" table:style-name="ce3">
            <text:p>789900561814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80" table:style-name="ce4">
            <text:p><text:s/>3.4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776</text:p>
          </table:table-cell>
          <table:table-cell office:value-type="string" table:style-name="ce5">
            <text:p>PORTA EM CEDRO PARA SAUNA SEC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421.99.00</text:p>
          </table:table-cell>
          <table:table-cell office:value-type="string" table:style-name="ce5">
            <text:p>789900560345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900" table:style-name="ce6">
            <text:p><text:s/>3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550</text:p>
          </table:table-cell>
          <table:table-cell office:value-type="string" table:style-name="ce3">
            <text:p>PORTA FUSIVEL + FUSIVEL GERADOR DE CLORO GS4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5362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73" table:style-name="ce4">
            <text:p><text:s/>27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245</text:p>
          </table:table-cell>
          <table:table-cell office:value-type="string" table:style-name="ce5">
            <text:p>PORTA FUSIVEL INTERNO + FUSIVEL GERADOR DE CLORO GS4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4587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317.68" table:style-name="ce6">
            <text:p><text:s/>317,6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977</text:p>
          </table:table-cell>
          <table:table-cell office:value-type="string" table:style-name="ce3">
            <text:p>PORTA FUSIVEL PEQUEN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40.90</text:p>
          </table:table-cell>
          <table:table-cell office:value-type="string" table:style-name="ce3">
            <text:p>789900562796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" table:style-name="ce4">
            <text:p><text:s/>1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397</text:p>
          </table:table-cell>
          <table:table-cell office:value-type="string" table:style-name="ce5">
            <text:p>PORTA REV. ALUM BCO 700X1990MM C/ CTR. MAR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0.10.00</text:p>
          </table:table-cell>
          <table:table-cell office:value-type="string" table:style-name="ce5">
            <text:p>789900561121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200" table:style-name="ce6">
            <text:p><text:s/>3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398</text:p>
          </table:table-cell>
          <table:table-cell office:value-type="string" table:style-name="ce3">
            <text:p>PORTA REV. ALUM BCO 990X1990MM C/ CTR. MAR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10.10.00</text:p>
          </table:table-cell>
          <table:table-cell office:value-type="string" table:style-name="ce3">
            <text:p>789900561122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00" table:style-name="ce4">
            <text:p><text:s/>4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738</text:p>
          </table:table-cell>
          <table:table-cell office:value-type="string" table:style-name="ce5">
            <text:p>PORTA REV.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0.10.00</text:p>
          </table:table-cell>
          <table:table-cell office:value-type="string" table:style-name="ce5">
            <text:p>789900560307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450" table:style-name="ce6">
            <text:p><text:s/>2.4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822</text:p>
          </table:table-cell>
          <table:table-cell office:value-type="string" table:style-name="ce3">
            <text:p>PORTAO P/ CERCA C/ TRAVA DE SEGURANC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08.90.90</text:p>
          </table:table-cell>
          <table:table-cell office:value-type="string" table:style-name="ce3">
            <text:p>789900561536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565" table:style-name="ce4">
            <text:p><text:s/>4.5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3983</text:p>
          </table:table-cell>
          <table:table-cell office:value-type="string" table:style-name="ce5">
            <text:p>PORTAO P/ CERCA DE PROTECA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08.90.90</text:p>
          </table:table-cell>
          <table:table-cell office:value-type="string" table:style-name="ce5">
            <text:p>789900560684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390" table:style-name="ce6">
            <text:p><text:s/>1.3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299</text:p>
          </table:table-cell>
          <table:table-cell office:value-type="string" table:style-name="ce3">
            <text:p>PORTINHOLA EM PLAST.COM EIXO SKIMMER COMPACT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968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2.45" table:style-name="ce4">
            <text:p><text:s/>22,4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235</text:p>
          </table:table-cell>
          <table:table-cell office:value-type="string" table:style-name="ce5">
            <text:p>PORTINHOLA PLAST C/ EIXO P/ SKIMMER BRANCO BL/BP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967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1.9" table:style-name="ce6">
            <text:p><text:s/>31,9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538</text:p>
          </table:table-cell>
          <table:table-cell office:value-type="string" table:style-name="ce3">
            <text:p>PORTINHOLA PLAST C/ EIXO P/ SKIMMER PRATA B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409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3" table:style-name="ce4">
            <text:p><text:s/>3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88</text:p>
          </table:table-cell>
          <table:table-cell office:value-type="string" table:style-name="ce5">
            <text:p>PRESSOSTATO DE AGUA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381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43" table:style-name="ce6">
            <text:p><text:s/>5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79</text:p>
          </table:table-cell>
          <table:table-cell office:value-type="string" table:style-name="ce3">
            <text:p>PRESSOSTATO DE ALTA 500 PSI OFF 350 PSI ON 2 FIOS R410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32.20.00</text:p>
          </table:table-cell>
          <table:table-cell office:value-type="string" table:style-name="ce3">
            <text:p>789900563421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56" table:style-name="ce4">
            <text:p><text:s/>15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291</text:p>
          </table:table-cell>
          <table:table-cell office:value-type="string" table:style-name="ce5">
            <text:p>PRESSOSTATO DE ALTA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517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61.62" table:style-name="ce6">
            <text:p><text:s/>261,6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80</text:p>
          </table:table-cell>
          <table:table-cell office:value-type="string" table:style-name="ce3">
            <text:p>PRESSOSTATO DE BAIXA 50 PSI OFF 95 PSI ON 2 FIOS R410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32.20.00</text:p>
          </table:table-cell>
          <table:table-cell office:value-type="string" table:style-name="ce3">
            <text:p>789900563316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56" table:style-name="ce4">
            <text:p><text:s/>15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292</text:p>
          </table:table-cell>
          <table:table-cell office:value-type="string" table:style-name="ce5">
            <text:p>PRESSOSTATO DE BAIXA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office:value-type="string" table:style-name="ce5">
            <text:p>789900561518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61.62" table:style-name="ce6">
            <text:p><text:s/>261,6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49</text:p>
          </table:table-cell>
          <table:table-cell office:value-type="string" table:style-name="ce3">
            <text:p>PROGRAMADOR P/ HORARIOS QUADRO I POOL 220V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50.90</text:p>
          </table:table-cell>
          <table:table-cell office:value-type="string" table:style-name="ce3">
            <text:p>789900561549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03" table:style-name="ce4">
            <text:p><text:s/>30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48</text:p>
          </table:table-cell>
          <table:table-cell office:value-type="string" table:style-name="ce5">
            <text:p>PROGRAMADOR PARA HORARIOS <text:s/>QUADRO SMART <text:s/>220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50.90</text:p>
          </table:table-cell>
          <table:table-cell office:value-type="string" table:style-name="ce5">
            <text:p>789900561584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928" table:style-name="ce6">
            <text:p><text:s/>92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933</text:p>
          </table:table-cell>
          <table:table-cell office:value-type="string" table:style-name="ce3">
            <text:p>PROLONGADOR PARA CAIXA DE PASSAGEM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647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.08" table:style-name="ce4">
            <text:p><text:s/>8,0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317</text:p>
          </table:table-cell>
          <table:table-cell office:value-type="string" table:style-name="ce5">
            <text:p>PROLONGADOR PARA DHM (50MM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222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1" table:style-name="ce6">
            <text:p><text:s/>3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862</text:p>
          </table:table-cell>
          <table:table-cell office:value-type="string" table:style-name="ce3">
            <text:p>PROLONGADOR PARA DHM (60MM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367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1" table:style-name="ce4">
            <text:p><text:s/>3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02</text:p>
          </table:table-cell>
          <table:table-cell office:value-type="string" table:style-name="ce5">
            <text:p>PROTECAO SAIDA DE VAPOR P/ GERADOR DE VAPOR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794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370" table:style-name="ce6">
            <text:p><text:s/>3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735</text:p>
          </table:table-cell>
          <table:table-cell office:value-type="string" table:style-name="ce3">
            <text:p>PULVERIZADOR DE ESSENCIA PARA SAUN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4.89.90</text:p>
          </table:table-cell>
          <table:table-cell office:value-type="string" table:style-name="ce3">
            <text:p>789900560304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0" table:style-name="ce4">
            <text:p><text:s/>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891</text:p>
          </table:table-cell>
          <table:table-cell office:value-type="string" table:style-name="ce5">
            <text:p>PUXADOR P/ PORTA ALUMINIO (POLICARBONATO, 0,70 E 0,99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0.10.00</text:p>
          </table:table-cell>
          <table:table-cell office:value-type="string" table:style-name="ce5">
            <text:p>789900561373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61.27" table:style-name="ce6">
            <text:p><text:s/>261,2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256</text:p>
          </table:table-cell>
          <table:table-cell office:value-type="string" table:style-name="ce3">
            <text:p>PUXADOR PARA PORTAS ACO / ALUMINI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10.10.00</text:p>
          </table:table-cell>
          <table:table-cell office:value-type="string" table:style-name="ce3">
            <text:p>789900561550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" table:style-name="ce4">
            <text:p><text:s/>10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2401</text:p>
          </table:table-cell>
          <table:table-cell office:value-type="string" table:style-name="ce5">
            <text:p>RAIA FLUTUANTE OFICIAL AZU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5370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05" table:style-name="ce6">
            <text:p><text:s/>10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21</text:p>
          </table:table-cell>
          <table:table-cell office:value-type="string" table:style-name="ce3">
            <text:p>RAIA FLUTUANTE OFICIAL BRANC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0918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05" table:style-name="ce4">
            <text:p><text:s/>10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2402</text:p>
          </table:table-cell>
          <table:table-cell office:value-type="string" table:style-name="ce5">
            <text:p>RAIA FLUTUANTE OFICIAL VERMELH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5387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05" table:style-name="ce6">
            <text:p><text:s/>10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60</text:p>
          </table:table-cell>
          <table:table-cell office:value-type="string" table:style-name="ce3">
            <text:p>RALO QUEBRA ONDA 1 1/2 S/ROSCA-INSERTO LATAO STD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30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8" table:style-name="ce4">
            <text:p><text:s/>3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328</text:p>
          </table:table-cell>
          <table:table-cell office:value-type="string" table:style-name="ce5">
            <text:p>RALO QUEBRA ONDA 1 1/2 VINIL STD ABS/INOX 316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464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5" table:style-name="ce6">
            <text:p><text:s/>5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39</text:p>
          </table:table-cell>
          <table:table-cell office:value-type="string" table:style-name="ce3">
            <text:p>RALO QUEBRA ONDA 66X125MM C/ TAMPA LBM BASE LATA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419.80.90</text:p>
          </table:table-cell>
          <table:table-cell office:value-type="string" table:style-name="ce3">
            <text:p>7899005601090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10" table:style-name="ce4">
            <text:p><text:s/>2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52</text:p>
          </table:table-cell>
          <table:table-cell office:value-type="string" table:style-name="ce5">
            <text:p>RALO QUEBRA ONDA ABS 1 1/2 (FIBRA FORTE CURTO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22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0" table:style-name="ce6">
            <text:p><text:s/>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56</text:p>
          </table:table-cell>
          <table:table-cell office:value-type="string" table:style-name="ce3">
            <text:p>RALO QUEBRA ONDA ABS 1 1/2 TRADICIONA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1267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9" table:style-name="ce4">
            <text:p><text:s/>2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4860</text:p>
          </table:table-cell>
          <table:table-cell office:value-type="string" table:style-name="ce5">
            <text:p>RALO QUEBRA ONDA C/ TAMPA LBM P/ PISCINAS DE FIB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0962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1" table:style-name="ce6">
            <text:p><text:s/>6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003</text:p>
          </table:table-cell>
          <table:table-cell office:value-type="string" table:style-name="ce3">
            <text:p>RALO QUEBRA ONDA INOX PRATIC 50MM FLA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1432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20" table:style-name="ce4">
            <text:p><text:s/>2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50</text:p>
          </table:table-cell>
          <table:table-cell office:value-type="string" table:style-name="ce5">
            <text:p>RALO QUEBRA ONDA ITC BRANCO FIB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001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1" table:style-name="ce6">
            <text:p><text:s/>3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51</text:p>
          </table:table-cell>
          <table:table-cell office:value-type="string" table:style-name="ce3">
            <text:p>RALO QUEBRA ONDA ITC INOX FIBR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002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8" table:style-name="ce4">
            <text:p><text:s/>4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67</text:p>
          </table:table-cell>
          <table:table-cell office:value-type="string" table:style-name="ce5">
            <text:p>RALO QUEBRA ONDA PLASTICO 1 1/2 C/INSERTO LATAO TOP LN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37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5" table:style-name="ce6">
            <text:p><text:s/>7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415</text:p>
          </table:table-cell>
          <table:table-cell office:value-type="string" table:style-name="ce3">
            <text:p>RALO QUEBRA ONDA PRATIC ROSCA LATA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415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94" table:style-name="ce4">
            <text:p><text:s/>9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85</text:p>
          </table:table-cell>
          <table:table-cell office:value-type="string" table:style-name="ce5">
            <text:p>REATOR 35W UVC POWE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3642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498.12" table:style-name="ce6">
            <text:p><text:s/>498,1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286</text:p>
          </table:table-cell>
          <table:table-cell office:value-type="string" table:style-name="ce3">
            <text:p>REATOR 55W UVC POWE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3659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582.70000000000005" table:style-name="ce4">
            <text:p><text:s/>582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87</text:p>
          </table:table-cell>
          <table:table-cell office:value-type="string" table:style-name="ce5">
            <text:p>REATOR 95W UVC POWE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3666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634.24" table:style-name="ce6">
            <text:p><text:s/>634,2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157</text:p>
          </table:table-cell>
          <table:table-cell office:value-type="string" table:style-name="ce3">
            <text:p>REATOR ELETROMECANICO PARA SUV 17M³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6674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315.79000000000002" table:style-name="ce4">
            <text:p><text:s/>315,7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108</text:p>
          </table:table-cell>
          <table:table-cell office:value-type="string" table:style-name="ce5">
            <text:p>REATOR ELETROMECANICO PARA SUV 7M³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6629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260.29000000000002" table:style-name="ce6">
            <text:p><text:s/>260,2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046</text:p>
          </table:table-cell>
          <table:table-cell office:value-type="string" table:style-name="ce3">
            <text:p>REDUCAO DE RUIDO SD105/130/160 (MOTOR C/ CAPA ACUSTICA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1.40.19</text:p>
          </table:table-cell>
          <table:table-cell office:value-type="string" table:style-name="ce3">
            <text:p>789900562814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273" table:style-name="ce4">
            <text:p><text:s/>3.27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045</text:p>
          </table:table-cell>
          <table:table-cell office:value-type="string" table:style-name="ce5">
            <text:p>REDUCAO DE RUIDO TH25/40/60/80 (MOTOR C/ CAPA ACUSTICA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1.40.19</text:p>
          </table:table-cell>
          <table:table-cell office:value-type="string" table:style-name="ce5">
            <text:p>7899005628134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895.47" table:style-name="ce6">
            <text:p><text:s/>1.895,4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054</text:p>
          </table:table-cell>
          <table:table-cell office:value-type="string" table:style-name="ce3">
            <text:p>REFIL PARA FILTRO DE SAUN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7480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121" table:style-name="ce4">
            <text:p><text:s/>12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443</text:p>
          </table:table-cell>
          <table:table-cell office:value-type="string" table:style-name="ce5">
            <text:p>REGISTRO PARA DUCH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81.80.19</text:p>
          </table:table-cell>
          <table:table-cell office:value-type="string" table:style-name="ce5">
            <text:p>789900561598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31.6" table:style-name="ce6">
            <text:p><text:s/>131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905</text:p>
          </table:table-cell>
          <table:table-cell office:value-type="string" table:style-name="ce3">
            <text:p>REGISTRO REGULADOR E DIRECIONADOR PARA DUCHA ADVACED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21401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38" table:style-name="ce4">
            <text:p><text:s/>23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36</text:p>
          </table:table-cell>
          <table:table-cell office:value-type="string" table:style-name="ce5">
            <text:p>RELE DE ANTI RETORNO PARA TROCADOR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577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44" table:style-name="ce6">
            <text:p><text:s/>24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87</text:p>
          </table:table-cell>
          <table:table-cell office:value-type="string" table:style-name="ce3">
            <text:p>RELE DE PARTIDA PARA TROCADOR SD 105 (A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592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12.25" table:style-name="ce4">
            <text:p><text:s/>412,2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107</text:p>
          </table:table-cell>
          <table:table-cell office:value-type="string" table:style-name="ce5">
            <text:p>RELE DE PROTECAO PARA SU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6612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498.12" table:style-name="ce6">
            <text:p><text:s/>498,1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35</text:p>
          </table:table-cell>
          <table:table-cell office:value-type="string" table:style-name="ce3">
            <text:p>RELE DE TEMPO 3X 60 MINUTOS PARA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5769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52.37" table:style-name="ce4">
            <text:p><text:s/>252,3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638</text:p>
          </table:table-cell>
          <table:table-cell office:value-type="string" table:style-name="ce5">
            <text:p>RELE P/ QUADRO FOUR FIX COD.20173 / 23127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49.00</text:p>
          </table:table-cell>
          <table:table-cell table:style-name="ce5"/>
          <table:table-cell office:value-type="float" office:value="3.25" table:style-name="ce6">
            <text:p><text:s/>3,25<text:s/></text:p>
          </table:table-cell>
          <table:table-cell office:value-type="float" office:value="61" table:style-name="ce6">
            <text:p><text:s/>6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6119</text:p>
          </table:table-cell>
          <table:table-cell office:value-type="string" table:style-name="ce3">
            <text:p>RESERVATORIO INOX 18,0 KW S/ RES FLANG SAIDA <text:s/>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3.00.90</text:p>
          </table:table-cell>
          <table:table-cell office:value-type="string" table:style-name="ce3">
            <text:p>789900561697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321.5500000000002" table:style-name="ce4">
            <text:p><text:s/>2.321,5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6120</text:p>
          </table:table-cell>
          <table:table-cell office:value-type="string" table:style-name="ce5">
            <text:p>RESERVATORIO INOX 24,0/27,0KW S/ RES FLANG SAIDA <text:s/>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3.00.90</text:p>
          </table:table-cell>
          <table:table-cell office:value-type="string" table:style-name="ce5">
            <text:p>7899005615424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2402.16" table:style-name="ce6">
            <text:p><text:s/>2.402,1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57</text:p>
          </table:table-cell>
          <table:table-cell office:value-type="string" table:style-name="ce3">
            <text:p>RESERVATORIO INOX 6/ 9/ 12,0KW S/ RES FLANG SAIDA 1.1/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3.00.90</text:p>
          </table:table-cell>
          <table:table-cell office:value-type="string" table:style-name="ce3">
            <text:p>789900561754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577.65" table:style-name="ce4">
            <text:p><text:s/>1.577,6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58</text:p>
          </table:table-cell>
          <table:table-cell office:value-type="string" table:style-name="ce5">
            <text:p>RESERVATORIO INOX15,0KW S/ RES FLANG SAIDA <text:s/>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3.00.90</text:p>
          </table:table-cell>
          <table:table-cell office:value-type="string" table:style-name="ce5">
            <text:p>789900561755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690" table:style-name="ce6">
            <text:p><text:s/>1.6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6117</text:p>
          </table:table-cell>
          <table:table-cell office:value-type="string" table:style-name="ce3">
            <text:p>RESERVATORIO INOX6,0/ 9,0KW S/ RES FLANG SAIDA <text:s/>1 1/4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3.00.90</text:p>
          </table:table-cell>
          <table:table-cell office:value-type="string" table:style-name="ce3">
            <text:p>789900561543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397.96" table:style-name="ce4">
            <text:p><text:s/>1.397,9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60</text:p>
          </table:table-cell>
          <table:table-cell office:value-type="string" table:style-name="ce5">
            <text:p>RESERVATORIO STEAM INOX 6/9/12 KW S/ RES SAIDA 1.1/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3.00.90</text:p>
          </table:table-cell>
          <table:table-cell office:value-type="string" table:style-name="ce5">
            <text:p>7899005617565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397.96" table:style-name="ce6">
            <text:p><text:s/>1.397,9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287</text:p>
          </table:table-cell>
          <table:table-cell office:value-type="string" table:style-name="ce3">
            <text:p>RESISTENCIA DE 2,0 KW PARA FORNO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10</text:p>
          </table:table-cell>
          <table:table-cell office:value-type="string" table:style-name="ce3">
            <text:p>7899005615158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350" table:style-name="ce4">
            <text:p><text:s/>3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288</text:p>
          </table:table-cell>
          <table:table-cell office:value-type="string" table:style-name="ce5">
            <text:p>RESISTENCIA DE 2,5 KW PARA FORNO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10</text:p>
          </table:table-cell>
          <table:table-cell office:value-type="string" table:style-name="ce5">
            <text:p>7899005615165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503" table:style-name="ce6">
            <text:p><text:s/>50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911</text:p>
          </table:table-cell>
          <table:table-cell office:value-type="string" table:style-name="ce3">
            <text:p>RESISTENCIA DE AQUECIMENTO FLANGEADA 4KW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90</text:p>
          </table:table-cell>
          <table:table-cell table:style-name="ce3"/>
          <table:table-cell office:value-type="float" office:value="6.5" table:style-name="ce4">
            <text:p><text:s/>6,50<text:s/></text:p>
          </table:table-cell>
          <table:table-cell office:value-type="float" office:value="443" table:style-name="ce4">
            <text:p><text:s/>4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0116</text:p>
          </table:table-cell>
          <table:table-cell office:value-type="string" table:style-name="ce5">
            <text:p>RESISTENCIA DE AQUECIMENTO FLANGEADA 6,0 KW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90</text:p>
          </table:table-cell>
          <table:table-cell office:value-type="string" table:style-name="ce5">
            <text:p>7899005616650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429" table:style-name="ce6">
            <text:p><text:s/>42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0117</text:p>
          </table:table-cell>
          <table:table-cell office:value-type="string" table:style-name="ce3">
            <text:p>RESISTENCIA DE AQUECIMENTO FLANGEADA 9,0 KW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90</text:p>
          </table:table-cell>
          <table:table-cell office:value-type="string" table:style-name="ce3">
            <text:p>7899005616667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447" table:style-name="ce4">
            <text:p><text:s/>44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870</text:p>
          </table:table-cell>
          <table:table-cell office:value-type="string" table:style-name="ce5">
            <text:p>RESISTENCIA DE AQUECIMENTO FLANGEADA DE 12,0 KW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90</text:p>
          </table:table-cell>
          <table:table-cell office:value-type="string" table:style-name="ce5">
            <text:p>789900561560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572" table:style-name="ce6">
            <text:p><text:s/>57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887</text:p>
          </table:table-cell>
          <table:table-cell office:value-type="string" table:style-name="ce3">
            <text:p>RESISTENCIA DE COBRE 6,0 KW 220/380V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10</text:p>
          </table:table-cell>
          <table:table-cell office:value-type="string" table:style-name="ce3">
            <text:p>7899005615011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503" table:style-name="ce4">
            <text:p><text:s/>50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888</text:p>
          </table:table-cell>
          <table:table-cell office:value-type="string" table:style-name="ce5">
            <text:p>RESISTENCIA DE COBRE 9,0 KW 220/380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10</text:p>
          </table:table-cell>
          <table:table-cell office:value-type="string" table:style-name="ce5">
            <text:p>7899005615028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503" table:style-name="ce6">
            <text:p><text:s/>50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3813</text:p>
          </table:table-cell>
          <table:table-cell office:value-type="string" table:style-name="ce3">
            <text:p>RESISTENCIA ESPECIAL DE 2,0 KW PARA FORNO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90</text:p>
          </table:table-cell>
          <table:table-cell office:value-type="string" table:style-name="ce3">
            <text:p>7899005617770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776" table:style-name="ce4">
            <text:p><text:s/>77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020</text:p>
          </table:table-cell>
          <table:table-cell office:value-type="string" table:style-name="ce5">
            <text:p>RESISTENCIA ESPECIAL DE 2,4 KW PARA FORNO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10</text:p>
          </table:table-cell>
          <table:table-cell office:value-type="string" table:style-name="ce5">
            <text:p>7899005616490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740" table:style-name="ce6">
            <text:p><text:s/>7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417</text:p>
          </table:table-cell>
          <table:table-cell office:value-type="string" table:style-name="ce3">
            <text:p>RESISTENCIA P/ SAUNA SECA 3,3KW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16.80.10</text:p>
          </table:table-cell>
          <table:table-cell office:value-type="string" table:style-name="ce3">
            <text:p>7899005617213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579" table:style-name="ce4">
            <text:p><text:s/>57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34</text:p>
          </table:table-cell>
          <table:table-cell office:value-type="string" table:style-name="ce5">
            <text:p>RESISTENCIA P/ SAUNA SECA 3,3KW <text:s/>USO COMERCIA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10</text:p>
          </table:table-cell>
          <table:table-cell office:value-type="string" table:style-name="ce5">
            <text:p>7899005617954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697.65" table:style-name="ce6">
            <text:p><text:s/>697,6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60</text:p>
          </table:table-cell>
          <table:table-cell office:value-type="string" table:style-name="ce3">
            <text:p>ROBO LIMP. AUTO. MODEL RB4I 110.220V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89.99</text:p>
          </table:table-cell>
          <table:table-cell office:value-type="string" table:style-name="ce3">
            <text:p>789900563278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00" table:style-name="ce4">
            <text:p><text:s/>16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128</text:p>
          </table:table-cell>
          <table:table-cell office:value-type="string" table:style-name="ce5">
            <text:p>ROBO LIMPADOR AUT 2X2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89.99</text:p>
          </table:table-cell>
          <table:table-cell office:value-type="string" table:style-name="ce5">
            <text:p>789900562435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83000" table:style-name="ce6">
            <text:p><text:s/>83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296</text:p>
          </table:table-cell>
          <table:table-cell office:value-type="string" table:style-name="ce3">
            <text:p>ROBO LIMPADOR AUT RB2 BI VOL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89.99</text:p>
          </table:table-cell>
          <table:table-cell office:value-type="string" table:style-name="ce3">
            <text:p>789900561860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00" table:style-name="ce4">
            <text:p><text:s/>9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591</text:p>
          </table:table-cell>
          <table:table-cell office:value-type="string" table:style-name="ce5">
            <text:p>ROBO LIMPADOR AUT RB4I 110V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89.99</text:p>
          </table:table-cell>
          <table:table-cell office:value-type="string" table:style-name="ce5">
            <text:p>789900563027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5740" table:style-name="ce6">
            <text:p><text:s/>15.7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1297</text:p>
          </table:table-cell>
          <table:table-cell office:value-type="string" table:style-name="ce3">
            <text:p>ROBO LIMPADOR AUT RB4I 220V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89.99</text:p>
          </table:table-cell>
          <table:table-cell office:value-type="string" table:style-name="ce3">
            <text:p>789900561861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90" table:style-name="ce4">
            <text:p><text:s/>15.9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1298</text:p>
          </table:table-cell>
          <table:table-cell office:value-type="string" table:style-name="ce5">
            <text:p>ROBO LIMPADOR AUT RB6 BI VOL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89.99</text:p>
          </table:table-cell>
          <table:table-cell office:value-type="string" table:style-name="ce5">
            <text:p>789900561862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990" table:style-name="ce6">
            <text:p><text:s/>9.990,00<text:s/></text:p>
          </table:table-cell>
          <table:table-cell office:value-type="float" office:value="1" table:formula="of:=IFERROR(VLOOKUP([.A:.A];['SB1'.B:.G];6;FALSE);&quot;&quot;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7453</text:p>
          </table:table-cell>
          <table:table-cell office:value-type="string" table:style-name="ce3">
            <text:p>ROBO LIMPADOR AUT RB7 BIVOLT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89.99</text:p>
          </table:table-cell>
          <table:table-cell office:value-type="string" table:style-name="ce3">
            <text:p>789900563393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500" table:style-name="ce4">
            <text:p><text:s/>9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1299</text:p>
          </table:table-cell>
          <table:table-cell office:value-type="string" table:style-name="ce5">
            <text:p>ROBO LIMPADOR AUT WAVE100 BI VOLT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89.99</text:p>
          </table:table-cell>
          <table:table-cell office:value-type="string" table:style-name="ce5">
            <text:p>789900561863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9980" table:style-name="ce6">
            <text:p><text:s/>39.9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40</text:p>
          </table:table-cell>
          <table:table-cell office:value-type="string" table:style-name="ce3">
            <text:p>ROBO LIMPADOR AUT. LIBERTY 200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89.99</text:p>
          </table:table-cell>
          <table:table-cell office:value-type="string" table:style-name="ce3">
            <text:p>789900563235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600" table:style-name="ce4">
            <text:p><text:s/>12.600,00<text:s/></text:p>
          </table:table-cell>
          <table:table-cell office:value-type="float" office:value="8" table:formula="of:=IFERROR(VLOOKUP([.A:.A];['SB1'.B:.G];6;FALSE);&quot;&quot;)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735</text:p>
          </table:table-cell>
          <table:table-cell office:value-type="string" table:style-name="ce5">
            <text:p>RODA CARRO ROB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93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8" table:style-name="ce6">
            <text:p><text:s/>9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85</text:p>
          </table:table-cell>
          <table:table-cell office:value-type="string" table:style-name="ce3">
            <text:p>RODA DIANTEIRA APARELHO P/ FILTRAR PISCINA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83.90.00</text:p>
          </table:table-cell>
          <table:table-cell office:value-type="string" table:style-name="ce3">
            <text:p>7899005620459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61" table:style-name="ce4">
            <text:p><text:s/>61,00<text:s/></text:p>
          </table:table-cell>
          <table:table-cell office:value-type="float" office:value="28" table:formula="of:=IFERROR(VLOOKUP([.A:.A];['SB1'.B:.G];6;FALSE);&quot;&quot;)" table:style-name="ce1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55</text:p>
          </table:table-cell>
          <table:table-cell office:value-type="string" table:style-name="ce5">
            <text:p>RODA DIANTEIRA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83.90.00</text:p>
          </table:table-cell>
          <table:table-cell office:value-type="string" table:style-name="ce5">
            <text:p>789900562016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4" table:style-name="ce6">
            <text:p><text:s/>64,00<text:s/></text:p>
          </table:table-cell>
          <table:table-cell office:value-type="float" office:value="16" table:formula="of:=IFERROR(VLOOKUP([.A:.A];['SB1'.B:.G];6;FALSE);&quot;&quot;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17915</text:p>
          </table:table-cell>
          <table:table-cell office:value-type="string" table:style-name="ce3">
            <text:p>RODA P/ ENROLADOR DE CAPA INOX (2 PECAS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258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83.20000000000005" table:style-name="ce4">
            <text:p><text:s/>583,2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303</text:p>
          </table:table-cell>
          <table:table-cell office:value-type="string" table:style-name="ce5">
            <text:p>RODIZIO ENROLADOR DE CAP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467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13.1" table:style-name="ce6">
            <text:p><text:s/>113,1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55</text:p>
          </table:table-cell>
          <table:table-cell office:value-type="string" table:style-name="ce3">
            <text:p>RODO ASPIRADOR 03 RODAS JUMBO LIMP PLUS (2,085KG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025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5" table:style-name="ce4">
            <text:p><text:s/>14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396</text:p>
          </table:table-cell>
          <table:table-cell office:value-type="string" table:style-name="ce5">
            <text:p>RODO ASPIRADOR 08 RODAS FLEXIVEL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08.70.00</text:p>
          </table:table-cell>
          <table:table-cell office:value-type="string" table:style-name="ce5">
            <text:p>7899005624655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65" table:style-name="ce6">
            <text:p><text:s/>1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461</text:p>
          </table:table-cell>
          <table:table-cell office:value-type="string" table:style-name="ce3">
            <text:p>RODO ASPIRADOR 08 RODAS GIII (1,54KG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031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" table:style-name="ce4">
            <text:p><text:s/>13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57</text:p>
          </table:table-cell>
          <table:table-cell office:value-type="string" table:style-name="ce5">
            <text:p>RODO ASPIRADOR ASA DELTA COM ESCOVA (1,685KG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027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9" table:style-name="ce6">
            <text:p><text:s/>9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652</text:p>
          </table:table-cell>
          <table:table-cell office:value-type="string" table:style-name="ce3">
            <text:p>RODO ASPIRADOR BIG 03 RODAS (1,950KG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1276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5" table:style-name="ce4">
            <text:p><text:s/>11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651</text:p>
          </table:table-cell>
          <table:table-cell office:value-type="string" table:style-name="ce5">
            <text:p>RODO ASPIRADOR BIG ESCOVA (2,050KG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1275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20" table:style-name="ce6">
            <text:p><text:s/>1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20</text:p>
          </table:table-cell>
          <table:table-cell office:value-type="string" table:style-name="ce3">
            <text:p>RODO ASPIRADOR BIG ESFERA (3,8 KG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table:style-name="ce3"/>
          <table:table-cell office:value-type="float" office:value="0" table:style-name="ce4">
            <text:p><text:s/>-<text:s/></text:p>
          </table:table-cell>
          <table:table-cell office:value-type="float" office:value="440" table:style-name="ce4">
            <text:p><text:s/>4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62</text:p>
          </table:table-cell>
          <table:table-cell office:value-type="string" table:style-name="ce5">
            <text:p>RODO ASPIRADOR BOOMERANG COM ESCOVA (1,73KG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032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5" table:style-name="ce6">
            <text:p><text:s/>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287</text:p>
          </table:table-cell>
          <table:table-cell office:value-type="string" table:style-name="ce3">
            <text:p>RODO ASPIRADOR ESCOVA SLIM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801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7" table:style-name="ce4">
            <text:p><text:s/>5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60</text:p>
          </table:table-cell>
          <table:table-cell office:value-type="string" table:style-name="ce5">
            <text:p>RODO ASPIRADOR ESFERA (1,58KG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030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5" table:style-name="ce6">
            <text:p><text:s/>9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500</text:p>
          </table:table-cell>
          <table:table-cell office:value-type="string" table:style-name="ce3">
            <text:p>RODO ASPIRADOR JUMBO ESCOV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603.90.00</text:p>
          </table:table-cell>
          <table:table-cell office:value-type="string" table:style-name="ce3">
            <text:p>789900560524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" table:style-name="ce4">
            <text:p><text:s/>1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56</text:p>
          </table:table-cell>
          <table:table-cell office:value-type="string" table:style-name="ce5">
            <text:p>RODO ASPIRADOR OLIMPICO 16 RODAS (5,0KG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603.90.00</text:p>
          </table:table-cell>
          <table:table-cell office:value-type="string" table:style-name="ce5">
            <text:p>789900560026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85" table:style-name="ce6">
            <text:p><text:s/>58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694</text:p>
          </table:table-cell>
          <table:table-cell office:value-type="string" table:style-name="ce3">
            <text:p>ROLAMENTO ESCOVA ATIVA ROBO LIMPADOR AUTOMATICO RB4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54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.75" table:style-name="ce4">
            <text:p><text:s/>8,75<text:s/></text:p>
          </table:table-cell>
          <table:table-cell office:value-type="float" office:value="21" table:formula="of:=IFERROR(VLOOKUP([.A:.A];['SB1'.B:.G];6;FALSE);&quot;&quot;)" table:style-name="ce1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0468</text:p>
          </table:table-cell>
          <table:table-cell office:value-type="string" table:style-name="ce5">
            <text:p>ROLETE <text:s/>EM PLAST. P/ ASPIRADOR OLIMPIC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038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0.39" table:style-name="ce6">
            <text:p><text:s/>30,3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7707</text:p>
          </table:table-cell>
          <table:table-cell office:value-type="string" table:style-name="ce3">
            <text:p>ROLETE PARA ENROLADOR DE CAPA PLASTIC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498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.6999999999999993" table:style-name="ce4">
            <text:p><text:s/>8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467</text:p>
          </table:table-cell>
          <table:table-cell office:value-type="string" table:style-name="ce5">
            <text:p>ROLETE PLAST. COMPLETO P/ <text:s/>ASPIRADOR 3 RODA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037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11.88" table:style-name="ce6">
            <text:p><text:s/>11,88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914</text:p>
          </table:table-cell>
          <table:table-cell office:value-type="string" table:style-name="ce3">
            <text:p>ROLETE PLASTICO ASPIR. 8 RODAS I E BIG 3 RODA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5319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.94" table:style-name="ce4">
            <text:p><text:s/>5,9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694</text:p>
          </table:table-cell>
          <table:table-cell office:value-type="string" table:style-name="ce5">
            <text:p>ROLETE PLASTICO C/ PINO ASPIRADOR 08 RODA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341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.62" table:style-name="ce6">
            <text:p><text:s/>4,6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6321</text:p>
          </table:table-cell>
          <table:table-cell office:value-type="string" table:style-name="ce3">
            <text:p>ROSCA 3 FIOS (DHM VINIL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492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.62" table:style-name="ce4">
            <text:p><text:s/>4,6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928</text:p>
          </table:table-cell>
          <table:table-cell office:value-type="string" table:style-name="ce5">
            <text:p>SENSOR DE COBRE P/ CONTR. TOUCH DE TEMPERATUR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32.90.99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38" table:style-name="ce6">
            <text:p><text:s/>3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341</text:p>
          </table:table-cell>
          <table:table-cell office:value-type="string" table:style-name="ce3">
            <text:p>SENSOR DE NIVEL ELETRICO P/ BOIA PLASTICA COD.MP-22287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26.10.29</text:p>
          </table:table-cell>
          <table:table-cell office:value-type="string" table:style-name="ce3">
            <text:p>789900562831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2" table:style-name="ce4">
            <text:p><text:s/>23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53</text:p>
          </table:table-cell>
          <table:table-cell office:value-type="string" table:style-name="ce5">
            <text:p>SENSOR DO TERMOSTATO PARA QUADROS DE COMAND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585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73.69" table:style-name="ce6">
            <text:p><text:s/>73,69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933</text:p>
          </table:table-cell>
          <table:table-cell office:value-type="string" table:style-name="ce3">
            <text:p>SENSOR TEMP. PLAST. P/ PLACA ELETRONICA TOUCH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32.90.99</text:p>
          </table:table-cell>
          <table:table-cell table:style-name="ce3"/>
          <table:table-cell office:value-type="float" office:value="9.75" table:style-name="ce4">
            <text:p><text:s/>9,75<text:s/></text:p>
          </table:table-cell>
          <table:table-cell office:value-type="float" office:value="40" table:style-name="ce4">
            <text:p><text:s/>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2455</text:p>
          </table:table-cell>
          <table:table-cell office:value-type="string" table:style-name="ce5">
            <text:p>SERVICOS DE REPAROS 1401 C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000.00.00</text:p>
          </table:table-cell>
          <table:table-cell table:style-name="ce5"/>
          <table:table-cell office:value-type="float" office:value="0" table:style-name="ce6">
            <text:p><text:s/>-<text:s/></text:p>
          </table:table-cell>
          <table:table-cell office:value-type="float" office:value="100" table:style-name="ce6">
            <text:p><text:s/>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62</text:p>
          </table:table-cell>
          <table:table-cell office:value-type="string" table:style-name="ce3">
            <text:p>SINAL FLORESCENTE AMARELO PARA QUADROS <text:s/>DE COMAND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587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.01" table:style-name="ce4">
            <text:p><text:s/>15,01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41</text:p>
          </table:table-cell>
          <table:table-cell office:value-type="string" table:style-name="ce5">
            <text:p>SINAL FLORESCENTE VERDE PARA QUADROS DE COMAND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581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.53" table:style-name="ce6">
            <text:p><text:s/>14,5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47</text:p>
          </table:table-cell>
          <table:table-cell office:value-type="string" table:style-name="ce3">
            <text:p>SINAL FLORESCENTE VERMELHO PARA QUADROS DE COMAND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583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.53" table:style-name="ce4">
            <text:p><text:s/>14,5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991</text:p>
          </table:table-cell>
          <table:table-cell office:value-type="string" table:style-name="ce5">
            <text:p>SKIMMER BOCA ESTREITA (BE) ALVENARI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151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300" table:style-name="ce6">
            <text:p><text:s/>1.3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911</text:p>
          </table:table-cell>
          <table:table-cell office:value-type="string" table:style-name="ce3">
            <text:p>SKIMMER BOCA ESTREITA (BE) VINIL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3120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450" table:style-name="ce4">
            <text:p><text:s/>1.4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74</text:p>
          </table:table-cell>
          <table:table-cell office:value-type="string" table:style-name="ce5">
            <text:p>SKIMMER BOCA LARGA (BL) BRAN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44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50" table:style-name="ce6">
            <text:p><text:s/>6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144</text:p>
          </table:table-cell>
          <table:table-cell office:value-type="string" table:style-name="ce3">
            <text:p>SKIMMER BOCA LARGA (BL) PRAT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267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650" table:style-name="ce4">
            <text:p><text:s/>6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73</text:p>
          </table:table-cell>
          <table:table-cell office:value-type="string" table:style-name="ce5">
            <text:p>SKIMMER BOCA PEQUENA (BP) BRANC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143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90" table:style-name="ce6">
            <text:p><text:s/>4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965</text:p>
          </table:table-cell>
          <table:table-cell office:value-type="string" table:style-name="ce3">
            <text:p>SKIMMER BOCA PEQUENA (BP) COM ANGULO (BRANCO)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377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70" table:style-name="ce4">
            <text:p><text:s/>4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472</text:p>
          </table:table-cell>
          <table:table-cell office:value-type="string" table:style-name="ce5">
            <text:p>SKIMMER BOCA PEQUENA (BP) PRAT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010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490" table:style-name="ce6">
            <text:p><text:s/>4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1501</text:p>
          </table:table-cell>
          <table:table-cell office:value-type="string" table:style-name="ce3">
            <text:p>SKIMMER COMPACT BRAN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525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40" table:style-name="ce4">
            <text:p><text:s/>24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4976</text:p>
          </table:table-cell>
          <table:table-cell office:value-type="string" table:style-name="ce5">
            <text:p>SOQUETE DO SUV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50.90</text:p>
          </table:table-cell>
          <table:table-cell office:value-type="string" table:style-name="ce5">
            <text:p>7899005622071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2" table:style-name="ce6">
            <text:p><text:s/>4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29</text:p>
          </table:table-cell>
          <table:table-cell office:value-type="string" table:style-name="ce3">
            <text:p>SUPORTE ALAVANCA CARRO ROBO LIMPADOR AUTOMAT.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87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3" table:style-name="ce4">
            <text:p><text:s/>73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493</text:p>
          </table:table-cell>
          <table:table-cell office:value-type="string" table:style-name="ce5">
            <text:p>SUPORTE FIXACAO TRASEIRO TIV 25/45/65/7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. <text:s/>.</text:p>
          </table:table-cell>
          <table:table-cell office:value-type="string" table:style-name="ce5">
            <text:p>789900563441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7" table:style-name="ce6">
            <text:p><text:s/>5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1381</text:p>
          </table:table-cell>
          <table:table-cell office:value-type="string" table:style-name="ce3">
            <text:p>SUPORTE INOX REFLETOR LENTE LUMINOS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553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4" table:style-name="ce4">
            <text:p><text:s/>2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471</text:p>
          </table:table-cell>
          <table:table-cell office:value-type="string" table:style-name="ce5">
            <text:p>SUPORTE MOTOR TROCADOR SD 105 A SD 16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02.90.00</text:p>
          </table:table-cell>
          <table:table-cell office:value-type="string" table:style-name="ce5">
            <text:p>789900561604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51.57" table:style-name="ce6">
            <text:p><text:s/>351,5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470</text:p>
          </table:table-cell>
          <table:table-cell office:value-type="string" table:style-name="ce3">
            <text:p>SUPORTE MOTOR TROCADOR SD 40 A SD 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02.90.00</text:p>
          </table:table-cell>
          <table:table-cell office:value-type="string" table:style-name="ce3">
            <text:p>789900561603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.63" table:style-name="ce4">
            <text:p><text:s/>303,6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064</text:p>
          </table:table-cell>
          <table:table-cell office:value-type="string" table:style-name="ce5">
            <text:p>SUPORTE MOTOR VENT. ANTI HOR. SD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2162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423" table:style-name="ce6">
            <text:p><text:s/>42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439</text:p>
          </table:table-cell>
          <table:table-cell office:value-type="string" table:style-name="ce3">
            <text:p>SUPORTE MOTOR VENT. SD 40/60/80 P/ HELICE PLASTIC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30090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202" table:style-name="ce4">
            <text:p><text:s/>20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441</text:p>
          </table:table-cell>
          <table:table-cell office:value-type="string" table:style-name="ce5">
            <text:p>SUPORTE MOTOR VENT. TH 25/40/60/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table:style-name="ce5"/>
          <table:table-cell office:value-type="float" office:value="5" table:style-name="ce6">
            <text:p><text:s/>5,00<text:s/></text:p>
          </table:table-cell>
          <table:table-cell office:value-type="float" office:value="45" table:style-name="ce6">
            <text:p><text:s/>4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18</text:p>
          </table:table-cell>
          <table:table-cell office:value-type="string" table:style-name="ce3">
            <text:p>SUPORTE P/ CORRIMAO EM ABS E LATAO CROMADO FIB/VN/ALV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419.80.90</text:p>
          </table:table-cell>
          <table:table-cell office:value-type="string" table:style-name="ce3">
            <text:p>789900560088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90" table:style-name="ce4">
            <text:p><text:s/>3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17</text:p>
          </table:table-cell>
          <table:table-cell office:value-type="string" table:style-name="ce5">
            <text:p>SUPORTE P/ CORRIMAO EM LATAO CROMADO ALVENARI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19.80.90</text:p>
          </table:table-cell>
          <table:table-cell office:value-type="string" table:style-name="ce5">
            <text:p>789900560087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30" table:style-name="ce6">
            <text:p><text:s/>3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16</text:p>
          </table:table-cell>
          <table:table-cell office:value-type="string" table:style-name="ce3">
            <text:p>SUPORTE P/ CORRIMAO UNIVERSAL ACO INOX <text:s/>FIB/VN/ALV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00864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550" table:style-name="ce4">
            <text:p><text:s/>5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26</text:p>
          </table:table-cell>
          <table:table-cell office:value-type="string" table:style-name="ce5">
            <text:p>SUPORTE P/ RAIA ABS FIB/VN/ALV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096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80" table:style-name="ce6">
            <text:p><text:s/>1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25</text:p>
          </table:table-cell>
          <table:table-cell office:value-type="string" table:style-name="ce3">
            <text:p>SUPORTE P/ RAIA LATAO CROMADO ALVENARI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419.80.90</text:p>
          </table:table-cell>
          <table:table-cell office:value-type="string" table:style-name="ce3">
            <text:p>7899005600956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63" table:style-name="ce4">
            <text:p><text:s/>16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24</text:p>
          </table:table-cell>
          <table:table-cell office:value-type="string" table:style-name="ce5">
            <text:p>SUPORTE P/ RAIA UNIVERSAL ACO INOX FIB/VN/ALV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949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77" table:style-name="ce6">
            <text:p><text:s/>17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253</text:p>
          </table:table-cell>
          <table:table-cell office:value-type="string" table:style-name="ce3">
            <text:p>SUPORTE PLASTICO 15X15 PARA DREN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32025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46" table:style-name="ce4">
            <text:p><text:s/>4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6989</text:p>
          </table:table-cell>
          <table:table-cell office:value-type="string" table:style-name="ce5">
            <text:p>SUPORTE PLASTICO PARA CABO / PENEIRA / ASPIRADOR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2003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8" table:style-name="ce6">
            <text:p><text:s/>2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919</text:p>
          </table:table-cell>
          <table:table-cell office:value-type="string" table:style-name="ce3">
            <text:p>SUPORTE PLASTICO PROTECAO MOTOR SD 105 A 16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6575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55.43" table:style-name="ce4">
            <text:p><text:s/>55,4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918</text:p>
          </table:table-cell>
          <table:table-cell office:value-type="string" table:style-name="ce5">
            <text:p>SUPORTE PLASTICO PROTECAO MOTOR SD 25 A 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656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8.87" table:style-name="ce6">
            <text:p><text:s/>28,8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885</text:p>
          </table:table-cell>
          <table:table-cell office:value-type="string" table:style-name="ce3">
            <text:p>SUPORTE VENTILADOR PARA TROCADOR SD 15/ 2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4.90.20</text:p>
          </table:table-cell>
          <table:table-cell office:value-type="string" table:style-name="ce3">
            <text:p>789900561638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92.52999999999997" table:style-name="ce4">
            <text:p><text:s/>292,5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144</text:p>
          </table:table-cell>
          <table:table-cell office:value-type="string" table:style-name="ce5">
            <text:p>TAMPA BRANCO P/ <text:s/>DISP ASPIRACAO 1 1/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0946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4.53" table:style-name="ce6">
            <text:p><text:s/>14,5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265</text:p>
          </table:table-cell>
          <table:table-cell office:value-type="string" table:style-name="ce3">
            <text:p>TAMPA CONEXAO <text:s/>GRADE PARA DREN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0951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0.03" table:style-name="ce4">
            <text:p><text:s/>30,0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184</text:p>
          </table:table-cell>
          <table:table-cell office:value-type="string" table:style-name="ce5">
            <text:p>TAMPA CONEXAO DO RALO QUEBRA ONDA 1.1/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331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2.54" table:style-name="ce6">
            <text:p><text:s/>12,5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276</text:p>
          </table:table-cell>
          <table:table-cell office:value-type="string" table:style-name="ce3">
            <text:p>TAMPA CONEXAO DO RALO QUEBRA ONDA 1.1/2 PRAT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65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4.53" table:style-name="ce4">
            <text:p><text:s/>14,5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210</text:p>
          </table:table-cell>
          <table:table-cell office:value-type="string" table:style-name="ce5">
            <text:p>TAMPA CONEXAO P/ <text:s/>DOSADOR AUTOMATIC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4496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9.6" table:style-name="ce6">
            <text:p><text:s/>39,6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143</text:p>
          </table:table-cell>
          <table:table-cell office:value-type="string" table:style-name="ce3">
            <text:p>TAMPA CONEXAO P/ DISPOSITIVO ASPIRACAO 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431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3.2" table:style-name="ce4">
            <text:p><text:s/>13,2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41</text:p>
          </table:table-cell>
          <table:table-cell office:value-type="string" table:style-name="ce5">
            <text:p>TAMPA CORPO ROB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02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17" table:style-name="ce6">
            <text:p><text:s/>217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5604</text:p>
          </table:table-cell>
          <table:table-cell office:value-type="string" table:style-name="ce3">
            <text:p>TAMPA CX PASSAGEM REDOND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3041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8" table:style-name="ce4">
            <text:p><text:s/>3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3163</text:p>
          </table:table-cell>
          <table:table-cell office:value-type="string" table:style-name="ce5">
            <text:p>TAMPA DISPOSITIVO ASP. PRATIC 1 1/2 ABS PRAT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049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0.16" table:style-name="ce6">
            <text:p><text:s/>10,16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4224</text:p>
          </table:table-cell>
          <table:table-cell office:value-type="string" table:style-name="ce3">
            <text:p>TAMPA DO CESTO COLETOR BL/BP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456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6.07" table:style-name="ce4">
            <text:p><text:s/>16,0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213</text:p>
          </table:table-cell>
          <table:table-cell office:value-type="string" table:style-name="ce5">
            <text:p>TAMPA DO DRENO DE FUNDO FIBRA FORTE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451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9" table:style-name="ce6">
            <text:p><text:s/>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32</text:p>
          </table:table-cell>
          <table:table-cell office:value-type="string" table:style-name="ce3">
            <text:p>TAMPA DO ROTOR ROBO LIMP AUT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347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76" table:style-name="ce4">
            <text:p><text:s/>76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18250</text:p>
          </table:table-cell>
          <table:table-cell office:value-type="string" table:style-name="ce5">
            <text:p>TAMPA FECHAMENTO AUT P/ DISP ASP ROSCA FIN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343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0" table:style-name="ce6">
            <text:p><text:s/>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8551</text:p>
          </table:table-cell>
          <table:table-cell office:value-type="string" table:style-name="ce3">
            <text:p>TAMPA FECHAMENTO AUT P/ DISP ASP ROSCA GROSS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344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60" table:style-name="ce4">
            <text:p><text:s/>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35</text:p>
          </table:table-cell>
          <table:table-cell office:value-type="string" table:style-name="ce5">
            <text:p>TAMPA FILTRO ROBO LIMP AUT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1996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85" table:style-name="ce6">
            <text:p><text:s/>185,00<text:s/></text:p>
          </table:table-cell>
          <table:table-cell office:value-type="float" office:value="4" table:formula="of:=IFERROR(VLOOKUP([.A:.A];['SB1'.B:.G];6;FALSE);&quot;&quot;)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8913</text:p>
          </table:table-cell>
          <table:table-cell office:value-type="string" table:style-name="ce3">
            <text:p>TAMPA FRONTAL Q C GV <text:s/>DIGITAL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2580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8" table:style-name="ce4">
            <text:p><text:s/>4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497</text:p>
          </table:table-cell>
          <table:table-cell office:value-type="string" table:style-name="ce5">
            <text:p>TAMPA GABINETE TIV 25/45/65/7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. <text:s/>.</text:p>
          </table:table-cell>
          <table:table-cell office:value-type="string" table:style-name="ce5">
            <text:p>789900563439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904" table:style-name="ce6">
            <text:p><text:s/>1.90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4859</text:p>
          </table:table-cell>
          <table:table-cell office:value-type="string" table:style-name="ce3">
            <text:p>TAMPA LBM BRANC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95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8.5" table:style-name="ce4">
            <text:p><text:s/>38,5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6254</text:p>
          </table:table-cell>
          <table:table-cell office:value-type="string" table:style-name="ce5">
            <text:p>TAMPA LBM PRAT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151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2" table:style-name="ce6">
            <text:p><text:s/>3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257</text:p>
          </table:table-cell>
          <table:table-cell office:value-type="string" table:style-name="ce3">
            <text:p>TAMPA P/ DOSADOR DE CLORO 4KG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991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" table:style-name="ce4">
            <text:p><text:s/>16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64</text:p>
          </table:table-cell>
          <table:table-cell office:value-type="string" table:style-name="ce5">
            <text:p>TAMPA P/ DRENO 15X15 BRANC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21548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4" table:style-name="ce6">
            <text:p><text:s/>3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963</text:p>
          </table:table-cell>
          <table:table-cell office:value-type="string" table:style-name="ce3">
            <text:p>TAMPA P/ DRENO 15X15 PRAT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2153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34" table:style-name="ce4">
            <text:p><text:s/>3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6580</text:p>
          </table:table-cell>
          <table:table-cell office:value-type="string" table:style-name="ce5">
            <text:p>TAMPA P/ DRENO 30CM X 30CM FSB PRAT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201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49" table:style-name="ce6">
            <text:p><text:s/>24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1055</text:p>
          </table:table-cell>
          <table:table-cell office:value-type="string" table:style-name="ce3">
            <text:p>TAMPA P/ DRENO FSB (BRANCA) C/ KIT PARAFUSO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005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75" table:style-name="ce4">
            <text:p><text:s/>7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3664</text:p>
          </table:table-cell>
          <table:table-cell office:value-type="string" table:style-name="ce5">
            <text:p>TAMPA P/ DRENO FSB (PRATA) C/ KIT PARAFUSO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061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75" table:style-name="ce6">
            <text:p><text:s/>7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321</text:p>
          </table:table-cell>
          <table:table-cell office:value-type="string" table:style-name="ce3">
            <text:p>TAMPA PARA CAIXA DE PASSAGEM ABS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1068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6.42" table:style-name="ce4">
            <text:p><text:s/>26,4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320</text:p>
          </table:table-cell>
          <table:table-cell office:value-type="string" table:style-name="ce5">
            <text:p>TAMPA PARA CAIXA DE PASSAGEM INOX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1051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27.74" table:style-name="ce6">
            <text:p><text:s/>27,7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45</text:p>
          </table:table-cell>
          <table:table-cell office:value-type="string" table:style-name="ce3">
            <text:p>TAMPA POSTIGO PL AZUL P/ CASA DE MAQUINA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5.30.00</text:p>
          </table:table-cell>
          <table:table-cell office:value-type="string" table:style-name="ce3">
            <text:p>789900563056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260" table:style-name="ce4">
            <text:p><text:s/>1.2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49</text:p>
          </table:table-cell>
          <table:table-cell office:value-type="string" table:style-name="ce5">
            <text:p>TAMPA POSTIGO PL BEGE P/ CASA DE MAQUINA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5.30.00</text:p>
          </table:table-cell>
          <table:table-cell office:value-type="string" table:style-name="ce5">
            <text:p>7899005630571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260" table:style-name="ce6">
            <text:p><text:s/>1.2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47</text:p>
          </table:table-cell>
          <table:table-cell office:value-type="string" table:style-name="ce3">
            <text:p>TAMPA POSTIGO PL VERDE P/ CASA DE MAQUINAS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5.30.00</text:p>
          </table:table-cell>
          <table:table-cell office:value-type="string" table:style-name="ce3">
            <text:p>789900563058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260" table:style-name="ce4">
            <text:p><text:s/>1.2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46</text:p>
          </table:table-cell>
          <table:table-cell office:value-type="string" table:style-name="ce5">
            <text:p>TAMPA POSTIGO PLASTIC. AZUL P/ CASA DE MAQ C/ DOBRADIC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5.30.00</text:p>
          </table:table-cell>
          <table:table-cell office:value-type="string" table:style-name="ce5">
            <text:p>7899005630120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390" table:style-name="ce6">
            <text:p><text:s/>1.3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050</text:p>
          </table:table-cell>
          <table:table-cell office:value-type="string" table:style-name="ce3">
            <text:p>TAMPA POSTIGO PLASTIC. BEGE P/ CASA DE MAQ C/ DOBRADIC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5.30.00</text:p>
          </table:table-cell>
          <table:table-cell office:value-type="string" table:style-name="ce3">
            <text:p>7899005630144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390" table:style-name="ce4">
            <text:p><text:s/>1.3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048</text:p>
          </table:table-cell>
          <table:table-cell office:value-type="string" table:style-name="ce5">
            <text:p>TAMPA POSTIGO PLASTIC.VERDE P/ CASA DE MAQ C/ DOBRADIC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5.30.00</text:p>
          </table:table-cell>
          <table:table-cell office:value-type="string" table:style-name="ce5">
            <text:p>789900563013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390" table:style-name="ce6">
            <text:p><text:s/>1.3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965</text:p>
          </table:table-cell>
          <table:table-cell office:value-type="string" table:style-name="ce3">
            <text:p>TAMPA PRATA P/ <text:s/>DISP ASPIRACAO 1 1/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690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5.85" table:style-name="ce4">
            <text:p><text:s/>15,8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4223</text:p>
          </table:table-cell>
          <table:table-cell office:value-type="string" table:style-name="ce5">
            <text:p>TAMPA PROLONGADORA BL/BP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455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9.43" table:style-name="ce6">
            <text:p><text:s/>59,43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548</text:p>
          </table:table-cell>
          <table:table-cell office:value-type="string" table:style-name="ce3">
            <text:p>TAMPA PROLONGADORA SKIMMER BL PRAT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4113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82.47" table:style-name="ce4">
            <text:p><text:s/>82,4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36</text:p>
          </table:table-cell>
          <table:table-cell office:value-type="string" table:style-name="ce5">
            <text:p>TAMPA RODA CARRO ROB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94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2" table:style-name="ce6">
            <text:p><text:s/>32,00<text:s/></text:p>
          </table:table-cell>
          <table:table-cell office:value-type="float" office:value="6" table:formula="of:=IFERROR(VLOOKUP([.A:.A];['SB1'.B:.G];6;FALSE);&quot;&quot;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654</text:p>
          </table:table-cell>
          <table:table-cell office:value-type="string" table:style-name="ce3">
            <text:p>TAMPA RODA GRD. CORPO APAR. P/ FILTRAR PISCINA MOD.RB2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15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.9" table:style-name="ce4">
            <text:p><text:s/>10,90<text:s/></text:p>
          </table:table-cell>
          <table:table-cell office:value-type="float" office:value="37" table:formula="of:=IFERROR(VLOOKUP([.A:.A];['SB1'.B:.G];6;FALSE);&quot;&quot;)" table:style-name="ce1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744</text:p>
          </table:table-cell>
          <table:table-cell office:value-type="string" table:style-name="ce5">
            <text:p>TAMPA ROTOR QUADRO ELETR DISTR ROBO LIMP <text:s/>AUT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102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0" table:style-name="ce6">
            <text:p><text:s/>20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04222</text:p>
          </table:table-cell>
          <table:table-cell office:value-type="string" table:style-name="ce3">
            <text:p>TAMPA SUP PLAST. DE ACAB SKIMMER BRANCO BL/BP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0971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68.7" table:style-name="ce4">
            <text:p><text:s/>68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9539</text:p>
          </table:table-cell>
          <table:table-cell office:value-type="string" table:style-name="ce5">
            <text:p>TAMPA SUP PLAST. DE ACAB SKIMMER PRATA B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1410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62.37" table:style-name="ce6">
            <text:p><text:s/>62,3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879</text:p>
          </table:table-cell>
          <table:table-cell office:value-type="string" table:style-name="ce3">
            <text:p>TAMPA SUPERIOR GER DE CLORO GS4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7908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20" table:style-name="ce4">
            <text:p><text:s/>220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32</text:p>
          </table:table-cell>
          <table:table-cell office:value-type="string" table:style-name="ce5">
            <text:p>TAMPA TOMADA QUADRO ELET DISTR ROBO AUTOM RB2 WAVE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1993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9" table:style-name="ce6">
            <text:p><text:s/>49,00<text:s/></text:p>
          </table:table-cell>
          <table:table-cell office:value-type="float" office:value="11" table:formula="of:=IFERROR(VLOOKUP([.A:.A];['SB1'.B:.G];6;FALSE);&quot;&quot;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5032</text:p>
          </table:table-cell>
          <table:table-cell office:value-type="string" table:style-name="ce3">
            <text:p>TAMPA TRANSP. GER. CLORO BASE DE SAL MOD. SSC20 MIN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9278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88" table:style-name="ce4">
            <text:p><text:s/>88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465</text:p>
          </table:table-cell>
          <table:table-cell office:value-type="string" table:style-name="ce5">
            <text:p>TE PARA DHM SL (SAIDA LATERAL)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392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7.7" table:style-name="ce6">
            <text:p><text:s/>27,7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208</text:p>
          </table:table-cell>
          <table:table-cell office:value-type="string" table:style-name="ce3">
            <text:p>TELA DO MODULO 270 DA CERCA DE PROTECA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5903.10.00</text:p>
          </table:table-cell>
          <table:table-cell office:value-type="string" table:style-name="ce3">
            <text:p>7899005616872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418" table:style-name="ce4">
            <text:p><text:s/>4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209</text:p>
          </table:table-cell>
          <table:table-cell office:value-type="string" table:style-name="ce5">
            <text:p>TELA DO MODULO 405 DA CERCA DE PROTECA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03.10.00</text:p>
          </table:table-cell>
          <table:table-cell office:value-type="string" table:style-name="ce5">
            <text:p>7899005616889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570" table:style-name="ce6">
            <text:p><text:s/>57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206</text:p>
          </table:table-cell>
          <table:table-cell office:value-type="string" table:style-name="ce3">
            <text:p>TELA DO PORTAO DA CERC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5903.10.00</text:p>
          </table:table-cell>
          <table:table-cell office:value-type="string" table:style-name="ce3">
            <text:p>789900561685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03.07" table:style-name="ce4">
            <text:p><text:s/>103,0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27</text:p>
          </table:table-cell>
          <table:table-cell office:value-type="string" table:style-name="ce5">
            <text:p>TELA FILTRO APARELHO P/ FILTRAR PISCINA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20855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54" table:style-name="ce6">
            <text:p><text:s/>5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249</text:p>
          </table:table-cell>
          <table:table-cell office:value-type="string" table:style-name="ce3">
            <text:p>TELA INTERNA P/ FILTRO LIMPADOR AUTOMATICO RB6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9514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40" table:style-name="ce4">
            <text:p><text:s/>40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5354</text:p>
          </table:table-cell>
          <table:table-cell office:value-type="string" table:style-name="ce5">
            <text:p>TELA INTERNA P/ ROBO LIMPADOR AUT. PISCINA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976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2" table:style-name="ce6">
            <text:p><text:s/>42,00<text:s/></text:p>
          </table:table-cell>
          <table:table-cell office:value-type="float" office:value="5" table:formula="of:=IFERROR(VLOOKUP([.A:.A];['SB1'.B:.G];6;FALSE);&quot;&quot;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18138</text:p>
          </table:table-cell>
          <table:table-cell office:value-type="string" table:style-name="ce3">
            <text:p>TEMPORIZ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99.00</text:p>
          </table:table-cell>
          <table:table-cell office:value-type="string" table:style-name="ce3">
            <text:p>789900561566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90" table:style-name="ce4">
            <text:p><text:s/>1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769</text:p>
          </table:table-cell>
          <table:table-cell office:value-type="string" table:style-name="ce5">
            <text:p>TEMPORIZADOR AREIA P/SAUNA MADEIR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420.90.00</text:p>
          </table:table-cell>
          <table:table-cell office:value-type="string" table:style-name="ce5">
            <text:p>789900563317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30" table:style-name="ce6">
            <text:p><text:s/>1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447</text:p>
          </table:table-cell>
          <table:table-cell office:value-type="string" table:style-name="ce3">
            <text:p>TEMPORIZADOR DE 30 MINUTOS PARA TROCADO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36.49.00</text:p>
          </table:table-cell>
          <table:table-cell office:value-type="string" table:style-name="ce3">
            <text:p>7899005615998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86.31" table:style-name="ce4">
            <text:p><text:s/>186,31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284</text:p>
          </table:table-cell>
          <table:table-cell office:value-type="string" table:style-name="ce5">
            <text:p>TERMISTOC PTC (RP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16.80.90</text:p>
          </table:table-cell>
          <table:table-cell office:value-type="string" table:style-name="ce5">
            <text:p>7899005628486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714" table:style-name="ce6">
            <text:p><text:s/>71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430</text:p>
          </table:table-cell>
          <table:table-cell office:value-type="string" table:style-name="ce3">
            <text:p>TERMOMETRO DE MADEIRA PARA SAUN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25.11.99</text:p>
          </table:table-cell>
          <table:table-cell office:value-type="string" table:style-name="ce3">
            <text:p>7899005630052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99" table:style-name="ce4">
            <text:p><text:s/>9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306</text:p>
          </table:table-cell>
          <table:table-cell office:value-type="string" table:style-name="ce5">
            <text:p>TERMOMETRO FLUTUANTE PARA PISCINAS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25.11.99</text:p>
          </table:table-cell>
          <table:table-cell office:value-type="string" table:style-name="ce5">
            <text:p>789900560820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41" table:style-name="ce6">
            <text:p><text:s/>4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6988</text:p>
          </table:table-cell>
          <table:table-cell office:value-type="string" table:style-name="ce3">
            <text:p>TERMOMETRO PARA SAUNA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9025.11.99</text:p>
          </table:table-cell>
          <table:table-cell office:value-type="string" table:style-name="ce3">
            <text:p>7899005611990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34" table:style-name="ce4">
            <text:p><text:s/>3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00</text:p>
          </table:table-cell>
          <table:table-cell office:value-type="string" table:style-name="ce5">
            <text:p>TERMOSTATO <text:s/>MPS- 24V DIGITAL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032.10.10</text:p>
          </table:table-cell>
          <table:table-cell office:value-type="string" table:style-name="ce5">
            <text:p>7899005615202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719" table:style-name="ce6">
            <text:p><text:s/>71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20</text:p>
          </table:table-cell>
          <table:table-cell office:value-type="string" table:style-name="ce3">
            <text:p>TERMOSTATO 20 A 30-110C-CONTATOS ANALOGIC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32.10.10</text:p>
          </table:table-cell>
          <table:table-cell office:value-type="string" table:style-name="ce3">
            <text:p>789900561571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220" table:style-name="ce4">
            <text:p><text:s/>22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088</text:p>
          </table:table-cell>
          <table:table-cell office:value-type="string" table:style-name="ce5">
            <text:p>TERMOSTATO BIMETALICO ( REARME )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032.10.90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53" table:style-name="ce6">
            <text:p><text:s/>5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700</text:p>
          </table:table-cell>
          <table:table-cell office:value-type="string" table:style-name="ce3">
            <text:p>TERMOSTATO DIG C/ TEMP P/ QUADRO SAUNA/FORNO E BATERI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32.10.10</text:p>
          </table:table-cell>
          <table:table-cell office:value-type="string" table:style-name="ce3">
            <text:p>7899005617404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704" table:style-name="ce4">
            <text:p><text:s/>70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42</text:p>
          </table:table-cell>
          <table:table-cell office:value-type="string" table:style-name="ce5">
            <text:p>TERMOSTATO DIG S/ TEMP P/ QUADRO SAUNA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032.10.10</text:p>
          </table:table-cell>
          <table:table-cell office:value-type="string" table:style-name="ce5">
            <text:p>7899005615486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719" table:style-name="ce6">
            <text:p><text:s/>71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365</text:p>
          </table:table-cell>
          <table:table-cell office:value-type="string" table:style-name="ce3">
            <text:p>TERMOSTATO DIGITAL P/ PAINEL LINHA TH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32.10.10</text:p>
          </table:table-cell>
          <table:table-cell office:value-type="string" table:style-name="ce3">
            <text:p>789900562571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678.77" table:style-name="ce4">
            <text:p><text:s/>678,77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286</text:p>
          </table:table-cell>
          <table:table-cell office:value-type="string" table:style-name="ce5">
            <text:p>TERMOSTATO REGULAVEL <text:s/>ANALOGIC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032.10.10</text:p>
          </table:table-cell>
          <table:table-cell office:value-type="string" table:style-name="ce5">
            <text:p>7899005615141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332" table:style-name="ce6">
            <text:p><text:s/>33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552</text:p>
          </table:table-cell>
          <table:table-cell office:value-type="string" table:style-name="ce3">
            <text:p>TIMER ANALOGICO QUADRO GER DE CLORO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5386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727" table:style-name="ce4">
            <text:p><text:s/>72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633</text:p>
          </table:table-cell>
          <table:table-cell office:value-type="string" table:style-name="ce5">
            <text:p>TOMADA QUAD. ELET. APARELHO FILTRAR PISCINA RB2/WAVE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941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15" table:style-name="ce6">
            <text:p><text:s/>11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431</text:p>
          </table:table-cell>
          <table:table-cell office:value-type="string" table:style-name="ce3">
            <text:p>TORNEIRA DE BOIA 1/2 COM BALAO PL (RP BOIA PLASTICA)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81.80.19</text:p>
          </table:table-cell>
          <table:table-cell office:value-type="string" table:style-name="ce3">
            <text:p>789900562753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3" table:style-name="ce4">
            <text:p><text:s/>14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8249</text:p>
          </table:table-cell>
          <table:table-cell office:value-type="string" table:style-name="ce5">
            <text:p>TORRE EM ACO INOX COM BOTAO DE EMERGENCIA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13277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1650" table:style-name="ce6">
            <text:p><text:s/>1.6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95</text:p>
          </table:table-cell>
          <table:table-cell office:value-type="string" table:style-name="ce3">
            <text:p>TRANSFORMADOR <text:s/>PARA REFLETOR TR1-60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31.19</text:p>
          </table:table-cell>
          <table:table-cell office:value-type="string" table:style-name="ce3">
            <text:p>7899005601656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76" table:style-name="ce4">
            <text:p><text:s/>27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96</text:p>
          </table:table-cell>
          <table:table-cell office:value-type="string" table:style-name="ce5">
            <text:p>TRANSFORMADOR <text:s/>PARA REFLETOR TR2-120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4.31.19</text:p>
          </table:table-cell>
          <table:table-cell office:value-type="string" table:style-name="ce5">
            <text:p>7899005601663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390" table:style-name="ce6">
            <text:p><text:s/>3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97</text:p>
          </table:table-cell>
          <table:table-cell office:value-type="string" table:style-name="ce3">
            <text:p>TRANSFORMADOR <text:s/>PARA REFLETOR TR3-180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31.19</text:p>
          </table:table-cell>
          <table:table-cell office:value-type="string" table:style-name="ce3">
            <text:p>7899005601670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483" table:style-name="ce4">
            <text:p><text:s/>48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98</text:p>
          </table:table-cell>
          <table:table-cell office:value-type="string" table:style-name="ce5">
            <text:p>TRANSFORMADOR <text:s/>PARA REFLETOR TR4-240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04.31.19</text:p>
          </table:table-cell>
          <table:table-cell office:value-type="string" table:style-name="ce5">
            <text:p>7899005601687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565" table:style-name="ce6">
            <text:p><text:s/>56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0599</text:p>
          </table:table-cell>
          <table:table-cell office:value-type="string" table:style-name="ce3">
            <text:p>TRANSFORMADOR <text:s/>PARA REFLETOR TR5-300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31.19</text:p>
          </table:table-cell>
          <table:table-cell office:value-type="string" table:style-name="ce3">
            <text:p>7899005601694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680" table:style-name="ce4">
            <text:p><text:s/>6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876</text:p>
          </table:table-cell>
          <table:table-cell office:value-type="string" table:style-name="ce5">
            <text:p>TRANSFORMADOR GER DE CLORO GS4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7892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1750" table:style-name="ce6">
            <text:p><text:s/>1.750,00<text:s/></text:p>
          </table:table-cell>
          <table:table-cell office:value-type="float" office:value="11" table:formula="of:=IFERROR(VLOOKUP([.A:.A];['SB1'.B:.G];6;FALSE);&quot;&quot;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5030</text:p>
          </table:table-cell>
          <table:table-cell office:value-type="string" table:style-name="ce3">
            <text:p>TRANSFORMADOR GER. CLORO BASE DE SAL MOD. SSC25 MINI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90.90</text:p>
          </table:table-cell>
          <table:table-cell office:value-type="string" table:style-name="ce3">
            <text:p>7899005629322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1694" table:style-name="ce4">
            <text:p><text:s/>1.694,00<text:s/></text:p>
          </table:table-cell>
          <table:table-cell office:value-type="float" office:value="3" table:formula="of:=IFERROR(VLOOKUP([.A:.A];['SB1'.B:.G];6;FALSE);&quot;&quot;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4925</text:p>
          </table:table-cell>
          <table:table-cell office:value-type="string" table:style-name="ce5">
            <text:p>TRANSFORMADOR P/ PLACA ELETRONICA TOUCH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032.90.99</text:p>
          </table:table-cell>
          <table:table-cell table:style-name="ce5"/>
          <table:table-cell office:value-type="float" office:value="9.75" table:style-name="ce6">
            <text:p><text:s/>9,75<text:s/></text:p>
          </table:table-cell>
          <table:table-cell office:value-type="float" office:value="98" table:style-name="ce6">
            <text:p><text:s/>9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463</text:p>
          </table:table-cell>
          <table:table-cell office:value-type="string" table:style-name="ce3">
            <text:p>TRANSFORMADOR P/TROCADOR 230V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504.31.19</text:p>
          </table:table-cell>
          <table:table-cell office:value-type="string" table:style-name="ce3">
            <text:p>7899005616018</text:p>
          </table:table-cell>
          <table:table-cell office:value-type="float" office:value="6.5" table:style-name="ce4">
            <text:p><text:s/>6,50<text:s/></text:p>
          </table:table-cell>
          <table:table-cell office:value-type="float" office:value="282" table:style-name="ce4">
            <text:p><text:s/>28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720</text:p>
          </table:table-cell>
          <table:table-cell office:value-type="string" table:style-name="ce5">
            <text:p>TRAVA CESTO FILTRO ROBO LIMPADOR AUTOMATICO WAVE 10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2078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" table:style-name="ce6">
            <text:p><text:s/>4,00<text:s/></text:p>
          </table:table-cell>
          <table:table-cell office:value-type="float" office:value="10" table:formula="of:=IFERROR(VLOOKUP([.A:.A];['SB1'.B:.G];6;FALSE);&quot;&quot;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15823</text:p>
          </table:table-cell>
          <table:table-cell office:value-type="string" table:style-name="ce3">
            <text:p>TRAVA DE SEGURANCA PARA PORTA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7308.90.90</text:p>
          </table:table-cell>
          <table:table-cell office:value-type="string" table:style-name="ce3">
            <text:p>7899005615585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360" table:style-name="ce4">
            <text:p><text:s/>2.3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245</text:p>
          </table:table-cell>
          <table:table-cell office:value-type="string" table:style-name="ce5">
            <text:p>TRAVA DO CESTO BAG PARA FILTRO LIMPADOR AUTOMATICO RB6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9477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16" table:style-name="ce6">
            <text:p><text:s/>16,00<text:s/></text:p>
          </table:table-cell>
          <table:table-cell office:value-type="float" office:value="13" table:formula="of:=IFERROR(VLOOKUP([.A:.A];['SB1'.B:.G];6;FALSE);&quot;&quot;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2702</text:p>
          </table:table-cell>
          <table:table-cell office:value-type="string" table:style-name="ce3">
            <text:p>TRAVA MANIPULO APARELHO P/ FILTRAR PISCINA WAVE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20602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28" table:style-name="ce4">
            <text:p><text:s/>28,00<text:s/></text:p>
          </table:table-cell>
          <table:table-cell office:value-type="float" office:value="7" table:formula="of:=IFERROR(VLOOKUP([.A:.A];['SB1'.B:.G];6;FALSE);&quot;&quot;)" table:style-name="ce1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01499</text:p>
          </table:table-cell>
          <table:table-cell office:value-type="string" table:style-name="ce5">
            <text:p>TRAVA RAPIDA 1 1/4 P/ CABO 6 MT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26.90.90</text:p>
          </table:table-cell>
          <table:table-cell office:value-type="string" table:style-name="ce5">
            <text:p>7899005605234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25.1" table:style-name="ce6">
            <text:p><text:s/>25,1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30</text:p>
          </table:table-cell>
          <table:table-cell office:value-type="string" table:style-name="ce3">
            <text:p>TRAVA SUPORTE ALAV. CARRO ROBO LIMP. AUTOMAT.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79.90.90</text:p>
          </table:table-cell>
          <table:table-cell office:value-type="string" table:style-name="ce3">
            <text:p>789900562088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" table:style-name="ce4">
            <text:p><text:s/>20,00<text:s/></text:p>
          </table:table-cell>
          <table:table-cell office:value-type="float" office:value="2" table:formula="of:=IFERROR(VLOOKUP([.A:.A];['SB1'.B:.G];6;FALSE);&quot;&quot;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2636</text:p>
          </table:table-cell>
          <table:table-cell office:value-type="string" table:style-name="ce5">
            <text:p>TRAVA TAMPA FILTRO LIMPADOR AUTOMATICO RB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79.90.90</text:p>
          </table:table-cell>
          <table:table-cell office:value-type="string" table:style-name="ce5">
            <text:p>789900561997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2" table:style-name="ce6">
            <text:p><text:s/>42,00<text:s/></text:p>
          </table:table-cell>
          <table:table-cell office:value-type="float" office:value="4" table:formula="of:=IFERROR(VLOOKUP([.A:.A];['SB1'.B:.G];6;FALSE);&quot;&quot;)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19824</text:p>
          </table:table-cell>
          <table:table-cell office:value-type="string" table:style-name="ce3">
            <text:p>TROCADOR CALOR SD-25 (DEGELO)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1710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35" table:style-name="ce4">
            <text:p><text:s/>15.4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69</text:p>
          </table:table-cell>
          <table:table-cell office:value-type="string" table:style-name="ce5">
            <text:p>TROCADOR CALOR TH 10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474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1500" table:style-name="ce6">
            <text:p><text:s/>11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0100</text:p>
          </table:table-cell>
          <table:table-cell office:value-type="string" table:style-name="ce3">
            <text:p>TROCADOR CALOR TH 25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1802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00" table:style-name="ce4">
            <text:p><text:s/>14.7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0101</text:p>
          </table:table-cell>
          <table:table-cell office:value-type="string" table:style-name="ce5">
            <text:p>TROCADOR CALOR TH 40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1810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6990" table:style-name="ce6">
            <text:p><text:s/>16.99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122</text:p>
          </table:table-cell>
          <table:table-cell office:value-type="string" table:style-name="ce3">
            <text:p>TROCADOR CALOR TH 60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433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800" table:style-name="ce4">
            <text:p><text:s/>21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123</text:p>
          </table:table-cell>
          <table:table-cell office:value-type="string" table:style-name="ce5">
            <text:p>TROCADOR CALOR TH 60 22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450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1800" table:style-name="ce6">
            <text:p><text:s/>21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124</text:p>
          </table:table-cell>
          <table:table-cell office:value-type="string" table:style-name="ce3">
            <text:p>TROCADOR CALOR TH 60 38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451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800" table:style-name="ce4">
            <text:p><text:s/>21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2990</text:p>
          </table:table-cell>
          <table:table-cell office:value-type="string" table:style-name="ce5">
            <text:p>TROCADOR CALOR TH 80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166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2400" table:style-name="ce6">
            <text:p><text:s/>22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3125</text:p>
          </table:table-cell>
          <table:table-cell office:value-type="string" table:style-name="ce3">
            <text:p>TROCADOR CALOR TH 80 22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452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00" table:style-name="ce4">
            <text:p><text:s/>22.4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037</text:p>
          </table:table-cell>
          <table:table-cell office:value-type="string" table:style-name="ce5">
            <text:p>TROCADOR DE CALOR BANHO TB 130 220V MON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416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0610" table:style-name="ce6">
            <text:p><text:s/>40.6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038</text:p>
          </table:table-cell>
          <table:table-cell office:value-type="string" table:style-name="ce3">
            <text:p>TROCADOR DE CALOR BANHO TB 130 220V TR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417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610" table:style-name="ce4">
            <text:p><text:s/>40.6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039</text:p>
          </table:table-cell>
          <table:table-cell office:value-type="string" table:style-name="ce5">
            <text:p>TROCADOR DE CALOR BANHO TB 130 380V TR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418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0610" table:style-name="ce6">
            <text:p><text:s/>40.6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662</text:p>
          </table:table-cell>
          <table:table-cell office:value-type="string" table:style-name="ce3">
            <text:p>TROCADOR DE CALOR NEW SD105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531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00" table:style-name="ce4">
            <text:p><text:s/>32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664</text:p>
          </table:table-cell>
          <table:table-cell office:value-type="string" table:style-name="ce5">
            <text:p>TROCADOR DE CALOR NEW SD105 22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533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2500" table:style-name="ce6">
            <text:p><text:s/>32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668</text:p>
          </table:table-cell>
          <table:table-cell office:value-type="string" table:style-name="ce3">
            <text:p>TROCADOR DE CALOR NEW SD105 38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537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00" table:style-name="ce4">
            <text:p><text:s/>32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663</text:p>
          </table:table-cell>
          <table:table-cell office:value-type="string" table:style-name="ce5">
            <text:p>TROCADOR DE CALOR NEW SD130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532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7000" table:style-name="ce6">
            <text:p><text:s/>37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665</text:p>
          </table:table-cell>
          <table:table-cell office:value-type="string" table:style-name="ce3">
            <text:p>TROCADOR DE CALOR NEW SD130 22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534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00" table:style-name="ce4">
            <text:p><text:s/>33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669</text:p>
          </table:table-cell>
          <table:table-cell office:value-type="string" table:style-name="ce5">
            <text:p>TROCADOR DE CALOR NEW SD130 38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536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3500" table:style-name="ce6">
            <text:p><text:s/>33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666</text:p>
          </table:table-cell>
          <table:table-cell office:value-type="string" table:style-name="ce3">
            <text:p>TROCADOR DE CALOR NEW SD160 22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535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000" table:style-name="ce4">
            <text:p><text:s/>43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670</text:p>
          </table:table-cell>
          <table:table-cell office:value-type="string" table:style-name="ce5">
            <text:p>TROCADOR DE CALOR NEW SD160 38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539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3000" table:style-name="ce6">
            <text:p><text:s/>43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7667</text:p>
          </table:table-cell>
          <table:table-cell office:value-type="string" table:style-name="ce3">
            <text:p>TROCADOR DE CALOR NEW SD180 22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538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500" table:style-name="ce4">
            <text:p><text:s/>44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671</text:p>
          </table:table-cell>
          <table:table-cell office:value-type="string" table:style-name="ce5">
            <text:p>TROCADOR DE CALOR NEW SD180 38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540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4500" table:style-name="ce6">
            <text:p><text:s/>44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38</text:p>
          </table:table-cell>
          <table:table-cell office:value-type="string" table:style-name="ce3">
            <text:p>TROCADOR DE CALOR NEW SD25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234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900" table:style-name="ce4">
            <text:p><text:s/>14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431</text:p>
          </table:table-cell>
          <table:table-cell office:value-type="string" table:style-name="ce5">
            <text:p>TROCADOR DE CALOR NEW SD40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227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6480" table:style-name="ce6">
            <text:p><text:s/>16.4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32</text:p>
          </table:table-cell>
          <table:table-cell office:value-type="string" table:style-name="ce3">
            <text:p>TROCADOR DE CALOR NEW SD60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228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00" table:style-name="ce4">
            <text:p><text:s/>21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433</text:p>
          </table:table-cell>
          <table:table-cell office:value-type="string" table:style-name="ce5">
            <text:p>TROCADOR DE CALOR NEW SD60 22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229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1900" table:style-name="ce6">
            <text:p><text:s/>21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34</text:p>
          </table:table-cell>
          <table:table-cell office:value-type="string" table:style-name="ce3">
            <text:p>TROCADOR DE CALOR NEW SD60 38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230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00" table:style-name="ce4">
            <text:p><text:s/>21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435</text:p>
          </table:table-cell>
          <table:table-cell office:value-type="string" table:style-name="ce5">
            <text:p>TROCADOR DE CALOR NEW SD80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231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2600" table:style-name="ce6">
            <text:p><text:s/>22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436</text:p>
          </table:table-cell>
          <table:table-cell office:value-type="string" table:style-name="ce3">
            <text:p>TROCADOR DE CALOR NEW SD80 22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232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600" table:style-name="ce4">
            <text:p><text:s/>22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437</text:p>
          </table:table-cell>
          <table:table-cell office:value-type="string" table:style-name="ce5">
            <text:p>TROCADOR DE CALOR NEW SD80 38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233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2600" table:style-name="ce6">
            <text:p><text:s/>22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6080</text:p>
          </table:table-cell>
          <table:table-cell office:value-type="string" table:style-name="ce3">
            <text:p>TROCADOR DE CALOR SD-105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0758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500" table:style-name="ce4">
            <text:p><text:s/>34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6082</text:p>
          </table:table-cell>
          <table:table-cell office:value-type="string" table:style-name="ce5">
            <text:p>TROCADOR DE CALOR SD-105 380V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0760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4500" table:style-name="ce6">
            <text:p><text:s/>34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6083</text:p>
          </table:table-cell>
          <table:table-cell office:value-type="string" table:style-name="ce3">
            <text:p>TROCADOR DE CALOR SD-130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0761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7500" table:style-name="ce4">
            <text:p><text:s/>37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6085</text:p>
          </table:table-cell>
          <table:table-cell office:value-type="string" table:style-name="ce5">
            <text:p>TROCADOR DE CALOR SD-130 380V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0763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7500" table:style-name="ce6">
            <text:p><text:s/>37.5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6086</text:p>
          </table:table-cell>
          <table:table-cell office:value-type="string" table:style-name="ce3">
            <text:p>TROCADOR DE CALOR SD-160 220V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0764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000" table:style-name="ce4">
            <text:p><text:s/>47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6087</text:p>
          </table:table-cell>
          <table:table-cell office:value-type="string" table:style-name="ce5">
            <text:p>TROCADOR DE CALOR SD-160 380V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0765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7000" table:style-name="ce6">
            <text:p><text:s/>47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076</text:p>
          </table:table-cell>
          <table:table-cell office:value-type="string" table:style-name="ce3">
            <text:p>TROCADOR DE CALOR SD-180 380V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1913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000" table:style-name="ce4">
            <text:p><text:s/>49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6074</text:p>
          </table:table-cell>
          <table:table-cell office:value-type="string" table:style-name="ce5">
            <text:p>TROCADOR DE CALOR SD-60 220V BIF 60 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0752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1800" table:style-name="ce6">
            <text:p><text:s/>21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6077</text:p>
          </table:table-cell>
          <table:table-cell office:value-type="string" table:style-name="ce3">
            <text:p>TROCADOR DE CALOR SD-80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0755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000" table:style-name="ce4">
            <text:p><text:s/>80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28</text:p>
          </table:table-cell>
          <table:table-cell office:value-type="string" table:style-name="ce5">
            <text:p>TROCADOR DE CALOR SD105 SILENCE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894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3800" table:style-name="ce6">
            <text:p><text:s/>33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29</text:p>
          </table:table-cell>
          <table:table-cell office:value-type="string" table:style-name="ce3">
            <text:p>TROCADOR DE CALOR SD105 SILENCE 22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895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800" table:style-name="ce4">
            <text:p><text:s/>33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30</text:p>
          </table:table-cell>
          <table:table-cell office:value-type="string" table:style-name="ce5">
            <text:p>TROCADOR DE CALOR SD105 SILENCE 38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896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3800" table:style-name="ce6">
            <text:p><text:s/>33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31</text:p>
          </table:table-cell>
          <table:table-cell office:value-type="string" table:style-name="ce3">
            <text:p>TROCADOR DE CALOR SD130 SILENCE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897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8535" table:style-name="ce4">
            <text:p><text:s/>38.5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32</text:p>
          </table:table-cell>
          <table:table-cell office:value-type="string" table:style-name="ce5">
            <text:p>TROCADOR DE CALOR SD130 SILENCE 22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898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8535" table:style-name="ce6">
            <text:p><text:s/>38.5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33</text:p>
          </table:table-cell>
          <table:table-cell office:value-type="string" table:style-name="ce3">
            <text:p>TROCADOR DE CALOR SD130 SILENCE 38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899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8535" table:style-name="ce4">
            <text:p><text:s/>38.5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34</text:p>
          </table:table-cell>
          <table:table-cell office:value-type="string" table:style-name="ce5">
            <text:p>TROCADOR DE CALOR SD160 SILENCE 22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9001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2200" table:style-name="ce6">
            <text:p><text:s/>42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35</text:p>
          </table:table-cell>
          <table:table-cell office:value-type="string" table:style-name="ce3">
            <text:p>TROCADOR DE CALOR SD160 SILENCE 38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901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200" table:style-name="ce4">
            <text:p><text:s/>42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36</text:p>
          </table:table-cell>
          <table:table-cell office:value-type="string" table:style-name="ce5">
            <text:p>TROCADOR DE CALOR SD180 SILENCE 22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902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9035" table:style-name="ce6">
            <text:p><text:s/>49.0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37</text:p>
          </table:table-cell>
          <table:table-cell office:value-type="string" table:style-name="ce3">
            <text:p>TROCADOR DE CALOR SD180 SILENCE 38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903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035" table:style-name="ce4">
            <text:p><text:s/>49.0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20</text:p>
          </table:table-cell>
          <table:table-cell office:value-type="string" table:style-name="ce5">
            <text:p>TROCADOR DE CALOR SD25 SILENCE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886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5435" table:style-name="ce6">
            <text:p><text:s/>15.4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21</text:p>
          </table:table-cell>
          <table:table-cell office:value-type="string" table:style-name="ce3">
            <text:p>TROCADOR DE CALOR SD40 SILENCE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8875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800" table:style-name="ce4">
            <text:p><text:s/>19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22</text:p>
          </table:table-cell>
          <table:table-cell office:value-type="string" table:style-name="ce5">
            <text:p>TROCADOR DE CALOR SD60 SILENCE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8882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3100" table:style-name="ce6">
            <text:p><text:s/>23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23</text:p>
          </table:table-cell>
          <table:table-cell office:value-type="string" table:style-name="ce3">
            <text:p>TROCADOR DE CALOR SD60 SILENCE 22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889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00" table:style-name="ce4">
            <text:p><text:s/>23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24</text:p>
          </table:table-cell>
          <table:table-cell office:value-type="string" table:style-name="ce5">
            <text:p>TROCADOR DE CALOR SD60 SILENCE 38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890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3100" table:style-name="ce6">
            <text:p><text:s/>23.1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25</text:p>
          </table:table-cell>
          <table:table-cell office:value-type="string" table:style-name="ce3">
            <text:p>TROCADOR DE CALOR SD80 SILENCE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891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935" table:style-name="ce4">
            <text:p><text:s/>25.9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26</text:p>
          </table:table-cell>
          <table:table-cell office:value-type="string" table:style-name="ce5">
            <text:p>TROCADOR DE CALOR SD80 SILENCE 22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8929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5935" table:style-name="ce6">
            <text:p><text:s/>25.9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27</text:p>
          </table:table-cell>
          <table:table-cell office:value-type="string" table:style-name="ce3">
            <text:p>TROCADOR DE CALOR SD80 SILENCE 38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893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935" table:style-name="ce4">
            <text:p><text:s/>25.93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638</text:p>
          </table:table-cell>
          <table:table-cell office:value-type="string" table:style-name="ce5">
            <text:p>TROCADOR DE CALOR TH TIV15 220V B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260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1600" table:style-name="ce6">
            <text:p><text:s/>11.6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698</text:p>
          </table:table-cell>
          <table:table-cell office:value-type="string" table:style-name="ce3">
            <text:p>TROCADOR DE CALOR TH TIV25 220V B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1561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000" table:style-name="ce4">
            <text:p><text:s/>17.0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702</text:p>
          </table:table-cell>
          <table:table-cell office:value-type="string" table:style-name="ce5">
            <text:p>TROCADOR DE CALOR TH TIV45 220V B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158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0300" table:style-name="ce6">
            <text:p><text:s/>20.3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704</text:p>
          </table:table-cell>
          <table:table-cell office:value-type="string" table:style-name="ce3">
            <text:p>TROCADOR DE CALOR TH TIV65 220V BIF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1592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900" table:style-name="ce4">
            <text:p><text:s/>22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706</text:p>
          </table:table-cell>
          <table:table-cell office:value-type="string" table:style-name="ce5">
            <text:p>TROCADOR DE CALOR TH TIV75 220V BIF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160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3700" table:style-name="ce6">
            <text:p><text:s/>23.7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38</text:p>
          </table:table-cell>
          <table:table-cell office:value-type="string" table:style-name="ce3">
            <text:p>TROCADOR DE CALOR TH25 SILENCE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9049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200" table:style-name="ce4">
            <text:p><text:s/>16.2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39</text:p>
          </table:table-cell>
          <table:table-cell office:value-type="string" table:style-name="ce5">
            <text:p>TROCADOR DE CALOR TH40 SILENCE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905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0780" table:style-name="ce6">
            <text:p><text:s/>20.7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40</text:p>
          </table:table-cell>
          <table:table-cell office:value-type="string" table:style-name="ce3">
            <text:p>TROCADOR DE CALOR TH60 SILENCE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906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50" table:style-name="ce4">
            <text:p><text:s/>24.2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41</text:p>
          </table:table-cell>
          <table:table-cell office:value-type="string" table:style-name="ce5">
            <text:p>TROCADOR DE CALOR TH60 SILENCE 22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907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4250" table:style-name="ce6">
            <text:p><text:s/>24.2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42</text:p>
          </table:table-cell>
          <table:table-cell office:value-type="string" table:style-name="ce3">
            <text:p>TROCADOR DE CALOR TH60 SILENCE 38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9087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50" table:style-name="ce4">
            <text:p><text:s/>24.25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43</text:p>
          </table:table-cell>
          <table:table-cell office:value-type="string" table:style-name="ce5">
            <text:p>TROCADOR DE CALOR TH80 SILENCE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9094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7230" table:style-name="ce6">
            <text:p><text:s/>27.2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4544</text:p>
          </table:table-cell>
          <table:table-cell office:value-type="string" table:style-name="ce3">
            <text:p>TROCADOR DE CALOR TH80 SILENCE 220V TR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2910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230" table:style-name="ce4">
            <text:p><text:s/>27.2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4545</text:p>
          </table:table-cell>
          <table:table-cell office:value-type="string" table:style-name="ce5">
            <text:p>TROCADOR DE CALOR TH80 SILENCE 380V TR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2911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7230" table:style-name="ce6">
            <text:p><text:s/>27.2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986</text:p>
          </table:table-cell>
          <table:table-cell office:value-type="string" table:style-name="ce3">
            <text:p>TROCADOR INVERTER THI 25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207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00" table:style-name="ce4">
            <text:p><text:s/>16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5987</text:p>
          </table:table-cell>
          <table:table-cell office:value-type="string" table:style-name="ce5">
            <text:p>TROCADOR INVERTER THI 40 220V BIF 60HZ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18.61.00</text:p>
          </table:table-cell>
          <table:table-cell office:value-type="string" table:style-name="ce5">
            <text:p>7899005632087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9900" table:style-name="ce6">
            <text:p><text:s/>19.9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5988</text:p>
          </table:table-cell>
          <table:table-cell office:value-type="string" table:style-name="ce3">
            <text:p>TROCADOR INVERTER THI 60 220V BIF 60HZ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8.61.00</text:p>
          </table:table-cell>
          <table:table-cell office:value-type="string" table:style-name="ce3">
            <text:p>7899005632094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800" table:style-name="ce4">
            <text:p><text:s/>23.8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463</text:p>
          </table:table-cell>
          <table:table-cell office:value-type="string" table:style-name="ce5">
            <text:p>TUBO ALUM (03 TUBOS 3,2MT ) ENROLADOR CAP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608.20.90</text:p>
          </table:table-cell>
          <table:table-cell office:value-type="string" table:style-name="ce5">
            <text:p>7899005632728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700" table:style-name="ce6">
            <text:p><text:s/>3.70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5479</text:p>
          </table:table-cell>
          <table:table-cell office:value-type="string" table:style-name="ce3">
            <text:p>TUBO ALUMINIO (03 TUBOS 1,75MT) P/ ENROLADOR INOX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08.20.90</text:p>
          </table:table-cell>
          <table:table-cell office:value-type="string" table:style-name="ce3">
            <text:p>7899005613628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60" table:style-name="ce4">
            <text:p><text:s/>96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5480</text:p>
          </table:table-cell>
          <table:table-cell office:value-type="string" table:style-name="ce5">
            <text:p>TUBO ALUMINIO (03 TUBOS 2,70MT) P/ ENROLADOR INOX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08.20.90</text:p>
          </table:table-cell>
          <table:table-cell office:value-type="string" table:style-name="ce5">
            <text:p>7899005613635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462" table:style-name="ce6">
            <text:p><text:s/>1.462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9344</text:p>
          </table:table-cell>
          <table:table-cell office:value-type="string" table:style-name="ce3">
            <text:p>TUBO ALUMINIO(03 TUBOS 1,75MT) P/ ENROLADOR PLASTIC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608.20.90</text:p>
          </table:table-cell>
          <table:table-cell office:value-type="string" table:style-name="ce3">
            <text:p>789900561412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0" table:style-name="ce4">
            <text:p><text:s/>9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9993</text:p>
          </table:table-cell>
          <table:table-cell office:value-type="string" table:style-name="ce5">
            <text:p>TUBO DE QUARTZO PARA SUV 17 M3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99.99</text:p>
          </table:table-cell>
          <table:table-cell office:value-type="string" table:style-name="ce5">
            <text:p>7899005616605</text:p>
          </table:table-cell>
          <table:table-cell office:value-type="float" office:value="5.2" table:style-name="ce6">
            <text:p><text:s/>5,20<text:s/></text:p>
          </table:table-cell>
          <table:table-cell office:value-type="float" office:value="734.65" table:style-name="ce6">
            <text:p><text:s/>734,65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9992</text:p>
          </table:table-cell>
          <table:table-cell office:value-type="string" table:style-name="ce3">
            <text:p>TUBO DE QUARTZO PARA SUV 7M3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17886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498.12" table:style-name="ce4">
            <text:p><text:s/>498,12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971</text:p>
          </table:table-cell>
          <table:table-cell office:value-type="string" table:style-name="ce5">
            <text:p>TUBO ENCAIXE LADO FIXO ENROLADOR CAPA INOX MOD 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5653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287" table:style-name="ce6">
            <text:p><text:s/>28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969</text:p>
          </table:table-cell>
          <table:table-cell office:value-type="string" table:style-name="ce3">
            <text:p>TUBO ENCAIXE LADO MOVEL ENROLADOR CAPA INOX MOD 1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563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223.1" table:style-name="ce4">
            <text:p><text:s/>223,1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1063</text:p>
          </table:table-cell>
          <table:table-cell office:value-type="string" table:style-name="ce5">
            <text:p>TUBO ESTICADOR CERCA DE PROTECA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616.99.00</text:p>
          </table:table-cell>
          <table:table-cell office:value-type="string" table:style-name="ce5">
            <text:p>7899005616735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63" table:style-name="ce6">
            <text:p><text:s/>6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2712</text:p>
          </table:table-cell>
          <table:table-cell office:value-type="string" table:style-name="ce3">
            <text:p>TUBO PVC RODA ROBO LIMPADOR AUTOMATICO WAVE 10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21.99.99</text:p>
          </table:table-cell>
          <table:table-cell office:value-type="string" table:style-name="ce3">
            <text:p>7899005620701</text:p>
          </table:table-cell>
          <table:table-cell office:value-type="float" office:value="5.2" table:style-name="ce4">
            <text:p><text:s/>5,20<text:s/></text:p>
          </table:table-cell>
          <table:table-cell office:value-type="float" office:value="26" table:style-name="ce4">
            <text:p><text:s/>26,00<text:s/></text:p>
          </table:table-cell>
          <table:table-cell office:value-type="float" office:value="15" table:formula="of:=IFERROR(VLOOKUP([.A:.A];['SB1'.B:.G];6;FALSE);&quot;&quot;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27152</text:p>
          </table:table-cell>
          <table:table-cell office:value-type="string" table:style-name="ce5">
            <text:p>TUBO UNIAO GERADOR CLORO GS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33404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36" table:style-name="ce6">
            <text:p><text:s/>36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889</text:p>
          </table:table-cell>
          <table:table-cell office:value-type="string" table:style-name="ce3">
            <text:p>ULTRA VIOLETA - EQUIP DESINF AGUA ( 5,5 M³/H)-LAMP 35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21.00</text:p>
          </table:table-cell>
          <table:table-cell office:value-type="string" table:style-name="ce3">
            <text:p>7899005612690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80" table:style-name="ce4">
            <text:p><text:s/>1.38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17890</text:p>
          </table:table-cell>
          <table:table-cell office:value-type="string" table:style-name="ce5">
            <text:p>ULTRA VIOLETA - EQUIP DESINF AGUA( 10,0 M³/H)-LAMP 55W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421.21.00</text:p>
          </table:table-cell>
          <table:table-cell office:value-type="string" table:style-name="ce5">
            <text:p>7899005612706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610" table:style-name="ce6">
            <text:p><text:s/>1.61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7891</text:p>
          </table:table-cell>
          <table:table-cell office:value-type="string" table:style-name="ce3">
            <text:p>ULTRA VIOLETA - EQUIP DESINF AGUA( 18,0 M³/H)-LAMP 95W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21.21.00</text:p>
          </table:table-cell>
          <table:table-cell office:value-type="string" table:style-name="ce3">
            <text:p>7899005612713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30" table:style-name="ce4">
            <text:p><text:s/>1.730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557</text:p>
          </table:table-cell>
          <table:table-cell office:value-type="string" table:style-name="ce5">
            <text:p>UNIAO 1.1/2 POL CELULA GER DE CLORO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90.90</text:p>
          </table:table-cell>
          <table:table-cell office:value-type="string" table:style-name="ce5">
            <text:p>7899005625430</text:p>
          </table:table-cell>
          <table:table-cell office:value-type="float" office:value="6.5" table:style-name="ce6">
            <text:p><text:s/>6,50<text:s/></text:p>
          </table:table-cell>
          <table:table-cell office:value-type="float" office:value="26" table:style-name="ce6">
            <text:p><text:s/>26,00<text:s/></text:p>
          </table:table-cell>
          <table:table-cell office:value-type="float" office:value="13" table:formula="of:=IFERROR(VLOOKUP([.A:.A];['SB1'.B:.G];6;FALSE);&quot;&quot;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3874</text:p>
          </table:table-cell>
          <table:table-cell office:value-type="string" table:style-name="ce3">
            <text:p>UNIAO 1.5 CELULA GER DE CLORO SSC25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543.30.90</text:p>
          </table:table-cell>
          <table:table-cell office:value-type="string" table:style-name="ce3">
            <text:p>7899005628776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" table:style-name="ce4">
            <text:p><text:s/>31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3893</text:p>
          </table:table-cell>
          <table:table-cell office:value-type="string" table:style-name="ce5">
            <text:p>UNIAO 2 CELULA GER DE CLORO SSC25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543.30.90</text:p>
          </table:table-cell>
          <table:table-cell office:value-type="string" table:style-name="ce5">
            <text:p>7899005628813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2" table:style-name="ce6">
            <text:p><text:s/>52,00<text:s/></text:p>
          </table:table-cell>
          <table:table-cell office:value-type="float" office:value="20" table:formula="of:=IFERROR(VLOOKUP([.A:.A];['SB1'.B:.G];6;FALSE);&quot;&quot;)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25909</text:p>
          </table:table-cell>
          <table:table-cell office:value-type="string" table:style-name="ce3">
            <text:p>VALVULA 3 VIAS 1/2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1</text:p>
          </table:table-cell>
          <table:table-cell office:value-type="string" table:style-name="ce3">
            <text:p>8481.80.19</text:p>
          </table:table-cell>
          <table:table-cell table:style-name="ce3"/>
          <table:table-cell office:value-type="float" office:value="0" table:style-name="ce4">
            <text:p><text:s/>-<text:s/></text:p>
          </table:table-cell>
          <table:table-cell office:value-type="float" office:value="413" table:style-name="ce4">
            <text:p><text:s/>41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6777</text:p>
          </table:table-cell>
          <table:table-cell office:value-type="string" table:style-name="ce5">
            <text:p>VALVULA DE AR INOX P/DHM PRATIC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33138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93" table:style-name="ce6">
            <text:p><text:s/>93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3827</text:p>
          </table:table-cell>
          <table:table-cell office:value-type="string" table:style-name="ce3">
            <text:p>VALVULA DE AR PARA DHM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10733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12.54" table:style-name="ce4">
            <text:p><text:s/>12,54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27366</text:p>
          </table:table-cell>
          <table:table-cell office:value-type="string" table:style-name="ce5">
            <text:p>VALVULA DE RETENCAO</text:p>
          </table:table-cell>
          <table:table-cell office:value-type="string" table:style-name="ce5">
            <text:p>P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481.30.00</text:p>
          </table:table-cell>
          <table:table-cell office:value-type="string" table:style-name="ce5">
            <text:p>7899005635040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59" table:style-name="ce6">
            <text:p><text:s/>259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315</text:p>
          </table:table-cell>
          <table:table-cell office:value-type="string" table:style-name="ce3">
            <text:p>VALVULA EXPANSAO PARA SD/TH 60-80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917.39.00</text:p>
          </table:table-cell>
          <table:table-cell office:value-type="string" table:style-name="ce3">
            <text:p>7899005615479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204" table:style-name="ce4">
            <text:p><text:s/>1.20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8316</text:p>
          </table:table-cell>
          <table:table-cell office:value-type="string" table:style-name="ce5">
            <text:p>VALVULA EXPANSAO PARA SD105-180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917.39.00</text:p>
          </table:table-cell>
          <table:table-cell office:value-type="string" table:style-name="ce5">
            <text:p>7899005615707</text:p>
          </table:table-cell>
          <table:table-cell office:value-type="float" office:value="3.25" table:style-name="ce6">
            <text:p><text:s/>3,25<text:s/></text:p>
          </table:table-cell>
          <table:table-cell office:value-type="float" office:value="1204" table:style-name="ce6">
            <text:p><text:s/>1.204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08923</text:p>
          </table:table-cell>
          <table:table-cell office:value-type="string" table:style-name="ce3">
            <text:p>VALVULA VENTOSA DE 3/4 PARA COLETOR SOLAR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8419.90.90</text:p>
          </table:table-cell>
          <table:table-cell office:value-type="string" table:style-name="ce3">
            <text:p>7899005613321</text:p>
          </table:table-cell>
          <table:table-cell office:value-type="float" office:value="3.25" table:style-name="ce4">
            <text:p><text:s/>3,25<text:s/></text:p>
          </table:table-cell>
          <table:table-cell office:value-type="float" office:value="118" table:style-name="ce4">
            <text:p><text:s/>118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0507</text:p>
          </table:table-cell>
          <table:table-cell office:value-type="string" table:style-name="ce5">
            <text:p>VERGALHAO P/ DEGRAU PLASTICO 1 1/2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326.90.90</text:p>
          </table:table-cell>
          <table:table-cell office:value-type="string" table:style-name="ce5">
            <text:p>7899005600772</text:p>
          </table:table-cell>
          <table:table-cell office:value-type="float" office:value="5" table:style-name="ce6">
            <text:p><text:s/>5,00<text:s/></text:p>
          </table:table-cell>
          <table:table-cell office:value-type="float" office:value="79.2" table:style-name="ce6">
            <text:p><text:s/>79,2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16075</text:p>
          </table:table-cell>
          <table:table-cell office:value-type="string" table:style-name="ce3">
            <text:p>VERGALHAO PARA DEGRAU PLASTICO 2 POL.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0</text:p>
          </table:table-cell>
          <table:table-cell office:value-type="string" table:style-name="ce3">
            <text:p>7326.90.90</text:p>
          </table:table-cell>
          <table:table-cell office:value-type="string" table:style-name="ce3">
            <text:p>7899005611587</text:p>
          </table:table-cell>
          <table:table-cell office:value-type="float" office:value="5" table:style-name="ce4">
            <text:p><text:s/>5,00<text:s/></text:p>
          </table:table-cell>
          <table:table-cell office:value-type="float" office:value="75" table:style-name="ce4">
            <text:p><text:s/>7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5">
            <text:p>007926</text:p>
          </table:table-cell>
          <table:table-cell office:value-type="string" table:style-name="ce5">
            <text:p>VISOR DIGITAL PARA CDT</text:p>
          </table:table-cell>
          <table:table-cell office:value-type="string" table:style-name="ce5">
            <text:p>RP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536.50.90</text:p>
          </table:table-cell>
          <table:table-cell office:value-type="string" table:style-name="ce5">
            <text:p>7899005615042</text:p>
          </table:table-cell>
          <table:table-cell office:value-type="float" office:value="9.75" table:style-name="ce6">
            <text:p><text:s/>9,75<text:s/></text:p>
          </table:table-cell>
          <table:table-cell office:value-type="float" office:value="785" table:style-name="ce6">
            <text:p><text:s/>785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style-name="ro1">
          <table:table-cell office:value-type="string" table:style-name="ce3">
            <text:p>026517</text:p>
          </table:table-cell>
          <table:table-cell office:value-type="string" table:style-name="ce3">
            <text:p>VOLANTE NOVO ENROL. CAPA</text:p>
          </table:table-cell>
          <table:table-cell office:value-type="string" table:style-name="ce3">
            <text:p>RP</text:p>
          </table:table-cell>
          <table:table-cell office:value-type="string" table:style-name="ce3">
            <text:p>1</text:p>
          </table:table-cell>
          <table:table-cell office:value-type="string" table:style-name="ce3">
            <text:p>3926.90.90</text:p>
          </table:table-cell>
          <table:table-cell office:value-type="string" table:style-name="ce3">
            <text:p>7899005632766</text:p>
          </table:table-cell>
          <table:table-cell office:value-type="float" office:value="9.75" table:style-name="ce4">
            <text:p><text:s/>9,75<text:s/></text:p>
          </table:table-cell>
          <table:table-cell office:value-type="float" office:value="527" table:style-name="ce4">
            <text:p><text:s/>527,00<text:s/></text:p>
          </table:table-cell>
          <table:table-cell office:value-type="string" office:string-value="" table:formula="of:=IFERROR(VLOOKUP([.A:.A];['SB1'.B:.G];6;FALSE);&quot;&quot;)" table:style-name="ce1"/>
          <table:table-cell table:number-columns-repeated="16375"/>
        </table:table-row>
        <table:table-row table:number-rows-repeated="1047303" table:style-name="ro1">
          <table:table-cell table:number-columns-repeated="16384"/>
        </table:table-row>
      </table:table>
      <table:table table:name="SB1" table:style-name="ta2">
        <table:table-column table:style-name="co10" table:number-columns-repeated="16384" table:default-cell-style-name="ce1"/>
        <table:table-row table:style-name="ro2">
          <table:table-cell office:value-type="string" table:style-name="ce9">
            <text:p>Filial<text:s text:c="6"/></text:p>
          </table:table-cell>
          <table:table-cell office:value-type="string" table:style-name="ce9">
            <text:p>Produto<text:s text:c="5"/></text:p>
          </table:table-cell>
          <table:table-cell office:value-type="string" table:style-name="ce9">
            <text:p>Armazem<text:s text:c="5"/></text:p>
          </table:table-cell>
          <table:table-cell office:value-type="string" table:style-name="ce9">
            <text:p>Endereco<text:s text:c="4"/></text:p>
          </table:table-cell>
          <table:table-cell office:value-type="string" table:style-name="ce9">
            <text:p>Num de Serie</text:p>
          </table:table-cell>
          <table:table-cell office:value-type="string" table:style-name="ce9">
            <text:p>Lote<text:s text:c="8"/></text:p>
          </table:table-cell>
          <table:table-cell office:value-type="string" table:style-name="ce9">
            <text:p>Quantidade<text:s text:c="2"/></text:p>
          </table:table-cell>
          <table:table-cell office:value-type="string" table:style-name="ce9">
            <text:p>Empenho<text:s text:c="5"/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7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1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6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1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3" table:style-name="ce10">
            <text:p>2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6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1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8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1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7" table:style-name="ce10">
            <text:p>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1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129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1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3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1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6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3B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2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3C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24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3C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3D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4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3D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0" table:style-name="ce10">
            <text:p>2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3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1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4B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6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4C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2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4D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5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4" table:style-name="ce10">
            <text:p>1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645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5B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8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5C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1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5D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37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60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42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6B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37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6C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38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42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B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42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B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36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C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42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C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38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D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38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D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38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D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43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7D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" table:style-name="ce10">
            <text:p>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8" table:style-name="ce10">
            <text:p>2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7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2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2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2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2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5" table:style-name="ce10">
            <text:p>1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4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4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4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7" table:style-name="ce10">
            <text:p>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4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4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4" table:style-name="ce10">
            <text:p>1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6" table:style-name="ce10">
            <text:p>1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0" table:style-name="ce10">
            <text:p>10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4" table:style-name="ce10">
            <text:p>1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6" table:style-name="ce10">
            <text:p>1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2" table:style-name="ce10">
            <text:p>1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0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0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96" table:style-name="ce10">
            <text:p>9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1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1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2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46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4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2" table:style-name="ce10">
            <text:p>1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0" table:style-name="ce10">
            <text:p>5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0" table:style-name="ce10">
            <text:p>4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68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68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68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68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73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7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7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432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" table:style-name="ce10">
            <text:p>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1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2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3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4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5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4" table:style-name="ce10">
            <text:p>2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5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3" table:style-name="ce10">
            <text:p>2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9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9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9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9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0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0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0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0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1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1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1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2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2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76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208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7" table:style-name="ce10">
            <text:p>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42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11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24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5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24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5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4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5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0" table:style-name="ce10">
            <text:p>3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5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5" table:style-name="ce10">
            <text:p>1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3" table:style-name="ce10">
            <text:p>1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0" table:style-name="ce10">
            <text:p>2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09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2" table:style-name="ce10">
            <text:p>1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7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59" table:style-name="ce10">
            <text:p>159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430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6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8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6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7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5" table:style-name="ce10">
            <text:p>1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" table:style-name="ce10">
            <text:p>1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4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4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6" table:style-name="ce10">
            <text:p>1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0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7" table:style-name="ce10">
            <text:p>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1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5" table:style-name="ce10">
            <text:p>1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2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2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2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99" table:style-name="ce10">
            <text:p>99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2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3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3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3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8" table:style-name="ce10">
            <text:p>1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3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4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81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" table:style-name="ce10">
            <text:p>1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7" table:style-name="ce10">
            <text:p>3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4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4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5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2" table:style-name="ce10">
            <text:p>1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78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307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2" table:style-name="ce10">
            <text:p>1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9" table:style-name="ce10">
            <text:p>19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24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094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8" table:style-name="ce10">
            <text:p>3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6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" table:style-name="ce10">
            <text:p>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4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6" table:style-name="ce10">
            <text:p>1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2" table:style-name="ce10">
            <text:p>4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7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" table:style-name="ce10">
            <text:p>1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8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7" table:style-name="ce10">
            <text:p>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8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03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99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7" table:style-name="ce10">
            <text:p>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4" table:style-name="ce10">
            <text:p>1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7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5" table:style-name="ce10">
            <text:p>1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7" table:style-name="ce10">
            <text:p>3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8" table:style-name="ce10">
            <text:p>2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7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71" table:style-name="ce10">
            <text:p>7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5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9" table:style-name="ce10">
            <text:p>19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1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3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5" table:style-name="ce10">
            <text:p>8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0" table:style-name="ce10">
            <text:p>2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7" table:style-name="ce10">
            <text:p>1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2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2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81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404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5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7" table:style-name="ce10">
            <text:p>1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7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5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" table:style-name="ce10">
            <text:p>1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4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5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9" table:style-name="ce10">
            <text:p>29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6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8" table:style-name="ce10">
            <text:p>1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6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7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7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18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4" table:style-name="ce10">
            <text:p>5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5" table:style-name="ce10">
            <text:p>1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430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78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6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9" table:style-name="ce10">
            <text:p>9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4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7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73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7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" table:style-name="ce10">
            <text:p>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7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2" table:style-name="ce10">
            <text:p>2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2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7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7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7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5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7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1" table:style-name="ce10">
            <text:p>5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9" table:style-name="ce10">
            <text:p>69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8" table:style-name="ce10">
            <text:p>4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7" table:style-name="ce10">
            <text:p>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" table:style-name="ce10">
            <text:p>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7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" table:style-name="ce10">
            <text:p>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8" table:style-name="ce10">
            <text:p>2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5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8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3" table:style-name="ce10">
            <text:p>2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1" table:style-name="ce10">
            <text:p>2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0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1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0" table:style-name="ce10">
            <text:p>2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1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" table:style-name="ce10">
            <text:p>1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09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" table:style-name="ce10">
            <text:p>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89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0" table:style-name="ce10">
            <text:p>2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4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" table:style-name="ce10">
            <text:p>4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5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007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8" table:style-name="ce10">
            <text:p>1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6" table:style-name="ce10">
            <text:p>1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721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8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2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901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1" table:style-name="ce10">
            <text:p>2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644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I0902A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8" table:style-name="ce10">
            <text:p>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0" table:style-name="ce10">
            <text:p>5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6" table:style-name="ce10">
            <text:p>1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3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" table:style-name="ce10">
            <text:p>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47" table:style-name="ce10">
            <text:p>4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4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7" table:style-name="ce10">
            <text:p>3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2" table:style-name="ce10">
            <text:p>2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5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8" table:style-name="ce10">
            <text:p>18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6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5" table:style-name="ce10">
            <text:p>1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27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9" table:style-name="ce10">
            <text:p>19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3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6" table:style-name="ce10">
            <text:p>2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6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" table:style-name="ce10">
            <text:p>1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7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5" table:style-name="ce10">
            <text:p>5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69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0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" table:style-name="ce10">
            <text:p>1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1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2" table:style-name="ce10">
            <text:p>1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19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2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3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4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" table:style-name="ce10">
            <text:p>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6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2" table:style-name="ce10">
            <text:p>3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68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" table:style-name="ce10">
            <text:p>6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70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2" table:style-name="ce10">
            <text:p>1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71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7" table:style-name="ce10">
            <text:p>1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772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0" table:style-name="ce10">
            <text:p>2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81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7" table:style-name="ce10">
            <text:p>67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281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" table:style-name="ce10">
            <text:p>11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105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2" table:style-name="ce10">
            <text:p>22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3557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3" table:style-name="ce10">
            <text:p>1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36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13" table:style-name="ce10">
            <text:p>11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43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10" table:style-name="ce10">
            <text:p>1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01</text:p>
          </table:table-cell>
          <table:table-cell office:value-type="string" table:style-name="ce9">
            <text:p>025354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RECEBIMENTO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3" table:style-name="ce10">
            <text:p>3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number-rows-repeated="1048303" table:style-name="ro2">
          <table:table-cell table:number-columns-repeated="16384"/>
        </table:table-row>
      </table:table>
      <table:database-ranges>
        <table:database-range table:target-range-address="Tabela_de_valores.A2:Tabela_de_valores.H1273" table:display-filter-buttons="true"/>
        <table:database-range table:target-range-address="SB1.A1:SB1.H27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 New" svg:font-family="&quot;Courier Ne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BuiltIn_20_37__32_-_32__202_nfase1" style:display-name="Excel_BuiltIn_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urier New" style:font-name-asian="Courier New" style:font-name-complex="Courier New" fo:font-size="8pt" style:font-size-asian="8pt" style:font-size-complex="8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dc:creator>Pedro Henrique Avelino de Souza</dc:creator>
    <meta:creation-date>2026-01-12T14:58:42Z</meta:creation-date>
    <dc:date>2026-06-17T17:56:17Z</dc:date>
    <meta:editing-cycles>1</meta:editing-cycles>
    <meta:editing-duration>PT81910S</meta:editing-duration>
  </office:meta>
</office:document-meta>
</file>